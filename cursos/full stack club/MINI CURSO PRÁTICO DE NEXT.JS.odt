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0AC42B2EE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paragraph-rsid="00070c62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rsid="00070c62" officeooo:paragraph-rsid="00070c62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811cc" officeooo:paragraph-rsid="000811cc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0c8bfa" officeooo:paragraph-rsid="000c8bfa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09216f" officeooo:paragraph-rsid="0009216f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ce95b" officeooo:paragraph-rsid="000ce95b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0d69d2" officeooo:paragraph-rsid="000d69d2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paragraph-rsid="000d69d2" style:font-size-asian="13pt" style:font-size-complex="13pt"/>
    </style:style>
    <style:style style:name="T1" style:family="text">
      <style:text-properties officeooo:rsid="00070c62"/>
    </style:style>
    <style:style style:name="T2" style:family="text">
      <style:text-properties officeooo:rsid="000d69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vite ter uma pagina inteira como Client Component</text:span></text:p>
      <text:p text:style-name="P2"/>
      <text:p text:style-name="P2">Prefirá sempre que possivel usar Server Component</text:p>
      <text:p text:style-name="P2"/>
      <text:p text:style-name="P2">“Pode renderizar como Client Component apenas o que é necessario”</text:p>
      <text:p text:style-name="P3"/>
      <text:p text:style-name="P4">ver o que precisar ter interatividade e criar um Client Component para aquilo</text:p>
      <text:p text:style-name="P3"/>
      <text:p text:style-name="P4">ao invés de: </text:p>
      <text:p text:style-name="P4">“use client”</text:p>
      <text:p text:style-name="P4">&lt;button onClick={id}&gt;&lt;button&gt;</text:p>
      <text:p text:style-name="P4">fazer: o use client esta apenas no componente ButtonClick</text:p>
      <text:p text:style-name="P4">“use server”</text:p>
      <text:p text:style-name="P4">&lt;ButtonClick /&gt;</text:p>
      <text:p text:style-name="P3"/>
      <text:p text:style-name="P5">Hidratação:</text:p>
      <text:p text:style-name="P6">um Client Component passa por um processo de hidratação (hydration) (só acontece em client components)</text:p>
      <text:p text:style-name="P6"/>
      <text:p text:style-name="P6">o html vai pronto pro server component (ja que é estatico), mas vai sem um onclick (ou qualquer coisa que precisa do javascript) (é ai que acontece a hidratação com js), depois da hidratação o client component passa o onclick (ou qualquer coisa js) pro server component junto do html, ou seja, passa o onclick para o html:</text:p>
      <text:p text:style-name="P6"/>
      <text:p text:style-name="P6"/>
      <text:p text:style-name="P6"><draw:frame draw:style-name="fr1" draw:name="Figura1" text:anchor-type="char" svg:x="-0.0043in" svg:y="0in" svg:width="2.5756in" svg:height="1.0689in" draw:z-index="0"><draw:image xlink:href="Pictures/100000010000019A000000AC42B2EEFC.png" xlink:type="simple" xlink:show="embed" xlink:actuate="onLoad" draw:mime-type="image/png"/></draw:frame></text:p>
      <text:p text:style-name="P6"/>
      <text:p text:style-name="P3"/>
      <text:p text:style-name="P5"><text:soft-page-break/>essa hidratação precisa de js para funcionar</text:p>
      <text:p text:style-name="P3"/>
      <text:p text:style-name="P7">Dentro de um Client Component não é possivel renderizar um Server Component, <text:span text:style-name="T2">a unica maneira de fazer isso é quando voce renderiza um client component e passa o server component pra ele como children</text:span></text:p>
      <text:p text:style-name="P3"/>
      <text:p text:style-name="P8">isso é usado no dia a dia para criar provider, um provider que fique em volta da sua aplicação (o provider é um client component como tanstackquery, contextapi etc.)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0T09:58:59.662565300</meta:creation-date>
    <dc:date>2026-07-10T10:53:10.399954700</dc:date>
    <meta:editing-duration>PT53M46S</meta:editing-duration>
    <meta:editing-cycles>10</meta:editing-cycles>
    <meta:generator>LibreOffice/25.2.7.2$Windows_X86_64 LibreOffice_project/5cbfd1ab6520636bb5f7b99185aa69bd7456825d</meta:generator>
    <meta:document-statistic meta:table-count="0" meta:image-count="1" meta:object-count="0" meta:page-count="2" meta:paragraph-count="16" meta:word-count="202" meta:character-count="1222" meta:non-whitespace-character-count="1035"/>
  </office:meta>
</office:document-meta>
</file>