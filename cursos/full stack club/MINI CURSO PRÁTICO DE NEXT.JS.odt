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A000000AC42B2EE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3pt" officeooo:rsid="00070c62" officeooo:paragraph-rsid="001163ae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officeooo:rsid="000811cc" officeooo:paragraph-rsid="000811cc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Ubuntu" fo:font-size="13pt" fo:font-weight="bold" officeooo:rsid="000811cc" officeooo:paragraph-rsid="000811cc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50%"/>
      <style:text-properties style:font-name="Ubuntu" fo:font-size="13pt" officeooo:rsid="000811cc" officeooo:paragraph-rsid="000811cc" fo:background-color="#dddddd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paragraph-rsid="000811cc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Ubuntu" fo:font-size="13pt" officeooo:rsid="0009216f" officeooo:paragraph-rsid="0009216f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rsid="000c8bfa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0c8bfa" officeooo:paragraph-rsid="000c8bfa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Ubuntu" fo:font-size="13pt" officeooo:rsid="000ce95b" officeooo:paragraph-rsid="000ce95b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3pt" officeooo:rsid="000d69d2" officeooo:paragraph-rsid="000d69d2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Ubuntu" fo:font-size="13pt" officeooo:paragraph-rsid="000d69d2" style:font-size-asian="13pt" style:font-size-complex="13pt"/>
    </style:style>
    <style:style style:name="T1" style:family="text">
      <style:text-properties officeooo:rsid="001163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11cc" fo:background-color="#dddddd" loext:char-shading-value="0"/>
    </style:style>
    <style:style style:name="T4" style:family="text">
      <style:text-properties officeooo:rsid="000d69d2"/>
    </style:style>
    <style:style style:name="T5" style:family="text">
      <style:text-properties officeooo:rsid="00133b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erver vs Client Components</text:h>
      <text:p text:style-name="P2">Evite ter uma página inteira como Client Component, <text:span text:style-name="T1">p</text:span>refir<text:span text:style-name="T1">a</text:span> sempre que possível usar Server Component. <text:span text:style-name="T1">É melhor</text:span> renderizar como Client Component apenas o necessário</text:p>
      <text:p text:style-name="P3"/>
      <text:p text:style-name="P4"><text:span text:style-name="T1">V</text:span>er o que <text:span text:style-name="T1">vai </text:span>precisar ter interatividade e criar um Client Component para aquilo</text:p>
      <text:p text:style-name="P3"/>
      <text:p text:style-name="P5">em vez de: </text:p>
      <text:p text:style-name="P6">“use client”</text:p>
      <text:p text:style-name="P6">&lt;button onClick={id}&gt;&lt;button&gt;</text:p>
      <text:p text:style-name="P4"/>
      <text:p text:style-name="P4"><text:span text:style-name="T2">fazer:</text:span> <text:span text:style-name="T1">(O</text:span> <text:span text:style-name="T1">Client Component</text:span> <text:span text:style-name="T1">é</text:span> apenas <text:span text:style-name="T1">o</text:span> componente ButtonClick<text:span text:style-name="T1">)</text:span></text:p>
      <text:p text:style-name="P6">“use server”</text:p>
      <text:p text:style-name="P7"><text:span text:style-name="T3">&lt;ButtonClick /&gt;</text:span></text:p>
      <text:h text:style-name="P1" text:outline-level="2">Hidratação <text:span text:style-name="T1">(Hydration)</text:span></text:h>
      <text:p text:style-name="P8">Os Client Components podem passar por um processo de hidratação para se tornarem interativos no navegador. Os Server Components não passam por hidratação.</text:p>
      <text:p text:style-name="P8"/>
      <text:p text:style-name="P8"><text:span text:style-name="T1">1. </text:span>O Server Component gera o HTML e o envia ao navegador.<text:line-break/><text:span text:style-name="T1">2. </text:span>Se houver Client Components na árvore, o HTML deles também pode ser enviado já renderizado.<text:line-break/><text:span text:style-name="T1">3. </text:span>O navegador exibe esse HTML imediatamente.<text:line-break/><text:span text:style-name="T1">4. </text:span>O JavaScript dos Client Components é baixado.<text:line-break/><text:span text:style-name="T1">5. </text:span>O React faz a hidratação, conectando os onClick, onChange e outros event handlers ao HTML que já estava na página.</text:p>
      <text:p text:style-name="P8"><text:soft-page-break/>O servidor envia o HTML já pronto para o navegador. Esse HTML não contém os event handlers (onClick, onChange, etc.), porque eles dependem do JavaScript. Depois que o JavaScript dos Client Components é carregado, o React faz a hidratação, conectando esses event handlers ao HTML existente e tornando a interface interativa.</text:p>
      <text:p text:style-name="P8"><draw:frame draw:style-name="fr1" draw:name="Figura1" text:anchor-type="char" svg:x="-0.0043in" svg:y="0.1638in" svg:width="2.5756in" svg:height="1.0689in" draw:z-index="0"><draw:image xlink:href="Pictures/100000010000019A000000AC42B2EEFC.png" xlink:type="simple" xlink:show="embed" xlink:actuate="onLoad" draw:mime-type="image/png"/></draw:frame></text:p>
      <text:p text:style-name="P8"/>
      <text:p text:style-name="P8"/>
      <text:p text:style-name="P8"/>
      <text:p text:style-name="P9"/>
      <text:p text:style-name="P10"><text:span text:style-name="T1">E</text:span>ssa hidratação precisa de js para funcionar</text:p>
      <text:p text:style-name="P3"/>
      <text:p text:style-name="P11">Dentro de um Client Component não é possível renderizar um Server Component, <text:span text:style-name="T4">a </text:span><text:span text:style-name="T1">ú</text:span><text:span text:style-name="T4">nica maneira de fazer isso é quando voc</text:span><text:span text:style-name="T1">ê</text:span><text:span text:style-name="T4"> renderiza um client component e passa o server component pra ele como children</text:span></text:p>
      <text:p text:style-name="P3"/>
      <text:p text:style-name="P12"><text:span text:style-name="T5">I</text:span>sso é usado no dia a dia para criar provider<text:span text:style-name="T5">s</text:span>, um provider que <text:span text:style-name="T5">fica </text:span>em volta da sua aplicação (o provider é um client component como tanstackquery, contextapi etc.)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0T09:58:59.662565300</meta:creation-date>
    <dc:date>2026-07-12T10:42:04.607789500</dc:date>
    <meta:editing-duration>PT54M18S</meta:editing-duration>
    <meta:editing-cycles>11</meta:editing-cycles>
    <meta:generator>LibreOffice/25.2.7.2$Windows_X86_64 LibreOffice_project/5cbfd1ab6520636bb5f7b99185aa69bd7456825d</meta:generator>
    <meta:document-statistic meta:table-count="0" meta:image-count="1" meta:object-count="0" meta:page-count="2" meta:paragraph-count="16" meta:word-count="272" meta:character-count="1684" meta:non-whitespace-character-count="1427"/>
  </office:meta>
</office:document-meta>
</file>