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80000019890093DDE.png" manifest:media-type="image/png"/>
  <manifest:file-entry manifest:full-path="Pictures/1000000100000132000000B132B7BF7C.png" manifest:media-type="image/png"/>
  <manifest:file-entry manifest:full-path="Pictures/100000010000006900000025CB8714F6.png" manifest:media-type="image/png"/>
  <manifest:file-entry manifest:full-path="Pictures/10000001000000C100000046CF104187.png" manifest:media-type="image/png"/>
  <manifest:file-entry manifest:full-path="Pictures/100000010000015C0000013112A4AAB2.png" manifest:media-type="image/png"/>
  <manifest:file-entry manifest:full-path="Pictures/10000001000001E1000000CFCB42C946.png" manifest:media-type="image/png"/>
  <manifest:file-entry manifest:full-path="Pictures/10000001000002B70000011A1B315D16.png" manifest:media-type="image/png"/>
  <manifest:file-entry manifest:full-path="Pictures/10000001000001FB000001552D0E3A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3pt" officeooo:rsid="000c9d25" officeooo:paragraph-rsid="000c9d25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rsid="000d5424" officeooo:paragraph-rsid="000d5424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0f3d5a" officeooo:paragraph-rsid="000f3d5a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12cac9" officeooo:paragraph-rsid="0012cac9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fo:font-weight="bold" officeooo:rsid="000f3d5a" officeooo:paragraph-rsid="000f3d5a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50%"/>
      <style:text-properties style:font-name="Ubuntu" fo:font-size="13pt" officeooo:rsid="0012cac9" officeooo:paragraph-rsid="0012cac9" fo:background-color="#dddddd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147cf0" officeooo:paragraph-rsid="00147cf0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1713da" officeooo:paragraph-rsid="001713d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1713da" officeooo:paragraph-rsid="0025e196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0pt" officeooo:rsid="001713da" officeooo:paragraph-rsid="001713da" style:font-size-asian="10pt" style:font-size-complex="10pt"/>
    </style:style>
    <style:style style:name="P13" style:family="paragraph" style:parent-style-name="Standard">
      <style:paragraph-properties fo:line-height="150%"/>
      <style:text-properties style:font-name="Ubuntu" fo:font-size="13pt" officeooo:rsid="00197fc4" officeooo:paragraph-rsid="00197fc4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1987f6" officeooo:paragraph-rsid="001987f6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1987f6" officeooo:paragraph-rsid="001987f6" fo:background-color="#dddddd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26ac23" officeooo:paragraph-rsid="0026ac23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1dce69" officeooo:paragraph-rsid="001dce69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1a9395" officeooo:paragraph-rsid="001a9395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1a9395" officeooo:paragraph-rsid="001a9395" fo:background-color="#dddddd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1c3a71" officeooo:paragraph-rsid="001c3a71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0pt" officeooo:rsid="001c3a71" officeooo:paragraph-rsid="001c3a71" fo:background-color="#dddddd" style:font-size-asian="10pt" style:font-size-complex="10pt"/>
    </style:style>
    <style:style style:name="P22" style:family="paragraph" style:parent-style-name="Standard">
      <style:paragraph-properties fo:line-height="150%"/>
      <style:text-properties style:font-name="Ubuntu" fo:font-size="13pt" officeooo:rsid="001dce69" officeooo:paragraph-rsid="001c3a71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1e61d6" officeooo:paragraph-rsid="001e61d6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officeooo:rsid="001f86cf" officeooo:paragraph-rsid="001f86cf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rsid="001f86cf" officeooo:paragraph-rsid="001f86cf" fo:background-color="#dddddd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rsid="00147cf0" officeooo:paragraph-rsid="001f86cf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officeooo:rsid="00147cf0" officeooo:paragraph-rsid="001f582f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147cf0" officeooo:paragraph-rsid="001f582f" fo:background-color="#dddddd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rsid="00147cf0" officeooo:paragraph-rsid="0027b16e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1f582f" officeooo:paragraph-rsid="001f582f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299aa9" officeooo:paragraph-rsid="00299aa9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2115d1" officeooo:paragraph-rsid="002115d1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21cbab" officeooo:paragraph-rsid="0021cbab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officeooo:rsid="0022152e" officeooo:paragraph-rsid="00299aa9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rsid="0022152e" officeooo:paragraph-rsid="0022152e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rsid="00235503" officeooo:paragraph-rsid="00235503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rsid="0024b9d1" officeooo:paragraph-rsid="00235503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24b9d1" officeooo:paragraph-rsid="0024b9d1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2556c5" officeooo:paragraph-rsid="002556c5" style:font-size-asian="13pt" style:font-size-complex="13pt"/>
    </style:style>
    <style:style style:name="T1" style:family="text">
      <style:text-properties officeooo:rsid="0025e1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5424"/>
    </style:style>
    <style:style style:name="T4" style:family="text">
      <style:text-properties fo:background-color="#dddddd" loext:char-shading-value="0"/>
    </style:style>
    <style:style style:name="T5" style:family="text">
      <style:text-properties fo:font-weight="bold" officeooo:rsid="0025e196" style:font-weight-asian="bold" style:font-weight-complex="bold"/>
    </style:style>
    <style:style style:name="T6" style:family="text">
      <style:text-properties officeooo:rsid="00183170"/>
    </style:style>
    <style:style style:name="T7" style:family="text">
      <style:text-properties officeooo:rsid="0026ac23"/>
    </style:style>
    <style:style style:name="T8" style:family="text">
      <style:text-properties officeooo:rsid="001987f6"/>
    </style:style>
    <style:style style:name="T9" style:family="text">
      <style:text-properties officeooo:rsid="0020016d"/>
    </style:style>
    <style:style style:name="T10" style:family="text">
      <style:text-properties officeooo:rsid="0027b16e"/>
    </style:style>
    <style:style style:name="T11" style:family="text">
      <style:text-properties fo:background-color="#ffff6d" loext:char-shading-value="0"/>
    </style:style>
    <style:style style:name="T12" style:family="text">
      <style:text-properties officeooo:rsid="001f582f"/>
    </style:style>
    <style:style style:name="T13" style:family="text">
      <style:text-properties officeooo:rsid="001f582f" fo:background-color="#dddddd" loext:char-shading-value="0"/>
    </style:style>
    <style:style style:name="T14" style:family="text">
      <style:text-properties fo:font-weight="normal" officeooo:rsid="0027b16e" style:font-weight-asian="normal" style:font-weight-complex="normal"/>
    </style:style>
    <style:style style:name="T15" style:family="text">
      <style:text-properties officeooo:rsid="00299aa9"/>
    </style:style>
    <style:style style:name="T16" style:family="text">
      <style:text-properties officeooo:rsid="0021cb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idratação (Hydration)</text:h>
      <text:p text:style-name="P2">Um client component continua sendo renderizado no servidor mas passa pela hidratação (hydration), ou seja, gera o html no servidor, manda pro usuário (sem interatividade), depois manda o js para o html e é hidratado “ativando” a interatividade (hidrata o html adicionando a interatividade)</text:p>
      <text:h text:style-name="P1" text:outline-level="2"><text:span text:style-name="T1">F</text:span>ormulários e <text:span text:style-name="T1">S</text:span>erver <text:span text:style-name="T1">A</text:span>ctio<text:span text:style-name="T1">n</text:span>s</text:h>
      <text:p text:style-name="P3"><text:span text:style-name="T1">F</text:span>ormulários são importantes no next <text:span text:style-name="T1">e p</text:span>ara criar um usuário no banco de dados através de um formulário é preciso utilizar server actions</text:p>
      <text:p text:style-name="P3"/>
      <text:p text:style-name="P3"><text:span text:style-name="T2">Server Actions:</text:span> <text:span text:style-name="T1">É</text:span> uma função criada no servidor, passada para um Client Component e executada no servidor quando o Client Component a chama. </text:p>
      <text:p text:style-name="P2"/>
      <text:p text:style-name="P2"><text:span text:style-name="T3">1. </text:span>A Server Action é criada no servidor.<text:line-break/><text:span text:style-name="T3">2. </text:span>Ela é passada para um Client Component (por exemplo, como action de um &lt;form&gt; ou como uma prop).<text:line-break/><text:span text:style-name="T3">3. </text:span>O Client Component a chama.<text:line-break/><text:span text:style-name="T3">4. </text:span>A função executa no servidor.</text:p>
      <text:p text:style-name="P4"/>
      <text:p text:style-name="P5">Funções server actions são colocadas em pastas chamadas: /<text:span text:style-name="T2">actions/</text:span></text:p>
      <text:p text:style-name="P4"/>
      <text:p text:style-name="P6"><text:span text:style-name="T1">É preciso</text:span> marcar as funções como server action utilizando o: <text:span text:style-name="T4">“use server”</text:span> no topo da pagina</text:p>
      <text:p text:style-name="P4"/>
      <text:p text:style-name="P5"><text:span text:style-name="T2">Cham</text:span><text:span text:style-name="T5">ar</text:span><text:span text:style-name="T2"> uma função server action dentro de um client component:</text:span> <text:span text:style-name="T4">action={createUser}</text:span></text:p>
      <text:p text:style-name="P5"/>
      <text:p text:style-name="P5"/>
      <text:p text:style-name="P4"><draw:frame draw:style-name="fr1" draw:name="Figura2" text:anchor-type="char" svg:x="0.0543in" svg:y="0.0346in" svg:width="2.55in" svg:height="1.4752in" draw:z-index="0"><draw:image xlink:href="Pictures/1000000100000132000000B132B7BF7C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7">Essa função é executada no servidor:</text:p>
      <text:p text:style-name="P4"><draw:frame draw:style-name="fr1" draw:name="Figura3" text:anchor-type="char" svg:x="3.1665in" svg:y="0.0638in" svg:width="1.1299in" svg:height="0.4189in" draw:z-index="1"><draw:image xlink:href="Pictures/100000010000006900000025CB8714F6.png" xlink:type="simple" xlink:show="embed" xlink:actuate="onLoad" draw:mime-type="image/png"/></draw:frame><draw:frame draw:style-name="fr1" draw:name="Figura4" text:anchor-type="char" svg:x="0.0374in" svg:y="0.0417in" svg:width="2.9in" svg:height="2.5417in" draw:z-index="2"><draw:image xlink:href="Pictures/100000010000015C0000013112A4AAB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Para pegar os valores dos inputs utilizando o <text:span text:style-name="T4">formData.get(“”)</text:span> é preciso utilizar a propriedade <text:span text:style-name="T4">name=””</text:span>: </text:p>
      <text:p text:style-name="P6"/>
      <text:p text:style-name="P8">&lt;input type=”text” name=”email” /&gt;</text:p>
      <text:p text:style-name="P6"/>
      <text:p text:style-name="P8">const formValues = {email: formData.get(“email”)}</text:p>
      <text:p text:style-name="P4"/>
      <text:p text:style-name="P6"><text:span text:style-name="T1">S</text:span>erver action é uma função, só que no final o next vai transformar ela em uma rota http</text:p>
      <text:p text:style-name="P6"/>
      <text:p text:style-name="P6"><text:span text:style-name="T1">V</text:span>alidações precisam ser feitos no client side (no formulário) e também na server action porque ela acaba sendo uma rota http como qualquer outra, então é preciso validá-la la dentro</text:p>
      <text:p text:style-name="P6"><text:soft-page-break/><text:span text:style-name="T1">P</text:span>ara trabalhar com formulários da melhor forma é preciso fazer validações nos próprios inputs (require, maxlength, etc.) e nas server actions <text:span text:style-name="T1">(</text:span>é bastante utilizado o zod que é uma biblioteca de validação)</text:p>
      <text:p text:style-name="P4"/>
      <text:p text:style-name="P9"><text:span text:style-name="T2">Validação com zod, a partir de 1:52:42 -</text:span> <text:s/><text:a xlink:type="simple" xlink:href="https://www.youtube.com/watch?v=xqICXyJ8jzc" text:style-name="Internet_20_link" text:visited-style-name="Visited_20_Internet_20_Link">https://www.youtube.com/watch?v=xqICXyJ8jzc</text:a></text:p>
      <text:p text:style-name="P9"/>
      <text:p text:style-name="P10"><text:span text:style-name="T1">A</text:span> vantagem de fazer um formulário com nextjs e não com shadcn ou react hook form é que mesmo desativando o j<text:span text:style-name="T1">avascript</text:span> o formulário funcionará já que é feito no servidor (server side), também é bom que diminui a quantidade de j<text:span text:style-name="T1">ava</text:span>s<text:span text:style-name="T1">cript</text:span> mandado para o cliente, o hydration não vai ser necessário.</text:p>
      <text:p text:style-name="P10"/>
      <text:p text:style-name="P11">As server actions podem redirecionar o usuário para outra tela (no final da pagina) <text:span text:style-name="T6">(o redirect não pode ser chamado dentro de try catch blocks):</text:span></text:p>
      <text:p text:style-name="P10"/>
      <text:p text:style-name="P12">create-user.ts</text:p>
      <text:p text:style-name="P10"><text:span text:style-name="T4">redirect(“/”)</text:span></text:p>
      <text:p text:style-name="P10"/>
      <text:p text:style-name="P10"><text:span text:style-name="T1">E</text:span>m formulários mais simples é melhor utilizar nextjs mas quando for formulários mais complexos (formulários com condicionais por exemplo) dai é aconselhável utilizar um react hook form <text:span text:style-name="T1">ou outra lib</text:span></text:p>
      <text:h text:style-name="P1" text:outline-level="2">ISR</text:h>
      <text:p text:style-name="P13">Por padrão as paginas do nextjs são estáticas, ou seja, gera conteúdo na hora do build <text:span text:style-name="T7">mas q</text:span>uando recebe um parâmetro na rota (<text:span text:style-name="T4">[id]</text:span>) a pagina vira dinâmica (por padrão)</text:p>
      <text:p text:style-name="P10"/>
      <text:p text:style-name="P13"><text:span text:style-name="T7">P</text:span>ara tornar uma pagina <text:span text:style-name="T8">(</text:span>que não tem [id]<text:span text:style-name="T8">)</text:span> dinâmica <text:span text:style-name="T8">é preciso fazer:</text:span></text:p>
      <text:p text:style-name="P13"><text:span text:style-name="T4">export const dynamic = “force-dynamic</text:span>”</text:p>
      <text:p text:style-name="P14"><text:soft-page-break/>Para tornar uma pagina incremental static site regeneration, ou seja, para fazer uma pagina atualizar de tempos em tempos (gerar estático e ir regenerando de tempos em tempos):</text:p>
      <text:p text:style-name="P14"/>
      <text:p text:style-name="P15">export const revalidate = 60</text:p>
      <text:p text:style-name="P10"/>
      <text:p text:style-name="P14"><text:span text:style-name="T7">N</text:span>o valor de revalidate é colocada o tempo em segundos que a pagina será regenerada: de 60 em 60 segundos a pagina é regenerada, ou seja, atualizada</text:p>
      <text:p text:style-name="P14"/>
      <text:p text:style-name="P16">Quanto mais buscas mais custo.</text:p>
      <text:h text:style-name="P1" text:outline-level="2">Cache</text:h>
      <text:p text:style-name="P17">O sistema de cache do next é uma das ferramentas mais poderosas dele <text:span text:style-name="T7">com ele </text:span><text:span text:style-name="T9">é possível cachear funções e requisições (fetch)</text:span></text:p>
      <text:p text:style-name="P17"/>
      <text:p text:style-name="P18">É possível fazer a revalidação por requisição, não deixando esse trabalho para a pagina inteira (o fetch é executado quando for feito o build):</text:p>
      <text:p text:style-name="P18"/>
      <text:p text:style-name="P19">const data = await fetch(“URL”, {</text:p>
      <text:p text:style-name="P19"><text:s text:c="3"/>next: {revalidate: 10}</text:p>
      <text:p text:style-name="P19">})</text:p>
      <text:p text:style-name="P10"/>
      <text:p text:style-name="P18">além do revalidate também é possível cachear a requisição:</text:p>
      <text:p text:style-name="P19">const data = await fetch(“URL”, {</text:p>
      <text:p text:style-name="P19"><text:s text:c="3"/>cache: “force-cache”</text:p>
      <text:p text:style-name="P19">})</text:p>
      <text:p text:style-name="P10"/>
      <text:p text:style-name="P10"/>
      <text:p text:style-name="P10"/>
      <text:p text:style-name="P20"><text:soft-page-break/>Também é possível cachear chamadas de banco de dados:</text:p>
      <text:p text:style-name="P20"/>
      <text:p text:style-name="P21">import { cacheLife } from 'next/cache'</text:p>
      <text:p text:style-name="P21">export async function getUsers() {</text:p>
      <text:p text:style-name="P21"><text:s text:c="3"/>“use cache”</text:p>
      <text:p text:style-name="P21"><text:s text:c="3"/>cacheLife(“hours”)</text:p>
      <text:p text:style-name="P21"><text:s text:c="3"/>return db.query(“SELECT * FROM users”)</text:p>
      <text:p text:style-name="P21">}</text:p>
      <text:p text:style-name="P9"/>
      <text:p text:style-name="P20">Ou</text:p>
      <text:p text:style-name="P20"/>
      <text:p text:style-name="P21">import { cacheLife } from 'next/cache'</text:p>
      <text:p text:style-name="P21"><text:s/></text:p>
      <text:p text:style-name="P21">export default async function Page() {</text:p>
      <text:p text:style-name="P21"><text:s text:c="2"/>'use cache'</text:p>
      <text:p text:style-name="P21"><text:s text:c="2"/>cacheLife('hours')</text:p>
      <text:p text:style-name="P21"><text:s/></text:p>
      <text:p text:style-name="P21"><text:s text:c="2"/>const users = await db.query('SELECT * FROM users')</text:p>
      <text:p text:style-name="P21"><text:s/></text:p>
      <text:p text:style-name="P21"><text:s text:c="2"/>return (</text:p>
      <text:p text:style-name="P21"><text:s text:c="4"/>&lt;ul&gt;</text:p>
      <text:p text:style-name="P21"><text:s text:c="6"/>{users.map((user) =&gt; (</text:p>
      <text:p text:style-name="P21"><text:s text:c="8"/>&lt;li key={user.id}&gt;{user.name}&lt;/li&gt;</text:p>
      <text:p text:style-name="P21"><text:s text:c="6"/>))}</text:p>
      <text:p text:style-name="P21"><text:s text:c="4"/>&lt;/ul&gt;</text:p>
      <text:p text:style-name="P21"><text:s text:c="2"/>)</text:p>
      <text:p text:style-name="P21">}</text:p>
      <text:p text:style-name="P22"/>
      <text:p text:style-name="P23">Para deixar de lado o tempo de revalidação do cache e atualizar quando um usuário for criado por exemplo:</text:p>
      <text:p text:style-name="P23"/>
      <text:p text:style-name="P23">no <text:span text:style-name="T4">create-user.ts</text:span> onde o usuário é criado, no final da pagina será colocado:</text:p>
      <text:p text:style-name="P23"><text:span text:style-name="T4">revalidatePath(“”)</text:span> ← Qual página será revalidada</text:p>
      <text:p text:style-name="P20"/>
      <text:p text:style-name="P23">Ou seja, quando criar o usuário alguma pagina será revalidada</text:p>
      <text:h text:style-name="P1" text:outline-level="2"><text:soft-page-break/>revalidateTag</text:h>
      <text:p text:style-name="P24">Todas as paginas que tiverem a mesma tag serão revalidadas. Na função que cria um usuário (quando clicar para criar) no final dela será colocado um <text:span text:style-name="T4">revalidateTag(“tag”)</text:span>, para que ao criar um usuário todas as paginas que tenham a tag <text:span text:style-name="T10">sejam</text:span> atualizadas <text:span text:style-name="T10">(</text:span>as páginas serão atualizadas porque o banco de dados <text:span text:style-name="T10">será</text:span> atualizado já que o banco de dados terá a tag<text:span text:style-name="T10">)</text:span>:</text:p>
      <text:p text:style-name="P24"/>
      <text:p text:style-name="P25">export async function getPosts() {<text:line-break/> <text:s/>"use cache";<text:line-break/></text:p>
      <text:p text:style-name="P25"><text:s text:c="2"/>cacheLife(“hours”)<text:line-break/> <text:s/>cacheTag("posts"); ← tag que ferá o getPosts buscar os dados de novo<text:line-break/><text:line-break/> <text:s/>return db.post.findMany();<text:line-break/>}</text:p>
      <text:p text:style-name="P24"/>
      <text:p text:style-name="P24"><text:span text:style-name="T10">O</text:span> fetch também pode ter uma tag, essa tag fará o fetch buscar os dados de novo, <text:span text:style-name="T11">fazendo tudo o que usa esse dados atualizarem</text:span></text:p>
      <text:p text:style-name="P26"/>
      <text:p text:style-name="P27">Você faz o cache diretamente no fetch:<text:line-break/><text:line-break/><text:span text:style-name="T4">const posts = await fetch("https://api.vercel.app/blog", {</text:span></text:p>
      <text:p text:style-name="P28"><text:s text:c="2"/><text:span text:style-name="T12">cache: “force-cache”</text:span><text:line-break/> <text:s/>next: {<text:line-break/> <text:s text:c="3"/>tags: ["posts"],</text:p>
      <text:p text:style-name="P28"><text:s text:c="4"/><text:span text:style-name="T12">revalidate: 3600</text:span><text:line-break/> <text:s/>},<text:line-break/>});</text:p>
      <text:p text:style-name="P9"/>
      <text:p text:style-name="P9"><text:soft-page-break/>Agora os dados recebidos pelo fetch pertencem à tag “posts”.</text:p>
      <text:p text:style-name="P9"/>
      <text:p text:style-name="P9">Depois:<text:line-break/><text:line-break/><text:span text:style-name="T4">revalidateTag("posts");</text:span><text:line-break/><text:line-break/>Todos os fetch que usam essa tag ficam desatualizados (stale) <text:span text:style-name="T10">e por isso serão buscado no banco de novo</text:span>.</text:p>
      <text:h text:style-name="P1" text:outline-level="2">Cache Components</text:h>
      <text:p text:style-name="P27">Hoje existe o Cache Components, que permite cachear funções sem precisar de unstable_cache.<text:line-break/><text:line-break/><text:span text:style-name="T2">Por exemplo (forma moderna):</text:span><text:line-break/><text:line-break/><text:span text:style-name="T4">import { cacheTag } from "next/cache";<text:line-break/><text:line-break/>export async function getPosts() {<text:line-break/> <text:s/>"use cache";<text:line-break/></text:span></text:p>
      <text:p text:style-name="P27"><text:span text:style-name="T4"><text:s text:c="2"/></text:span><text:span text:style-name="T13">cacheLife(“hours”)</text:span><text:span text:style-name="T4"><text:line-break/> <text:s/>cacheTag("posts");<text:line-break/><text:line-break/> <text:s/>return db.post.findMany();<text:line-break/>}</text:span><text:line-break/><text:line-break/>Agora essa função pertence à tag “posts”.</text:p>
      <text:p text:style-name="P27"/>
      <text:p text:style-name="P9"><text:soft-page-break/><text:span text:style-name="T4">revalidateTag("posts")</text:span><text:line-break/><text:line-break/>A próxima vez que alguém chamar <text:span text:style-name="T4">getPosts()</text:span>, ela será executada novamente.</text:p>
      <text:h text:style-name="P1" text:outline-level="2">updateTag</text:h>
      <text:p text:style-name="P29"><text:span text:style-name="T10">u</text:span>pdateTag() é <text:span text:style-name="T10">uma novidade do nextjs, </text:span>Ela não marca o cache como stale <text:span text:style-name="T10">(desatualizados)</text:span>. <text:span text:style-name="T10">E</text:span>la <text:span text:style-name="T10">faz eles expirarem</text:span> imediatamente, <text:span text:style-name="T10">fazendo com que os dados sejam buscados no banco imediatamente</text:span><text:line-break/><text:line-break/><text:span text:style-name="T2">Segundo a documentação: </text:span><text:span text:style-name="T14">r</text:span>evalidateTag marca os dados como desatualizados (stale), enquanto updateTag faz o cache expirar imediatamente.<text:line-break/><text:line-break/><text:span text:style-name="T2">Na prática: </text:span><text:span text:style-name="T4">updateTag("posts")</text:span> é mais agressivo. É usado principalmente quando você acabou de alterar um dado e quer garantir que ninguém veja a versão antiga.</text:p>
      <text:p text:style-name="P30"/>
      <text:p text:style-name="P30"><text:span text:style-name="T2">Resumindo:</text:span> fetch Controla o cache da requisição HTTP enquanto cache components Controla o cache da função inteira, seja ela usando banco de dados, ORM, filesystem, ou até mesmo fetch.</text:p>
      <text:h text:style-name="P1" text:outline-level="2">Middleware</text:h>
      <text:p text:style-name="P31">Depreciado, agora é usado o proxy.</text:p>
      <text:p text:style-name="P31"/>
      <text:p text:style-name="P32">São funções que <text:span text:style-name="T15">executam</text:span> antes d<text:span text:style-name="T15">a</text:span> página <text:span text:style-name="T15">ser mostrada</text:span></text:p>
      <text:p text:style-name="P30"/>
      <text:p text:style-name="P32"><text:span text:style-name="T15">N</text:span>a raiz do projeto é criado um <text:span text:style-name="T4">middleware.ts</text:span></text:p>
      <text:p text:style-name="P32"/>
      <text:p text:style-name="P32"><text:soft-page-break/><text:span text:style-name="T15">N</text:span>ele será colocado o código que <text:span text:style-name="T16">vai </text:span>rod<text:span text:style-name="T16">ar</text:span> antes de deixar o usuário ir para a tela: <text:span text:style-name="T16">no código abaixo vai funcionar apenas para a home (“/”)</text:span></text:p>
      <text:p text:style-name="P30"><draw:frame draw:style-name="fr1" draw:name="Figura1" text:anchor-type="char" svg:x="0.0083in" svg:y="0.1417in" svg:width="5.3717in" svg:height="2.1035in" draw:z-index="3"><draw:image xlink:href="Pictures/10000001000002B70000011A1B315D16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3"/>
      <text:p text:style-name="P33">Se tiver dentro da rota users o código a baixo será executado antes:</text:p>
      <text:p text:style-name="P30"/>
      <text:p text:style-name="P30"><draw:frame draw:style-name="fr1" draw:name="Figura5" text:anchor-type="char" svg:x="0.05in" svg:y="-0.0736in" svg:width="3.7547in" svg:height="1.5728in" draw:z-index="4"><draw:image xlink:href="Pictures/10000001000001E1000000CFCB42C946.png" xlink:type="simple" xlink:show="embed" xlink:actuate="onLoad" draw:mime-type="image/png"/></draw:frame></text:p>
      <text:p text:style-name="P30"/>
      <text:p text:style-name="P30"/>
      <text:p text:style-name="P30"/>
      <text:p text:style-name="P34"/>
      <text:p text:style-name="P34"/>
      <text:p text:style-name="P34">Com isso é possível verificar a role do usuário ou um token de autenticação para ver se o usuário é permitido estar naquela página</text:p>
      <text:p text:style-name="P30"/>
      <text:p text:style-name="P35">No código a baixo é verificado se o usuário esta logado, se não estiver será redirecionado para a pagina de login:</text:p>
      <text:p text:style-name="P30"><draw:frame draw:style-name="fr1" draw:name="Figura6" text:anchor-type="char" svg:x="-0.0209in" svg:y="0.0272in" svg:width="3.0709in" svg:height="2.0146in" draw:z-index="5"><draw:image xlink:href="Pictures/10000001000001FB000001552D0E3A30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5"><text:soft-page-break/><text:span text:style-name="T15">S</text:span>e <text:span text:style-name="T15">o site não possuir</text:span> cookies significa que o usuário não esta logado</text:p>
      <text:p text:style-name="P30"/>
      <text:p text:style-name="P36">O middleware é um edge runtime: é como se fosse um node só que limitado (não tem todas as apis do node), as APIs que tem são:</text:p>
      <text:p text:style-name="P36"><draw:frame draw:style-name="fr1" draw:name="Figura7" text:anchor-type="char" svg:x="0.0457in" svg:y="0.1083in" svg:width="2.1646in" svg:height="2.7992in" draw:z-index="6"><draw:image xlink:href="Pictures/10000001000001480000019890093DDE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15">Já</text:span> que o middleware vai rodar antes de toda a pagina, ele não pode ser demorado, o edge runtime roda perto do usuário para ser rapido</text:p>
      <text:p text:style-name="P36"/>
      <text:p text:style-name="P38"><text:span text:style-name="T15">P</text:span>ara usar todas as APIs do node no middleware (deixará de se rápido):</text:p>
      <text:p text:style-name="P38"><draw:frame draw:style-name="fr1" draw:name="Figura8" text:anchor-type="char" svg:x="0.0417in" svg:y="0.1417in" svg:width="1.6083in" svg:height="0.5835in" draw:z-index="7"><draw:image xlink:href="Pictures/10000001000000C100000046CF104187.png" xlink:type="simple" xlink:show="embed" xlink:actuate="onLoad" draw:mime-type="image/png"/></draw:frame></text:p>
      <text:p text:style-name="P36"/>
      <text:p text:style-name="P36"/>
      <text:p text:style-name="P39"/>
      <text:p text:style-name="P39"><text:span text:style-name="T15">H</text:span>oje em dia é possível fazer deploy do next na AWS com o opennext usando o SST, também é possível fazer build da sua aplicação usando docker e rodar um servidor com sua imagem docker com limitações e por último da pra usar a vercel (mas tem um preço salgado), que é a melhor maneira.</text:p>
      <text:p text:style-name="P39"/>
      <text:p text:style-name="P39">Uma desvantagem de usar next é que voce fica refém da vercel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1T14:03:27.563215900</meta:creation-date>
    <dc:date>2026-07-12T11:11:51.813246400</dc:date>
    <meta:editing-duration>PT2H21M18S</meta:editing-duration>
    <meta:editing-cycles>24</meta:editing-cycles>
    <meta:generator>LibreOffice/25.2.7.2$Windows_X86_64 LibreOffice_project/5cbfd1ab6520636bb5f7b99185aa69bd7456825d</meta:generator>
    <meta:document-statistic meta:table-count="0" meta:image-count="8" meta:object-count="0" meta:page-count="10" meta:paragraph-count="99" meta:word-count="1277" meta:character-count="7877" meta:non-whitespace-character-count="6593"/>
  </office:meta>
</office:document-meta>
</file>