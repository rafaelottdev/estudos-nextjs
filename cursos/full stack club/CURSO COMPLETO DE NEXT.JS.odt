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80000019890093DDE.png" manifest:media-type="image/png"/>
  <manifest:file-entry manifest:full-path="Pictures/1000000100000132000000B132B7BF7C.png" manifest:media-type="image/png"/>
  <manifest:file-entry manifest:full-path="Pictures/100000010000006900000025CB8714F6.png" manifest:media-type="image/png"/>
  <manifest:file-entry manifest:full-path="Pictures/10000001000000C100000046CF104187.png" manifest:media-type="image/png"/>
  <manifest:file-entry manifest:full-path="Pictures/100000010000015C0000013112A4AAB2.png" manifest:media-type="image/png"/>
  <manifest:file-entry manifest:full-path="Pictures/10000001000001E1000000CFCB42C946.png" manifest:media-type="image/png"/>
  <manifest:file-entry manifest:full-path="Pictures/10000001000002B70000011A1B315D16.png" manifest:media-type="image/png"/>
  <manifest:file-entry manifest:full-path="Pictures/10000001000001FB000001552D0E3A3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Ubuntu" svg:font-family="Ubuntu"/>
  </office:font-face-decls>
  <office:automatic-styles>
    <style:style style:name="P1" style:family="paragraph" style:parent-style-name="Standard">
      <style:paragraph-properties fo:line-height="150%"/>
      <style:text-properties style:font-name="Ubuntu" fo:font-size="13pt" style:font-size-asian="13pt" style:font-size-complex="13pt"/>
    </style:style>
    <style:style style:name="P2" style:family="paragraph" style:parent-style-name="Standard">
      <style:paragraph-properties fo:line-height="150%"/>
      <style:text-properties style:font-name="Ubuntu" fo:font-size="13pt" officeooo:rsid="000c9d25" officeooo:paragraph-rsid="000c9d25" style:font-size-asian="13pt" style:font-size-complex="13pt"/>
    </style:style>
    <style:style style:name="P3" style:family="paragraph" style:parent-style-name="Standard">
      <style:paragraph-properties fo:line-height="150%"/>
      <style:text-properties style:font-name="Ubuntu" fo:font-size="13pt" officeooo:rsid="000d5424" officeooo:paragraph-rsid="000d5424" style:font-size-asian="13pt" style:font-size-complex="13pt"/>
    </style:style>
    <style:style style:name="P4" style:family="paragraph" style:parent-style-name="Standard">
      <style:paragraph-properties fo:line-height="150%"/>
      <style:text-properties style:font-name="Ubuntu" fo:font-size="13pt" officeooo:rsid="000f3d5a" officeooo:paragraph-rsid="000f3d5a" style:font-size-asian="13pt" style:font-size-complex="13pt"/>
    </style:style>
    <style:style style:name="P5" style:family="paragraph" style:parent-style-name="Standard">
      <style:paragraph-properties fo:line-height="150%"/>
      <style:text-properties style:font-name="Ubuntu" fo:font-size="13pt" officeooo:rsid="0012cac9" officeooo:paragraph-rsid="0012cac9" style:font-size-asian="13pt" style:font-size-complex="13pt"/>
    </style:style>
    <style:style style:name="P6" style:family="paragraph" style:parent-style-name="Standard">
      <style:paragraph-properties fo:line-height="150%"/>
      <style:text-properties style:font-name="Ubuntu" fo:font-size="13pt" officeooo:rsid="00147cf0" officeooo:paragraph-rsid="00147cf0" style:font-size-asian="13pt" style:font-size-complex="13pt"/>
    </style:style>
    <style:style style:name="P7" style:family="paragraph" style:parent-style-name="Standard">
      <style:paragraph-properties fo:line-height="150%"/>
      <style:text-properties style:font-name="Ubuntu" fo:font-size="13pt" officeooo:rsid="001713da" officeooo:paragraph-rsid="001713da" style:font-size-asian="13pt" style:font-size-complex="13pt"/>
    </style:style>
    <style:style style:name="P8" style:family="paragraph" style:parent-style-name="Standard">
      <style:paragraph-properties fo:line-height="150%"/>
      <style:text-properties style:font-name="Ubuntu" fo:font-size="9pt" officeooo:rsid="001713da" officeooo:paragraph-rsid="001713da" style:font-size-asian="9pt" style:font-size-complex="9pt"/>
    </style:style>
    <style:style style:name="P9" style:family="paragraph" style:parent-style-name="Standard">
      <style:paragraph-properties fo:line-height="150%"/>
      <style:text-properties style:font-name="Ubuntu" fo:font-size="13pt" officeooo:rsid="00183170" officeooo:paragraph-rsid="00183170" style:font-size-asian="13pt" style:font-size-complex="13pt"/>
    </style:style>
    <style:style style:name="P10" style:family="paragraph" style:parent-style-name="Standard">
      <style:paragraph-properties fo:line-height="150%" fo:text-align="center" style:justify-single-word="false"/>
      <style:text-properties style:font-name="Ubuntu" fo:font-size="13pt" officeooo:rsid="0019c472" officeooo:paragraph-rsid="0019c472" style:font-size-asian="13pt" style:font-size-complex="13pt"/>
    </style:style>
    <style:style style:name="P11" style:family="paragraph" style:parent-style-name="Standard">
      <style:paragraph-properties fo:line-height="150%"/>
      <style:text-properties style:font-name="Ubuntu" fo:font-size="13pt" officeooo:rsid="00197fc4" officeooo:paragraph-rsid="00197fc4" style:font-size-asian="13pt" style:font-size-complex="13pt"/>
    </style:style>
    <style:style style:name="P12" style:family="paragraph" style:parent-style-name="Standard">
      <style:paragraph-properties fo:line-height="150%"/>
      <style:text-properties style:font-name="Ubuntu" fo:font-size="13pt" officeooo:rsid="001987f6" officeooo:paragraph-rsid="001987f6" style:font-size-asian="13pt" style:font-size-complex="13pt"/>
    </style:style>
    <style:style style:name="P13" style:family="paragraph" style:parent-style-name="Standard">
      <style:paragraph-properties fo:line-height="150%"/>
      <style:text-properties style:font-name="Ubuntu" fo:font-size="13pt" officeooo:rsid="001dce69" officeooo:paragraph-rsid="001dce69" style:font-size-asian="13pt" style:font-size-complex="13pt"/>
    </style:style>
    <style:style style:name="P14" style:family="paragraph" style:parent-style-name="Standard">
      <style:paragraph-properties fo:line-height="150%"/>
      <style:text-properties style:font-name="Ubuntu" fo:font-size="13pt" officeooo:rsid="0020016d" officeooo:paragraph-rsid="0020016d" style:font-size-asian="13pt" style:font-size-complex="13pt"/>
    </style:style>
    <style:style style:name="P15" style:family="paragraph" style:parent-style-name="Standard">
      <style:paragraph-properties fo:line-height="150%"/>
      <style:text-properties style:font-name="Ubuntu" fo:font-size="13pt" officeooo:rsid="001a9395" officeooo:paragraph-rsid="001a9395" style:font-size-asian="13pt" style:font-size-complex="13pt"/>
    </style:style>
    <style:style style:name="P16" style:family="paragraph" style:parent-style-name="Standard">
      <style:paragraph-properties fo:line-height="150%"/>
      <style:text-properties style:font-name="Ubuntu" fo:font-size="13pt" officeooo:rsid="001c3a71" officeooo:paragraph-rsid="001c3a71" style:font-size-asian="13pt" style:font-size-complex="13pt"/>
    </style:style>
    <style:style style:name="P17" style:family="paragraph" style:parent-style-name="Standard">
      <style:paragraph-properties fo:line-height="150%"/>
      <style:text-properties style:font-name="Ubuntu" fo:font-size="10pt" officeooo:rsid="001c3a71" officeooo:paragraph-rsid="001c3a71" style:font-size-asian="10pt" style:font-size-complex="10pt"/>
    </style:style>
    <style:style style:name="P18" style:family="paragraph" style:parent-style-name="Standard">
      <style:paragraph-properties fo:line-height="150%"/>
      <style:text-properties style:font-name="Ubuntu" fo:font-size="13pt" officeooo:rsid="001e61d6" officeooo:paragraph-rsid="001e61d6" style:font-size-asian="13pt" style:font-size-complex="13pt"/>
    </style:style>
    <style:style style:name="P19" style:family="paragraph" style:parent-style-name="Standard">
      <style:paragraph-properties fo:line-height="150%" fo:text-align="center" style:justify-single-word="false"/>
      <style:text-properties style:font-name="Ubuntu" fo:font-size="13pt" officeooo:rsid="001e61d6" officeooo:paragraph-rsid="001e61d6" style:font-size-asian="13pt" style:font-size-complex="13pt"/>
    </style:style>
    <style:style style:name="P20" style:family="paragraph" style:parent-style-name="Standard">
      <style:paragraph-properties fo:line-height="150%"/>
      <style:text-properties style:font-name="Ubuntu" fo:font-size="13pt" officeooo:rsid="001f86cf" officeooo:paragraph-rsid="001f86cf" style:font-size-asian="13pt" style:font-size-complex="13pt"/>
    </style:style>
    <style:style style:name="P21" style:family="paragraph" style:parent-style-name="Standard">
      <style:paragraph-properties fo:line-height="150%"/>
      <style:text-properties style:font-name="Ubuntu" fo:font-size="13pt" officeooo:rsid="00147cf0" officeooo:paragraph-rsid="001f582f" style:font-size-asian="13pt" style:font-size-complex="13pt"/>
    </style:style>
    <style:style style:name="P22" style:family="paragraph" style:parent-style-name="Standard">
      <style:paragraph-properties fo:line-height="150%"/>
      <style:text-properties style:font-name="Ubuntu" fo:font-size="13pt" officeooo:rsid="001f582f" officeooo:paragraph-rsid="001f582f" style:font-size-asian="13pt" style:font-size-complex="13pt"/>
    </style:style>
    <style:style style:name="P23" style:family="paragraph" style:parent-style-name="Standard">
      <style:paragraph-properties fo:line-height="150%" fo:text-align="center" style:justify-single-word="false"/>
      <style:text-properties style:font-name="Ubuntu" fo:font-size="13pt" officeooo:rsid="002115d1" officeooo:paragraph-rsid="001f582f" style:font-size-asian="13pt" style:font-size-complex="13pt"/>
    </style:style>
    <style:style style:name="P24" style:family="paragraph" style:parent-style-name="Standard">
      <style:paragraph-properties fo:line-height="150%"/>
      <style:text-properties style:font-name="Ubuntu" fo:font-size="13pt" officeooo:rsid="002115d1" officeooo:paragraph-rsid="002115d1" style:font-size-asian="13pt" style:font-size-complex="13pt"/>
    </style:style>
    <style:style style:name="P25" style:family="paragraph" style:parent-style-name="Standard">
      <style:paragraph-properties fo:line-height="150%"/>
      <style:text-properties style:font-name="Ubuntu" fo:font-size="13pt" officeooo:rsid="0021cbab" officeooo:paragraph-rsid="0021cbab" style:font-size-asian="13pt" style:font-size-complex="13pt"/>
    </style:style>
    <style:style style:name="P26" style:family="paragraph" style:parent-style-name="Standard">
      <style:paragraph-properties fo:line-height="150%"/>
      <style:text-properties style:font-name="Ubuntu" fo:font-size="13pt" officeooo:rsid="0022152e" officeooo:paragraph-rsid="0022152e" style:font-size-asian="13pt" style:font-size-complex="13pt"/>
    </style:style>
    <style:style style:name="P27" style:family="paragraph" style:parent-style-name="Standard">
      <style:paragraph-properties fo:line-height="150%"/>
      <style:text-properties style:font-name="Ubuntu" fo:font-size="13pt" officeooo:rsid="00235503" officeooo:paragraph-rsid="00235503" style:font-size-asian="13pt" style:font-size-complex="13pt"/>
    </style:style>
    <style:style style:name="P28" style:family="paragraph" style:parent-style-name="Standard">
      <style:paragraph-properties fo:line-height="150%"/>
      <style:text-properties style:font-name="Ubuntu" fo:font-size="13pt" officeooo:rsid="0024b9d1" officeooo:paragraph-rsid="00235503" style:font-size-asian="13pt" style:font-size-complex="13pt"/>
    </style:style>
    <style:style style:name="P29" style:family="paragraph" style:parent-style-name="Standard">
      <style:paragraph-properties fo:line-height="150%"/>
      <style:text-properties style:font-name="Ubuntu" fo:font-size="13pt" officeooo:rsid="0024b9d1" officeooo:paragraph-rsid="0024b9d1" style:font-size-asian="13pt" style:font-size-complex="13pt"/>
    </style:style>
    <style:style style:name="P30" style:family="paragraph" style:parent-style-name="Standard">
      <style:paragraph-properties fo:line-height="150%"/>
      <style:text-properties style:font-name="Ubuntu" fo:font-size="13pt" officeooo:rsid="002556c5" officeooo:paragraph-rsid="002556c5" style:font-size-asian="13pt" style:font-size-complex="13pt"/>
    </style:style>
    <style:style style:name="T1" style:family="text">
      <style:text-properties officeooo:rsid="000d5424"/>
    </style:style>
    <style:style style:name="T2" style:family="text">
      <style:text-properties fo:font-weight="bold" style:font-weight-asian="bold" style:font-weight-complex="bold"/>
    </style:style>
    <style:style style:name="T3" style:family="text">
      <style:text-properties officeooo:rsid="001987f6"/>
    </style:style>
    <style:style style:name="T4" style:family="text">
      <style:text-properties fo:background-color="#ffff6d" loext:char-shading-value="0"/>
    </style:style>
    <style:style style:name="T5" style:family="text">
      <style:text-properties officeooo:rsid="001f582f"/>
    </style:style>
    <style:style style:name="T6" style:family="text">
      <style:text-properties officeooo:rsid="0021cba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Um client component continua sendo renderizado no servidor mas passar pela hidratação (hydration), ou seja, gera o html no servidor, manda pro usuario (sem interatividade), depois manda o js para o html e é hidratado “ativando” a interatividade (hidrata o html adicionando a interatividade)</text:p>
      <text:p text:style-name="P2"/>
      <text:p text:style-name="P3">formularios e server actios</text:p>
      <text:p text:style-name="P3"/>
      <text:p text:style-name="P3">formularios são importantes no next</text:p>
      <text:p text:style-name="P3"/>
      <text:p text:style-name="P3">para criar um usuario no banco de dados através de um formulario é preciso utilizar server actions</text:p>
      <text:p text:style-name="P3"/>
      <text:p text:style-name="P3">Server Actions: é uma função criada no servidor, passada para um Client Component e executada no servidor quando o Client Component a chama. </text:p>
      <text:p text:style-name="P2"/>
      <text:p text:style-name="P2"><text:span text:style-name="T1">1. </text:span>A Server Action é criada no servidor.<text:line-break/><text:span text:style-name="T1">2. </text:span>Ela é passada para um Client Component (por exemplo, como action de um &lt;form&gt; ou como uma prop).<text:line-break/><text:span text:style-name="T1">3. </text:span>O Client Component a chama.<text:line-break/><text:span text:style-name="T1">4. </text:span>A função executa no servidor.</text:p>
      <text:p text:style-name="P1"/>
      <text:p text:style-name="P4">Funções server actions são colocadas em pastas chamada <text:span text:style-name="T2">actions/</text:span></text:p>
      <text:p text:style-name="P1"/>
      <text:p text:style-name="P5">precisar marcar as funções como server action utilizando o: “use server” no topo da pagina</text:p>
      <text:p text:style-name="P1"/>
      <text:p text:style-name="P1"/>
      <text:p text:style-name="P1"/>
      <text:p text:style-name="P4"><text:soft-page-break/>Chamou uma função server action dentro de um client component: action={createUser}</text:p>
      <text:p text:style-name="P1"><draw:frame draw:style-name="fr1" draw:name="Figura2" text:anchor-type="char" svg:x="0.0043in" svg:y="0.0346in" svg:width="2.55in" svg:height="1.4752in" draw:z-index="0"><draw:image xlink:href="Pictures/1000000100000132000000B132B7BF7C.png" xlink:type="simple" xlink:show="embed" xlink:actuate="onLoad" draw:mime-type="image/png"/></draw:frame></text:p>
      <text:p text:style-name="P1"/>
      <text:p text:style-name="P1"/>
      <text:p text:style-name="P1"/>
      <text:p text:style-name="P1"/>
      <text:p text:style-name="P1"/>
      <text:p text:style-name="P4">Essa função é executada no servidor</text:p>
      <text:p text:style-name="P1"><draw:frame draw:style-name="fr1" draw:name="Figura3" text:anchor-type="char" svg:x="3.1665in" svg:y="0.0638in" svg:width="1.1299in" svg:height="0.4189in" draw:z-index="1"><draw:image xlink:href="Pictures/100000010000006900000025CB8714F6.png" xlink:type="simple" xlink:show="embed" xlink:actuate="onLoad" draw:mime-type="image/png"/></draw:frame><draw:frame draw:style-name="fr1" draw:name="Figura4" text:anchor-type="char" svg:x="-0.0126in" svg:y="0.0417in" svg:width="2.9in" svg:height="2.5417in" draw:z-index="2"><draw:image xlink:href="Pictures/100000010000015C0000013112A4AAB2.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5">Para pegar os valores dos inputs utilizando o formData.get(“”) é preciso utilizar a propriedade name=””: </text:p>
      <text:p text:style-name="P5">&lt;input type=”text” name=”email” /&gt;</text:p>
      <text:p text:style-name="P5"/>
      <text:p text:style-name="P5">const formValues = {email: formData.get(“email”)}</text:p>
      <text:p text:style-name="P1"/>
      <text:p text:style-name="P5">server action é uma função, só que no final o next vai transformar ela em uma rota http</text:p>
      <text:p text:style-name="P5"/>
      <text:p text:style-name="P5"><text:soft-page-break/>validações precisam ser feitos no client side (no formulario) e tambem na server action porque ela acaba sendo uma rota http como qualquer outra, então é preciso validala la dentro</text:p>
      <text:p text:style-name="P5"/>
      <text:p text:style-name="P5">para trabalhar com formularios da melhor forma é preciso fazer validações nos proprios inputs (require, maxlength, etc.) e nas server actions, é bastante utilizado o zod (que é uma biblioteca de validação)</text:p>
      <text:p text:style-name="P1"/>
      <text:p text:style-name="P6">Validação com zod, a partir de 1:52:42 - <text:s/><text:a xlink:type="simple" xlink:href="https://www.youtube.com/watch?v=xqICXyJ8jzc" text:style-name="Internet_20_link" text:visited-style-name="Visited_20_Internet_20_Link">https://www.youtube.com/watch?v=xqICXyJ8jzc</text:a></text:p>
      <text:p text:style-name="P6"/>
      <text:p text:style-name="P7">a vantagem de fazer um formulario com nextjs e não com shadcn ou react hook form é que mesmo desativando o js o formulario irá funcionar ja que é feito no servidor (server side), tambem é bom que diminui a quantidade de js mandado para o cliente, o hydration não vai ser necessario.</text:p>
      <text:p text:style-name="P7"/>
      <text:p text:style-name="P7">As server actions podem redirecionar o usuario para outra tela (no final da pagina):</text:p>
      <text:p text:style-name="P8">create-user.ts</text:p>
      <text:p text:style-name="P7">redirect(“/”)</text:p>
      <text:p text:style-name="P7"/>
      <text:p text:style-name="P9">(o redirect não pode ser chamado dentro de try catch blocks)</text:p>
      <text:p text:style-name="P7"/>
      <text:p text:style-name="P7">em formularios mais simples é melhor utilizar nextjs mas quando for formularios mais complexos (formularios com condicionais por exemplo) dai é aconselhavel utilizar um react hook form</text:p>
      <text:p text:style-name="P7"/>
      <text:p text:style-name="P7"/>
      <text:p text:style-name="P7"/>
      <text:p text:style-name="P7"/>
      <text:p text:style-name="P10"><text:soft-page-break/>ISR</text:p>
      <text:p text:style-name="P11">Por padrão as paginas do nextjs são estaticas, ou seja, gera conteudo na hora do build</text:p>
      <text:p text:style-name="P7"/>
      <text:p text:style-name="P11">Quando recebe um parametro na rota ([id]) a pagina vira dinamica (por padrão)</text:p>
      <text:p text:style-name="P7"/>
      <text:p text:style-name="P11">para tornar uma pagina <text:span text:style-name="T3">(</text:span>que não tem [id]<text:span text:style-name="T3">)</text:span> dinamica <text:span text:style-name="T3">é preciso fazer:</text:span></text:p>
      <text:p text:style-name="P11">export const dynamic = “force-dynamic”</text:p>
      <text:p text:style-name="P11"/>
      <text:p text:style-name="P12">Para tornar uma pagina incremental static site regeneration, ou seja, para fazer uma pagina atualizar de tempos em tempos (gerar estatico e ir regenerando de tempos em tempos):</text:p>
      <text:p text:style-name="P12"/>
      <text:p text:style-name="P12">export const revalidate = 60</text:p>
      <text:p text:style-name="P7"/>
      <text:p text:style-name="P12">no valor de revalidate é colocada o tempo em segundos que a pagina será regenerada: de 60 em 60 segundos a pagina é regenerada, ou seja, atualizada</text:p>
      <text:p text:style-name="P12"/>
      <text:p text:style-name="P10">Cache</text:p>
      <text:p text:style-name="P13">O sistema de cache do next é uma das ferramentas mais poderosas dele</text:p>
      <text:p text:style-name="P13"/>
      <text:p text:style-name="P14">é possivel cachear funções e requisições (fetch)</text:p>
      <text:p text:style-name="P13"/>
      <text:p text:style-name="P15">É possivel fazer a revalidação por requisição, não deixando esse trabalho para a pagina inteira (o fetch é executado quando for feito o build):</text:p>
      <text:p text:style-name="P15"/>
      <text:p text:style-name="P15">const data = await fetch(“URL”, {</text:p>
      <text:p text:style-name="P15"><text:s text:c="3"/>next: {revalidate: 10}</text:p>
      <text:p text:style-name="P15"><text:soft-page-break/>})</text:p>
      <text:p text:style-name="P7"/>
      <text:p text:style-name="P7"/>
      <text:p text:style-name="P7"/>
      <text:p text:style-name="P15">alem do revalidate tambem é possivel cachear a requisição:</text:p>
      <text:p text:style-name="P15">const data = await fetch(“URL”, {</text:p>
      <text:p text:style-name="P15"><text:s text:c="3"/>cache: “force-cache”</text:p>
      <text:p text:style-name="P15">})</text:p>
      <text:p text:style-name="P7"/>
      <text:p text:style-name="P16">Tambem é possivel cachear chamadas de banco de dados:</text:p>
      <text:p text:style-name="P17">import { cacheLife } from 'next/cache'</text:p>
      <text:p text:style-name="P17">export async function getUsers() {</text:p>
      <text:p text:style-name="P17"><text:s text:c="3"/>“use cache”</text:p>
      <text:p text:style-name="P17"><text:s text:c="3"/>cacheLife(“hours”)</text:p>
      <text:p text:style-name="P17"><text:s text:c="3"/>return db.query(“SELECT * FROM users”)</text:p>
      <text:p text:style-name="P17">}</text:p>
      <text:p text:style-name="P6"/>
      <text:p text:style-name="P16">ou</text:p>
      <text:p text:style-name="P16"/>
      <text:p text:style-name="P17">import { cacheLife } from 'next/cache'</text:p>
      <text:p text:style-name="P17"><text:s/></text:p>
      <text:p text:style-name="P17">export default async function Page() {</text:p>
      <text:p text:style-name="P17"><text:s text:c="2"/>'use cache'</text:p>
      <text:p text:style-name="P17"><text:s text:c="2"/>cacheLife('hours')</text:p>
      <text:p text:style-name="P17"><text:s/></text:p>
      <text:p text:style-name="P17"><text:s text:c="2"/>const users = await db.query('SELECT * FROM users')</text:p>
      <text:p text:style-name="P17"><text:s/></text:p>
      <text:p text:style-name="P17"><text:s text:c="2"/>return (</text:p>
      <text:p text:style-name="P17"><text:s text:c="4"/>&lt;ul&gt;</text:p>
      <text:p text:style-name="P17"><text:s text:c="6"/>{users.map((user) =&gt; (</text:p>
      <text:p text:style-name="P17"><text:s text:c="8"/>&lt;li key={user.id}&gt;{user.name}&lt;/li&gt;</text:p>
      <text:p text:style-name="P17"><text:s text:c="6"/>))}</text:p>
      <text:p text:style-name="P17"><text:s text:c="4"/>&lt;/ul&gt;</text:p>
      <text:p text:style-name="P17"><text:s text:c="2"/>)</text:p>
      <text:p text:style-name="P17">}</text:p>
      <text:p text:style-name="P16"><text:soft-page-break/></text:p>
      <text:p text:style-name="P13"/>
      <text:p text:style-name="P18">Para deixar de lado o tempo de revalidação do cache e atualizar quando um usuario for criado por exemplo:</text:p>
      <text:p text:style-name="P18"/>
      <text:p text:style-name="P18">no create-user.ts onde o usuario é criado, no final da pagina será colocado:</text:p>
      <text:p text:style-name="P18">revalidatePath(“”) ← Qual pagina será revalidada</text:p>
      <text:p text:style-name="P16"/>
      <text:p text:style-name="P18">ou seja, quando criar o usuario alguma pagina será revalidada</text:p>
      <text:p text:style-name="P6"/>
      <text:p text:style-name="P6"/>
      <text:p text:style-name="P19">revalidateTag</text:p>
      <text:p text:style-name="P20">Todas as paginas que tiverem a mesma tag serão revalidadas. Na função que cria um usuario (quando clicar para criar) no final dela será colocado um revalidateTag(“tag”), para que ao criar um usuario todas as paginas que tenham a tag serão atualizadas, as paginas serão atualizadas porque o banco de dados serã atualizado ja que o banco de dados terá a tag:</text:p>
      <text:p text:style-name="P20">export async function getPosts() {<text:line-break/> <text:s/>"use cache";<text:line-break/></text:p>
      <text:p text:style-name="P20"><text:s text:c="2"/>cacheLife(“hours”)<text:line-break/> <text:s/>cacheTag("posts"); ← tag que ferá o getPosts buscar os dados de novo<text:line-break/><text:line-break/> <text:s/>return db.post.findMany();<text:line-break/>}</text:p>
      <text:p text:style-name="P20"/>
      <text:p text:style-name="P20">o fetch tambem pode ter uma tag, essa tag fará o fetch buscar os dados de novo, <text:span text:style-name="T4">fazendo tudo o que usa esse dados atualizarem</text:span></text:p>
      <text:p text:style-name="P20"/>
      <text:p text:style-name="P21"/>
      <text:p text:style-name="P21"><text:soft-page-break/>Você faz o cache diretamente no fetch.<text:line-break/><text:line-break/>const posts = await fetch("https://api.vercel.app/blog", {</text:p>
      <text:p text:style-name="P21"><text:s text:c="2"/><text:span text:style-name="T5">cache: “force-cache”</text:span><text:line-break/> <text:s/>next: {<text:line-break/> <text:s text:c="3"/>tags: ["posts"],</text:p>
      <text:p text:style-name="P21"><text:s text:c="4"/><text:span text:style-name="T5">revalidate: 3600</text:span><text:line-break/> <text:s/>},<text:line-break/>});</text:p>
      <text:p text:style-name="P6"/>
      <text:p text:style-name="P6">Agora os dados recebidos pelo fetch pertencem à tag "posts".</text:p>
      <text:p text:style-name="P6"/>
      <text:p text:style-name="P6">Depois:<text:line-break/><text:line-break/>revalidateTag("posts");<text:line-break/><text:line-break/>Todos os fetch que usam essa tag ficam desatualizados (stale).</text:p>
      <text:p text:style-name="P6"/>
      <text:p text:style-name="P21"/>
      <text:p text:style-name="P21">Hoje existe o Cache Components, que permite cachear funções sem precisar de unstable_cache.<text:line-break/><text:line-break/>Por exemplo (forma moderna):<text:line-break/><text:line-break/>import { cacheTag } from "next/cache";<text:line-break/><text:line-break/>export async function getPosts() {<text:line-break/> <text:s/>"use cache";<text:line-break/></text:p>
      <text:p text:style-name="P21"><text:soft-page-break/><text:s text:c="2"/><text:span text:style-name="T5">cacheLife(“hours”)</text:span><text:line-break/> <text:s/>cacheTag("posts");<text:line-break/><text:line-break/> <text:s/>return db.post.findMany();<text:line-break/>}<text:line-break/><text:line-break/>Agora essa função pertence à tag "posts".</text:p>
      <text:p text:style-name="P6"/>
      <text:p text:style-name="P6">revalidateTag("posts");<text:line-break/><text:line-break/>A próxima vez que alguém chamar getPosts(), ela será executada novamente.</text:p>
      <text:p text:style-name="P6"/>
      <text:p text:style-name="P6">updateTag()<text:line-break/><text:line-break/>Essa é a novidade que não existia nos cursos antigos.<text:line-break/><text:line-break/>Ela não marca o cache como stale.<text:line-break/><text:line-break/>Ela expira imediatamente.<text:line-break/><text:line-break/>Segundo a documentação:<text:line-break/><text:line-break/>revalidateTag marca os dados como desatualizados (stale), enquanto updateTag faz o cache expirar imediatamente.<text:line-break/><text:line-break/>Na prática:<text:line-break/><text:line-break/>updateTag("posts");<text:line-break/><text:line-break/><text:soft-page-break/>é mais agressivo.<text:line-break/><text:line-break/>É usado principalmente quando você acabou de alterar um dado e quer garantir que ninguém veja a versão antiga.</text:p>
      <text:p text:style-name="P22"/>
      <text:p text:style-name="P22"/>
      <text:p text:style-name="P22">Resumindo: fetch Controla o cache da requisição HTTP enquanto cache components Controla o cache da função inteira, seja ela usando banco de dados, ORM, filesystem, ou até mesmo fetch.</text:p>
      <text:p text:style-name="P22"/>
      <text:p text:style-name="P23">Middleware</text:p>
      <text:p text:style-name="P24">São funções que é executa antes de toda a pagina</text:p>
      <text:p text:style-name="P22"/>
      <text:p text:style-name="P24">na raiz do projeto é criado um middleware.ts</text:p>
      <text:p text:style-name="P24"/>
      <text:p text:style-name="P24">nele será colocado o codígo que <text:span text:style-name="T6">vair </text:span>rod<text:span text:style-name="T6">ar</text:span> antes de deixar o usuario ir para a tela: <text:span text:style-name="T6">no codigo abaixo vai funcionar apenas para a home (“/”)</text:span></text:p>
      <text:p text:style-name="P22"><draw:frame draw:style-name="fr1" draw:name="Figura1" text:anchor-type="char" svg:x="0.0083in" svg:y="0in" svg:width="5.3717in" svg:height="2.1035in" draw:z-index="3"><draw:image xlink:href="Pictures/10000001000002B70000011A1B315D16.png" xlink:type="simple" xlink:show="embed" xlink:actuate="onLoad" draw:mime-type="image/png"/></draw:frame></text:p>
      <text:p text:style-name="P22"/>
      <text:p text:style-name="P22"/>
      <text:p text:style-name="P22"/>
      <text:p text:style-name="P22"/>
      <text:p text:style-name="P22"/>
      <text:p text:style-name="P22"/>
      <text:p text:style-name="P25">Se tiver dentro da rota users o codigo a baixo será executado antes:</text:p>
      <text:p text:style-name="P22"><draw:frame draw:style-name="fr1" draw:name="Figura5" text:anchor-type="char" svg:x="-0.05in" svg:y="0.05in" svg:width="3.7547in" svg:height="1.5728in" draw:z-index="4"><draw:image xlink:href="Pictures/10000001000001E1000000CFCB42C946.png" xlink:type="simple" xlink:show="embed" xlink:actuate="onLoad" draw:mime-type="image/png"/></draw:frame></text:p>
      <text:p text:style-name="P22"/>
      <text:p text:style-name="P22"/>
      <text:p text:style-name="P22"/>
      <text:p text:style-name="P22"/>
      <text:p text:style-name="P26"><text:soft-page-break/>Com isso é possivel verificar a role do usuario ou um token de autenticação para ver se o usuario é permitido estar naquela pagina</text:p>
      <text:p text:style-name="P22"/>
      <text:p text:style-name="P22"/>
      <text:p text:style-name="P26">No codigo a baixo é verificado se o usuario esta logado, se não estiver será redirecionado para a pagina de login:</text:p>
      <text:p text:style-name="P22"><draw:frame draw:style-name="fr1" draw:name="Figura6" text:anchor-type="char" svg:x="0in" svg:y="-0.0083in" svg:width="4.2252in" svg:height="2.8417in" draw:z-index="5"><draw:image xlink:href="Pictures/10000001000001FB000001552D0E3A30.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6">se não tiver cookies significa que o usuario não esta logado</text:p>
      <text:p text:style-name="P22"/>
      <text:p text:style-name="P27">O middleware é um edge runtime: é como se fosse um node só que limitado (não tem todas as apis do node), as APIs que tem são:</text:p>
      <text:p text:style-name="P27"><draw:frame draw:style-name="fr1" draw:name="Figura7" text:anchor-type="char" svg:x="-0.0043in" svg:y="0.0417in" svg:width="2.1646in" svg:height="2.7992in" draw:z-index="6"><draw:image xlink:href="Pictures/10000001000001480000019890093DDE.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8"><text:soft-page-break/>ja que o middleware vai rodar antes de toda a pagina, ele não pode ser demorado, o edge runtime roda perto do usuario para ser rapido</text:p>
      <text:p text:style-name="P27"/>
      <text:p text:style-name="P29">para usar todas as APIs do node no middleware (deixará de se rapido):</text:p>
      <text:p text:style-name="P29"><draw:frame draw:style-name="fr1" draw:name="Figura8" text:anchor-type="char" svg:x="-0.0417in" svg:y="0.0665in" svg:width="1.6083in" svg:height="0.5835in" draw:z-index="7"><draw:image xlink:href="Pictures/10000001000000C100000046CF104187.png" xlink:type="simple" xlink:show="embed" xlink:actuate="onLoad" draw:mime-type="image/png"/></draw:frame></text:p>
      <text:p text:style-name="P27"/>
      <text:p text:style-name="P27"/>
      <text:p text:style-name="P30"/>
      <text:p text:style-name="P30">hoje em dia é possivel fazer deploy do next na AWS com o opennext usando o SST, tambem é possivel fazer build da sua aplicação usando docker e rodar um servidor com sua imagem docker com limitações e por ultimo da pra usar a vercel (mas tem um preço salgado), que é a melhor maneira.</text:p>
      <text:p text:style-name="P30"/>
      <text:p text:style-name="P30">Uma desvantagem de usar next é que voce fica refem da vercel</text:p>
      <text:p text:style-name="P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Ubuntu" svg:font-family="Ubuntu"/>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7-11T14:03:27.563215900</meta:creation-date>
    <dc:date>2026-07-11T20:33:38.826606600</dc:date>
    <meta:editing-duration>PT2H14M</meta:editing-duration>
    <meta:editing-cycles>22</meta:editing-cycles>
    <meta:generator>LibreOffice/25.2.7.2$Windows_X86_64 LibreOffice_project/5cbfd1ab6520636bb5f7b99185aa69bd7456825d</meta:generator>
    <meta:document-statistic meta:table-count="0" meta:image-count="8" meta:object-count="0" meta:page-count="11" meta:paragraph-count="98" meta:word-count="1236" meta:character-count="7606" meta:non-whitespace-character-count="6355"/>
  </office:meta>
</office:document-meta>
</file>