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3pt" officeooo:rsid="000f2b1d" officeooo:paragraph-rsid="000f2b1d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Ubuntu" fo:font-size="13pt" officeooo:rsid="0008b771" officeooo:paragraph-rsid="0008b771" style:font-size-asian="13pt" style:font-size-complex="13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Ubuntu" fo:font-size="13pt" officeooo:rsid="000a03a9" officeooo:paragraph-rsid="000a03a9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officeooo:rsid="000a03a9" officeooo:paragraph-rsid="000a03a9" style:font-size-asian="13pt" style:font-size-complex="13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Ubuntu" fo:font-size="13pt" officeooo:rsid="000f2b1d" officeooo:paragraph-rsid="000f2b1d" style:font-size-asian="13pt" style:font-size-complex="13pt"/>
    </style:style>
    <style:style style:name="P6" style:family="paragraph" style:parent-style-name="Standard">
      <style:paragraph-properties fo:line-height="150%" fo:text-align="start" style:justify-single-word="false"/>
      <style:text-properties style:font-name="Ubuntu" fo:font-size="13pt" officeooo:rsid="000bf7bf" officeooo:paragraph-rsid="000a03a9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rsid="000bf7bf" officeooo:paragraph-rsid="000bf7bf" style:font-size-asian="13pt" style:font-size-complex="13pt"/>
    </style:style>
    <style:style style:name="P8" style:family="paragraph" style:parent-style-name="Standard">
      <style:paragraph-properties fo:line-height="150%" fo:text-align="start" style:justify-single-word="false"/>
      <style:text-properties style:font-name="Ubuntu" fo:font-size="13pt" officeooo:rsid="000bf7bf" officeooo:paragraph-rsid="000bf7bf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rsid="000d4331" officeooo:paragraph-rsid="000d4331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0bf7bf" officeooo:paragraph-rsid="000a03a9" style:font-size-asian="13pt" style:font-size-complex="13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Ubuntu" fo:font-size="13pt" officeooo:rsid="000f2b1d" officeooo:paragraph-rsid="000f2b1d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3pt" officeooo:rsid="0010ca21" officeooo:paragraph-rsid="000d4331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Ubuntu" fo:font-size="13pt" officeooo:rsid="0011677a" officeooo:paragraph-rsid="0011677a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Ubuntu" fo:font-size="13pt" officeooo:rsid="0012f7da" officeooo:paragraph-rsid="0012f7da" style:font-size-asian="13pt" style:font-size-complex="13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Ubuntu" fo:font-size="13pt" officeooo:rsid="00137b16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Ubuntu" fo:font-size="13pt" officeooo:rsid="00137b16" officeooo:paragraph-rsid="00137b16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Ubuntu" fo:font-size="13pt" officeooo:rsid="00137b16" officeooo:paragraph-rsid="0013a4b8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Ubuntu" fo:font-size="13pt" officeooo:rsid="0013a4b8" officeooo:paragraph-rsid="0013a4b8" style:font-size-asian="13pt" style:font-size-complex="13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Ubuntu" fo:font-size="13pt" officeooo:rsid="0014d755" officeooo:paragraph-rsid="0014d755" style:font-size-asian="13pt" style:font-size-complex="13pt"/>
    </style:style>
    <style:style style:name="P20" style:family="paragraph" style:parent-style-name="Standard">
      <style:paragraph-properties fo:line-height="150%"/>
      <style:text-properties style:font-name="Ubuntu" fo:font-size="13pt" officeooo:rsid="0016c21b" officeooo:paragraph-rsid="0016c21b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Ubuntu" fo:font-size="13pt" officeooo:rsid="00188aad" officeooo:paragraph-rsid="00188aad" style:font-size-asian="13pt" style:font-size-complex="13pt"/>
    </style:style>
    <style:style style:name="P22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23" style:family="paragraph" style:parent-style-name="Standard">
      <style:paragraph-properties fo:line-height="150%"/>
      <style:text-properties style:font-name="Ubuntu" fo:font-size="13pt" officeooo:rsid="00191ed2" officeooo:paragraph-rsid="00191ed2" style:font-size-asian="13pt" style:font-size-complex="13pt"/>
    </style:style>
    <style:style style:name="P24" style:family="paragraph" style:parent-style-name="Standard">
      <style:paragraph-properties fo:line-height="150%"/>
      <style:text-properties style:font-name="Ubuntu" fo:font-size="13pt" officeooo:rsid="001a7066" officeooo:paragraph-rsid="001a7066" style:font-size-asian="13pt" style:font-size-complex="13pt"/>
    </style:style>
    <style:style style:name="P25" style:family="paragraph" style:parent-style-name="Standard">
      <style:paragraph-properties fo:line-height="150%"/>
      <style:text-properties style:font-name="Ubuntu" fo:font-size="13pt" officeooo:rsid="001ac5fd" officeooo:paragraph-rsid="001ac5fd" style:font-size-asian="13pt" style:font-size-complex="13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Ubuntu" fo:font-size="13pt" officeooo:rsid="001b32de" officeooo:paragraph-rsid="001b32de" style:font-size-asian="13pt" style:font-size-complex="13pt"/>
    </style:style>
    <style:style style:name="P27" style:family="paragraph" style:parent-style-name="Standard">
      <style:paragraph-properties fo:line-height="150%"/>
      <style:text-properties style:font-name="Ubuntu" fo:font-size="13pt" officeooo:rsid="001b32de" officeooo:paragraph-rsid="001b32de" style:font-size-asian="13pt" style:font-size-complex="13pt"/>
    </style:style>
    <style:style style:name="P28" style:family="paragraph" style:parent-style-name="Standard">
      <style:paragraph-properties fo:line-height="150%"/>
      <style:text-properties style:font-name="Ubuntu" fo:font-size="13pt" officeooo:rsid="001cd10c" officeooo:paragraph-rsid="001cd10c" style:font-size-asian="13pt" style:font-size-complex="13pt"/>
    </style:style>
    <style:style style:name="P29" style:family="paragraph" style:parent-style-name="Standard">
      <style:paragraph-properties fo:line-height="150%"/>
      <style:text-properties style:font-name="Ubuntu" fo:font-size="13pt" officeooo:rsid="001eaf6f" officeooo:paragraph-rsid="001eaf6f" style:font-size-asian="13pt" style:font-size-complex="13pt"/>
    </style:style>
    <style:style style:name="P30" style:family="paragraph" style:parent-style-name="Standard">
      <style:paragraph-properties fo:line-height="150%"/>
      <style:text-properties style:font-name="Ubuntu" fo:font-size="13pt" officeooo:paragraph-rsid="001eaf6f" style:font-size-asian="13pt" style:font-size-complex="13pt"/>
    </style:style>
    <style:style style:name="P31" style:family="paragraph" style:parent-style-name="Standard">
      <style:paragraph-properties fo:line-height="150%"/>
      <style:text-properties style:font-name="Ubuntu" fo:font-size="13pt" officeooo:rsid="001eaf6f" officeooo:paragraph-rsid="001f4536" style:font-size-asian="13pt" style:font-size-complex="13pt"/>
    </style:style>
    <style:style style:name="P32" style:family="paragraph" style:parent-style-name="Standard">
      <style:paragraph-properties fo:line-height="150%"/>
      <style:text-properties style:font-name="Ubuntu" fo:font-size="13pt" officeooo:rsid="001f4536" officeooo:paragraph-rsid="001f4536" style:font-size-asian="13pt" style:font-size-complex="13pt"/>
    </style:style>
    <style:style style:name="P33" style:family="paragraph" style:parent-style-name="Standard">
      <style:paragraph-properties fo:line-height="150%"/>
      <style:text-properties style:font-name="Ubuntu" fo:font-size="13pt" officeooo:paragraph-rsid="001f4536" style:font-size-asian="13pt" style:font-size-complex="13pt"/>
    </style:style>
    <style:style style:name="P34" style:family="paragraph" style:parent-style-name="Standard">
      <style:paragraph-properties fo:line-height="150%" fo:text-align="center" style:justify-single-word="false"/>
      <style:text-properties style:font-name="Ubuntu" fo:font-size="13pt" officeooo:rsid="001fd3eb" officeooo:paragraph-rsid="001fd3eb" style:font-size-asian="13pt" style:font-size-complex="13pt"/>
    </style:style>
    <style:style style:name="P35" style:family="paragraph" style:parent-style-name="Standard">
      <style:paragraph-properties fo:line-height="150%"/>
      <style:text-properties style:font-name="Ubuntu" fo:font-size="13pt" officeooo:rsid="001ffa4e" officeooo:paragraph-rsid="001ffa4e" style:font-size-asian="13pt" style:font-size-complex="13pt"/>
    </style:style>
    <style:style style:name="P36" style:family="paragraph" style:parent-style-name="Standard">
      <style:paragraph-properties fo:line-height="150%"/>
      <style:text-properties style:font-name="Ubuntu" fo:font-size="13pt" officeooo:rsid="002199a9" officeooo:paragraph-rsid="002199a9" style:font-size-asian="13pt" style:font-size-complex="13pt"/>
    </style:style>
    <style:style style:name="P37" style:family="paragraph" style:parent-style-name="Standard">
      <style:paragraph-properties fo:line-height="150%"/>
      <style:text-properties style:font-name="Ubuntu" fo:font-size="13pt" officeooo:paragraph-rsid="00237b4e" style:font-size-asian="13pt" style:font-size-complex="13pt"/>
    </style:style>
    <style:style style:name="P38" style:family="paragraph" style:parent-style-name="Standard">
      <style:paragraph-properties fo:line-height="150%" fo:text-align="center" style:justify-single-word="false"/>
      <style:text-properties style:font-name="Ubuntu" fo:font-size="13pt" officeooo:rsid="0023bab6" officeooo:paragraph-rsid="0023bab6" style:font-size-asian="13pt" style:font-size-complex="13pt"/>
    </style:style>
    <style:style style:name="T1" style:family="text">
      <style:text-properties officeooo:rsid="0013a4b8"/>
    </style:style>
    <style:style style:name="T2" style:family="text">
      <style:text-properties officeooo:rsid="001a7066"/>
    </style:style>
    <style:style style:name="T3" style:family="text">
      <style:text-properties officeooo:rsid="001b32de"/>
    </style:style>
    <style:style style:name="T4" style:family="text">
      <style:text-properties officeooo:rsid="001eaf6f"/>
    </style:style>
    <style:style style:name="T5" style:family="text">
      <style:text-properties officeooo:rsid="001f4536"/>
    </style:style>
    <style:style style:name="T6" style:family="text">
      <style:text-properties fo:color="#000000" loext:opacity="100%" style:text-underline-style="none"/>
    </style:style>
    <style:style style:name="T7" style:family="text">
      <style:text-properties fo:color="#000080" loext:opacity="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ar projeto</text:p>
      <text:p text:style-name="P2"><text:a xlink:type="simple" xlink:href="mailto:create-next-app@latest" text:style-name="Internet_20_link" text:visited-style-name="Visited_20_Internet_20_Link"/></text:p>
      <text:p text:style-name="P2"><text:a xlink:type="simple" xlink:href="mailto:create-next-app@latest" text:style-name="Internet_20_link" text:visited-style-name="Visited_20_Internet_20_Link">create-next-app@latest</text:a> nome</text:p>
      <text:p text:style-name="P2"/>
      <text:p text:style-name="P3">Estrutura de pastas</text:p>
      <text:p text:style-name="P4">tsconfig.json – configuração do typescript / projeto</text:p>
      <text:p text:style-name="P4">tailwind.config.ts – configuração do tailwind</text:p>
      <text:p text:style-name="P4">package.json – configuração do projeto</text:p>
      <text:p text:style-name="P4">next.config.ts – configurações option extras para o projeto next</text:p>
      <text:p text:style-name="P4">public/ - onde ficam os arquivos estaticos</text:p>
      <text:p text:style-name="P4">src/ - onde é manipulado / escrito o projeto com next</text:p>
      <text:p text:style-name="P4">app/ - é o file system routing, ou seja, tudo que for colocado dentro dele pode se tornar uma rota (navegação de pagina)</text:p>
      <text:p text:style-name="P4"/>
      <text:p text:style-name="P5">roteamento e navegação paginas</text:p>
      <text:p text:style-name="P6">page.tsx</text:p>
      <text:p text:style-name="P7">É a pagina inicial, a home do projeto</text:p>
      <text:p text:style-name="P7"/>
      <text:p text:style-name="P8">layout.tsx</text:p>
      <text:p text:style-name="P7">é o arquivo de configuração do layout global da aplicação, o children no layout nada mais é do que a pagina onde é exibida, ou seja, é onde ficará o page.tsx, onde o page.tsx será renderizado</text:p>
      <text:p text:style-name="P9"/>
      <text:p text:style-name="P9">o roteamento aconce pela pasta app/, tudos os arquivos dentro de app será considerados rotas, ou seja, app/contatos, app/dashboard serão http://localhost:3000/contatos, http://localhost:3000/dashboard</text:p>
      <text:p text:style-name="P10"/>
      <text:p text:style-name="P9">conteudo que ficar no layout será persistente / fixo, ou seja, mesmo que a rota da pagina mude ainda sim o conteudo irá permanecer:</text:p>
      <text:p text:style-name="P9"/>
      <text:p text:style-name="P9"><text:soft-page-break/>&lt;h1&gt;Header da pagina&lt;h1&gt;</text:p>
      <text:p text:style-name="P9">{children}</text:p>
      <text:p text:style-name="P10"/>
      <text:p text:style-name="P9">o h1 ficará imutavel enquanto apenas o que estiver sendo exibido pelo children mudará, ou seja, o que fica forá do children não vai mudar</text:p>
      <text:p text:style-name="P9"/>
      <text:p text:style-name="P9">arquivos forá do app não serão roteados, ou seja, não serão usados como caminhos da pagina, por isso, geralmente é colocado outros arquivos como components ou configs</text:p>
      <text:p text:style-name="P9"/>
      <text:p text:style-name="P11">links de navegação</text:p>
      <text:p text:style-name="P1"/>
      <text:p text:style-name="P1">import Link from “next/link</text:p>
      <text:p text:style-name="P1"/>
      <text:p text:style-name="P1">&lt;Link href=”/”&gt;Home&lt;Link&gt;</text:p>
      <text:p text:style-name="P9"/>
      <text:p text:style-name="P12">paginas not found </text:p>
      <text:p text:style-name="P12"/>
      <text:p text:style-name="P13">para criar um pagina not found pode ser uma global, dentro do app (é obrigatorio ter esse nome, é um nome “reservado” pelo next): </text:p>
      <text:p text:style-name="P13">not-found.tsx</text:p>
      <text:p text:style-name="P10"/>
      <text:p text:style-name="P14">Esse arquivo global irá aparecer sempre que acessar uma pagina que não existe em qualquer lugar do projeto</text:p>
      <text:p text:style-name="P4"/>
      <text:p text:style-name="P15">metadatas</text:p>
      <text:p text:style-name="P15"/>
      <text:p text:style-name="P16">são tags que melhoram o indexação do site, melhorando o ranqueamento nos buscadores. O buscador do google faz a leitura desses dados.</text:p>
      <text:p text:style-name="P16"><text:soft-page-break/>É possivel criar metadados de diversas formas, de forma estatica ou dinamica permitindo cada pagina ter uma diferente.</text:p>
      <text:p text:style-name="P16">Import { Metadata } from “next”</text:p>
      <text:p text:style-name="P16"/>
      <text:p text:style-name="P16">export const metadata: Metadata = {</text:p>
      <text:p text:style-name="P16"><text:s text:c="3"/>title: “”, ← <text:span text:style-name="T1">titulo da pagina</text:span></text:p>
      <text:p text:style-name="P17"><text:s text:c="3"/>description: “”, ← <text:span text:style-name="T1">descrição da pagina</text:span></text:p>
      <text:p text:style-name="P17"><text:s text:c="3"/><text:span text:style-name="T1">openGraph: {title: “”, description: “”, images: [“url de uma imagem”]}, </text:span>← <text:s text:c="5"/></text:p>
      <text:p text:style-name="P18"><text:s text:c="3"/>Pré-visualização quando compartilha a url em uma rede social</text:p>
      <text:p text:style-name="P18"><text:s text:c="3"/>robots: {index: true, follow: true, nocache: true, googleBot: {index: true, </text:p>
      <text:p text:style-name="P18"><text:s text:c="3"/>follow: true}}</text:p>
      <text:p text:style-name="P16">}</text:p>
      <text:p text:style-name="P16"/>
      <text:p text:style-name="P18">para tornar o metadata global basta inserir o metadata no layout.tsx ao invés de na page.tsx, caso a pagina não tenha metadata será usado a que esta no layout.tsx</text:p>
      <text:p text:style-name="P16"/>
      <text:p text:style-name="P19">server e client component</text:p>
      <text:p text:style-name="P19"/>
      <text:p text:style-name="P20">Por padrao, quando um componente é criado, ele é um server component, ou seja, ele é renderizado / gerado pelo servidor (pelo server side).</text:p>
      <text:p text:style-name="P21">Faz com que menos javascript seja renderizado pelo lado do cliente</text:p>
      <text:p text:style-name="P22"/>
      <text:p text:style-name="P21">A criação de um componente com react puro é considerado um client component, por isso podem ter reatividade, cliques de botão, use state, use effect, hooks etc.</text:p>
      <text:p text:style-name="P21"/>
      <text:p text:style-name="P21">uma das coisas que ganha ao ser server é a performance, removendo a responsabilidade de renderizar as coisas pelo lado do client, permitindo trazer muita coisa ja pré-renderizada gerada pelo lado do servidor</text:p>
      <text:p text:style-name="P21"><text:soft-page-break/></text:p>
      <text:p text:style-name="P21">server component: por ser no servidor pode ser feito, requisições http, chamadas em um banco de dados, chamadas de API, por ser mais seguro</text:p>
      <text:p text:style-name="P21"/>
      <text:p text:style-name="P21">não precisa de hooks para fazer uma chamada ja que ta no server</text:p>
      <text:p text:style-name="P21"/>
      <text:p text:style-name="P21">para criar um componente client basta colocar a seguinte diretiva no topo da pagina:</text:p>
      <text:p text:style-name="P21">“use client”</text:p>
      <text:p text:style-name="P21"/>
      <text:p text:style-name="P21">agora o componente será gerado do lado do cliente, ou seja, agora é um client component</text:p>
      <text:p text:style-name="P21"/>
      <text:p text:style-name="P23">requisição com server component:</text:p>
      <text:p text:style-name="P23"/>
      <text:p text:style-name="P23">interface PostProps {</text:p>
      <text:p text:style-name="P23"><text:s text:c="4"/>id: number,</text:p>
      <text:p text:style-name="P23"><text:s text:c="4"/>title: string,</text:p>
      <text:p text:style-name="P23"><text:s text:c="4"/>body: string,</text:p>
      <text:p text:style-name="P23"><text:s text:c="4"/>userId: number</text:p>
      <text:p text:style-name="P23">}</text:p>
      <text:p text:style-name="P23"/>
      <text:p text:style-name="P23">interface ResponseProps {</text:p>
      <text:p text:style-name="P23"><text:s text:c="4"/>posts: PostProps[]</text:p>
      <text:p text:style-name="P23">}</text:p>
      <text:p text:style-name="P22"/>
      <text:p text:style-name="P22">export default async function PostsPage() <text:span text:style-name="T2">{</text:span></text:p>
      <text:p text:style-name="P22"><text:s text:c="3"/>const response = await fetch("https://dummyjson.com/posts")</text:p>
      <text:p text:style-name="P22"><text:s text:c="3"/>const data: ResponseProps = await response.json()</text:p>
      <text:p text:style-name="P22"/>
      <text:p text:style-name="P22"><text:soft-page-break/><text:s text:c="3"/>console.log(data)</text:p>
      <text:p text:style-name="P24">}</text:p>
      <text:p text:style-name="P22"/>
      <text:p text:style-name="P25">É possivel ter um server component e dentro dele ter um client component, <text:span text:style-name="T3">através de um import</text:span></text:p>
      <text:p text:style-name="P22"/>
      <text:p text:style-name="P22"/>
      <text:p text:style-name="P26">server actions</text:p>
      <text:p text:style-name="P27">Dentro de um server component é possivel ter server actions que vai manipular algumas ações</text:p>
      <text:p text:style-name="P22"/>
      <text:p text:style-name="P28">para permitir que uma função seja executada no lado do servidor passe uma diretiva no topo da função (com isso será possivel utilizar eventos): “use server”</text:p>
      <text:p text:style-name="P28"/>
      <text:p text:style-name="P28">a função deve ser assincrona:</text:p>
      <text:p text:style-name="P28"/>
      <text:p text:style-name="P28">async function serverFunc() {</text:p>
      <text:p text:style-name="P28"><text:s text:c="3"/>“use server”</text:p>
      <text:p text:style-name="P28"><text:s text:c="4"/>console.log(“”)</text:p>
      <text:p text:style-name="P28">}</text:p>
      <text:p text:style-name="P22"/>
      <text:p text:style-name="P29">Tambem é possivel criar uma server action dentro do client utilizando “use server”</text:p>
      <text:p text:style-name="P29"/>
      <text:p text:style-name="P29">É possivel tambem ter formularios com server action:</text:p>
      <text:p text:style-name="P29">async function <text:s/>searchUsers() {</text:p>
      <text:p text:style-name="P29"><text:s text:c="3"/>“use server”</text:p>
      <text:p text:style-name="P29">}</text:p>
      <text:p text:style-name="P30">&lt;<text:span text:style-name="T4">form onSubmit={searchUsers}&gt;&lt;/form&gt;</text:span></text:p>
      <text:p text:style-name="P29"><text:soft-page-break/>Ao invés de utilizar o onSubmit no server component é recomendado utilizar a propriedade action={}:</text:p>
      <text:p text:style-name="P29"/>
      <text:p text:style-name="P29">async function <text:s/>searchUsers() {</text:p>
      <text:p text:style-name="P29"><text:s text:c="3"/>“use server”</text:p>
      <text:p text:style-name="P29">}</text:p>
      <text:p text:style-name="P29"/>
      <text:p text:style-name="P30">&lt;form <text:span text:style-name="T4">action</text:span>={searchUsers}&gt;&lt;/form&gt;</text:p>
      <text:p text:style-name="P22"/>
      <text:p text:style-name="P29">pra pegar o que o usuario digitou sem usar uma função client e utilizando o action é utilizado <text:span text:style-name="T5">a propriedade</text:span> name, por causa do action a função virá com <text:span text:style-name="T5">valores, esse valores são chamados de formData e possuem uma tipagem chamada FormData</text:span>:</text:p>
      <text:p text:style-name="P29"/>
      <text:p text:style-name="P29">async function <text:s/>searchUsers(formData: FormData) {</text:p>
      <text:p text:style-name="P29"><text:s text:c="3"/>“use server”</text:p>
      <text:p text:style-name="P31"><text:s text:c="3"/>const userName = formData.get(“nome<text:span text:style-name="T5">Usuario”)</text:span></text:p>
      <text:p text:style-name="P31"><text:s text:c="3"/><text:span text:style-name="T5">console.log(userName)</text:span></text:p>
      <text:p text:style-name="P29">}</text:p>
      <text:p text:style-name="P29"/>
      <text:p text:style-name="P30">&lt;form action={searchUsers}&gt;</text:p>
      <text:p text:style-name="P29"><text:s text:c="3"/>&lt;input name=”nome<text:span text:style-name="T5">Usuario</text:span>”&gt;&lt;/input&gt;</text:p>
      <text:p text:style-name="P30">&lt;/form&gt;</text:p>
      <text:p text:style-name="P22"/>
      <text:p text:style-name="P32">Ta sendo pego o que o usuario digitou sem reatividade. </text:p>
      <text:p text:style-name="P32"/>
      <text:p text:style-name="P32"/>
      <text:p text:style-name="P32"/>
      <text:p text:style-name="P32"/>
      <text:p text:style-name="P32"/>
      <text:p text:style-name="P33"><text:soft-page-break/><text:span text:style-name="T5">Buscar algo sem ter a reatividade:</text:span></text:p>
      <text:p text:style-name="P33"/>
      <text:p text:style-name="P22">async function handleSearchUsers(formData: FormData) {</text:p>
      <text:p text:style-name="P22"><text:s text:c="3"/>"use server"</text:p>
      <text:p text:style-name="P22"/>
      <text:p text:style-name="P22"><text:s text:c="3"/>const userId = formData.get("userId")</text:p>
      <text:p text:style-name="P22"/>
      <text:p text:style-name="P33"><text:s text:c="3"/>const response = await fetch(`</text:p>
      <text:p text:style-name="P33"><text:span text:style-name="T6"><text:s text:c="6"/></text:span><text:a xlink:type="simple" xlink:href="https://dummyjson.com/posts/user/$" text:style-name="Internet_20_link" text:visited-style-name="Visited_20_Internet_20_Link"><text:span text:style-name="T7">https://dummyjson.com/posts/user/</text:span><text:span text:style-name="T5">$</text:span></text:a>{userId}</text:p>
      <text:p text:style-name="P33"><text:s text:c="3"/>`)</text:p>
      <text:p text:style-name="P22"><text:s text:c="3"/>const data: ResponseProps = await response.json()</text:p>
      <text:p text:style-name="P22"/>
      <text:p text:style-name="P22"><text:s text:c="3"/>console.log(data)</text:p>
      <text:p text:style-name="P22">}</text:p>
      <text:p text:style-name="P22"/>
      <text:p text:style-name="P22">&lt;form className="flex gap-2 my-4" action={handleSearchUsers}&gt;</text:p>
      <text:p text:style-name="P22"><text:s text:c="3"/>&lt;input type="text" name="userId" /&gt;</text:p>
      <text:p text:style-name="P22"><text:s text:c="3"/>&lt;button type="submit"&gt;Buscar usuario&lt;/button&gt;</text:p>
      <text:p text:style-name="P22">&lt;/form&gt;</text:p>
      <text:p text:style-name="P22"/>
      <text:p text:style-name="P34">Rotas Dinamicas</text:p>
      <text:p text:style-name="P35">Para fazer uma rota dinamica é preciso colocar o nome da pasta entre colchetes: posts/[id]/page.tsx ← https://caminho1/posts/30</text:p>
      <text:p text:style-name="P22"/>
      <text:p text:style-name="P36">para cada pagina receber algo diferente é feito através de propriedades:</text:p>
      <text:p text:style-name="P36"/>
      <text:p text:style-name="P36">interface PostProps {</text:p>
      <text:p text:style-name="P36"><text:s text:c="4"/>id: number,</text:p>
      <text:p text:style-name="P36"><text:s text:c="4"/>title: string,</text:p>
      <text:p text:style-name="P36"><text:s text:c="4"/>body: string,</text:p>
      <text:p text:style-name="P36"><text:soft-page-break/><text:s text:c="4"/>userId: number</text:p>
      <text:p text:style-name="P36">}</text:p>
      <text:p text:style-name="P36"/>
      <text:p text:style-name="P37">export default async function DetailPost({ params }: {params: </text:p>
      <text:p text:style-name="P37">Promise&lt;{ id: string }&gt;}) {</text:p>
      <text:p text:style-name="P22"><text:s text:c="3"/>const { id } = await params</text:p>
      <text:p text:style-name="P22"/>
      <text:p text:style-name="P22">const response = await fetch(`https://dummyjson.com/posts/${id}`)</text:p>
      <text:p text:style-name="P22">const data: PostProps = await response.json()</text:p>
      <text:p text:style-name="P22"/>
      <text:p text:style-name="P22"><text:s text:c="3"/>return (</text:p>
      <text:p text:style-name="P22"><text:s text:c="6"/>&lt;div&gt;</text:p>
      <text:p text:style-name="P22"><text:s text:c="9"/>&lt;h1&gt;Detalhes do Post: {id}&lt;/h1&gt;</text:p>
      <text:p text:style-name="P22"/>
      <text:p text:style-name="P22"><text:s text:c="9"/>&lt;h2&gt;{data.title}&lt;/h2&gt;</text:p>
      <text:p text:style-name="P22"><text:s text:c="9"/>&lt;p&gt;{data.body}&lt;/p&gt;</text:p>
      <text:p text:style-name="P22"><text:s text:c="6"/>&lt;/div&gt;</text:p>
      <text:p text:style-name="P22"><text:s text:c="3"/>)</text:p>
      <text:p text:style-name="P22">}</text:p>
      <text:p text:style-name="P22"/>
      <text:p text:style-name="P38">Streaming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1T18:11:48.475484000</meta:creation-date>
    <dc:date>2026-07-04T23:22:50.999996800</dc:date>
    <meta:editing-duration>PT13H3M9S</meta:editing-duration>
    <meta:editing-cycles>10</meta:editing-cycles>
    <meta:generator>LibreOffice/25.2.7.2$Windows_X86_64 LibreOffice_project/5cbfd1ab6520636bb5f7b99185aa69bd7456825d</meta:generator>
    <meta:document-statistic meta:table-count="0" meta:image-count="0" meta:object-count="0" meta:page-count="9" meta:paragraph-count="133" meta:word-count="941" meta:character-count="6367" meta:non-whitespace-character-count="5375"/>
  </office:meta>
</office:document-meta>
</file>