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2" style:family="paragraph" style:parent-style-name="Standard">
      <style:paragraph-properties fo:line-height="150%"/>
      <style:text-properties style:font-name="Ubuntu" fo:font-size="13pt" officeooo:rsid="0008b771" officeooo:paragraph-rsid="0008b771" style:font-size-asian="13pt" style:font-size-complex="13pt"/>
    </style:style>
    <style:style style:name="P3" style:family="paragraph" style:parent-style-name="Standard">
      <style:paragraph-properties fo:line-height="150%"/>
      <style:text-properties style:font-name="Ubuntu" fo:font-size="13pt" officeooo:rsid="000a03a9" officeooo:paragraph-rsid="000a03a9" style:font-size-asian="13pt" style:font-size-complex="13pt"/>
    </style:style>
    <style:style style:name="P4" style:family="paragraph" style:parent-style-name="Standard">
      <style:paragraph-properties fo:line-height="150%" fo:text-align="start" style:justify-single-word="false"/>
      <style:text-properties style:font-name="Ubuntu" fo:font-size="13pt" officeooo:rsid="000bf7bf" officeooo:paragraph-rsid="000a03a9" style:font-size-asian="13pt" style:font-size-complex="13pt"/>
    </style:style>
    <style:style style:name="P5" style:family="paragraph" style:parent-style-name="Standard">
      <style:paragraph-properties fo:line-height="150%"/>
      <style:text-properties style:font-name="Ubuntu" fo:font-size="13pt" officeooo:rsid="000bf7bf" officeooo:paragraph-rsid="000bf7bf" style:font-size-asian="13pt" style:font-size-complex="13pt"/>
    </style:style>
    <style:style style:name="P6" style:family="paragraph" style:parent-style-name="Standard">
      <style:paragraph-properties fo:line-height="150%" fo:text-align="start" style:justify-single-word="false"/>
      <style:text-properties style:font-name="Ubuntu" fo:font-size="13pt" officeooo:rsid="000bf7bf" officeooo:paragraph-rsid="000bf7bf" style:font-size-asian="13pt" style:font-size-complex="13pt"/>
    </style:style>
    <style:style style:name="P7" style:family="paragraph" style:parent-style-name="Standard">
      <style:paragraph-properties fo:line-height="150%"/>
      <style:text-properties style:font-name="Ubuntu" fo:font-size="13pt" officeooo:rsid="000d4331" officeooo:paragraph-rsid="000d4331" style:font-size-asian="13pt" style:font-size-complex="13pt"/>
    </style:style>
    <style:style style:name="P8" style:family="paragraph" style:parent-style-name="Standard">
      <style:paragraph-properties fo:line-height="150%"/>
      <style:text-properties style:font-name="Ubuntu" fo:font-size="13pt" officeooo:rsid="000bf7bf" officeooo:paragraph-rsid="000a03a9" style:font-size-asian="13pt" style:font-size-complex="13pt"/>
    </style:style>
    <style:style style:name="P9" style:family="paragraph" style:parent-style-name="Standard">
      <style:paragraph-properties fo:line-height="150%"/>
      <style:text-properties style:font-name="Ubuntu" fo:font-size="13pt" officeooo:rsid="000d4331" officeooo:paragraph-rsid="000d4331" fo:background-color="#dddddd" style:font-size-asian="13pt" style:font-size-complex="13pt"/>
    </style:style>
    <style:style style:name="P10" style:family="paragraph" style:parent-style-name="Standard">
      <style:paragraph-properties fo:line-height="150%"/>
      <style:text-properties style:font-name="Ubuntu" fo:font-size="13pt" officeooo:rsid="000f2b1d" officeooo:paragraph-rsid="000f2b1d" fo:background-color="#dddddd" style:font-size-asian="13pt" style:font-size-complex="13pt"/>
    </style:style>
    <style:style style:name="P11" style:family="paragraph" style:parent-style-name="Standard">
      <style:paragraph-properties fo:line-height="150%"/>
      <style:text-properties style:font-name="Ubuntu" fo:font-size="13pt" officeooo:rsid="0011677a" officeooo:paragraph-rsid="0011677a" style:font-size-asian="13pt" style:font-size-complex="13pt"/>
    </style:style>
    <style:style style:name="P12" style:family="paragraph" style:parent-style-name="Standard">
      <style:paragraph-properties fo:line-height="150%"/>
      <style:text-properties style:font-name="Ubuntu" fo:font-size="13pt" officeooo:rsid="0012f7da" officeooo:paragraph-rsid="0012f7da" style:font-size-asian="13pt" style:font-size-complex="13pt"/>
    </style:style>
    <style:style style:name="P13" style:family="paragraph" style:parent-style-name="Standard">
      <style:paragraph-properties fo:line-height="150%"/>
      <style:text-properties style:font-name="Ubuntu" fo:font-size="13pt" officeooo:rsid="00137b16" officeooo:paragraph-rsid="00137b16" style:font-size-asian="13pt" style:font-size-complex="13pt"/>
    </style:style>
    <style:style style:name="P14" style:family="paragraph" style:parent-style-name="Standard">
      <style:paragraph-properties fo:line-height="150%"/>
      <style:text-properties style:font-name="Ubuntu" fo:font-size="13pt" officeooo:rsid="00137b16" officeooo:paragraph-rsid="00137b16" fo:background-color="#dddddd" style:font-size-asian="13pt" style:font-size-complex="13pt"/>
    </style:style>
    <style:style style:name="P15" style:family="paragraph" style:parent-style-name="Standard">
      <style:paragraph-properties fo:line-height="150%"/>
      <style:text-properties style:font-name="Ubuntu" fo:font-size="13pt" officeooo:rsid="00137b16" officeooo:paragraph-rsid="0013a4b8" style:font-size-asian="13pt" style:font-size-complex="13pt"/>
    </style:style>
    <style:style style:name="P16" style:family="paragraph" style:parent-style-name="Standard">
      <style:paragraph-properties fo:line-height="150%"/>
      <style:text-properties style:font-name="Ubuntu" fo:font-size="13pt" officeooo:rsid="0013a4b8" officeooo:paragraph-rsid="0013a4b8" style:font-size-asian="13pt" style:font-size-complex="13pt"/>
    </style:style>
    <style:style style:name="P17" style:family="paragraph" style:parent-style-name="Standard">
      <style:paragraph-properties fo:line-height="150%"/>
      <style:text-properties style:font-name="Ubuntu" fo:font-size="13pt" officeooo:rsid="0013a4b8" officeooo:paragraph-rsid="0013a4b8" fo:background-color="#dddddd" style:font-size-asian="13pt" style:font-size-complex="13pt"/>
    </style:style>
    <style:style style:name="P18" style:family="paragraph" style:parent-style-name="Standard">
      <style:paragraph-properties fo:line-height="150%"/>
      <style:text-properties style:font-name="Ubuntu" fo:font-size="13pt" officeooo:rsid="0016c21b" officeooo:paragraph-rsid="0016c21b" style:font-size-asian="13pt" style:font-size-complex="13pt"/>
    </style:style>
    <style:style style:name="P19" style:family="paragraph" style:parent-style-name="Standard">
      <style:paragraph-properties fo:line-height="150%"/>
      <style:text-properties style:font-name="Ubuntu" fo:font-size="13pt" officeooo:rsid="00188aad" officeooo:paragraph-rsid="00188aad" style:font-size-asian="13pt" style:font-size-complex="13pt"/>
    </style:style>
    <style:style style:name="P20" style:family="paragraph" style:parent-style-name="Standard">
      <style:paragraph-properties fo:line-height="150%"/>
      <style:text-properties style:font-name="Ubuntu" fo:font-size="13pt" style:font-size-asian="13pt" style:font-size-complex="13pt"/>
    </style:style>
    <style:style style:name="P21" style:family="paragraph" style:parent-style-name="Standard">
      <style:paragraph-properties fo:line-height="150%"/>
      <style:text-properties officeooo:paragraph-rsid="003a3632"/>
    </style:style>
    <style:style style:name="P22" style:family="paragraph" style:parent-style-name="Standard">
      <style:paragraph-properties fo:line-height="150%"/>
      <style:text-properties style:font-name="Ubuntu" fo:font-size="13pt" officeooo:rsid="003a3632" officeooo:paragraph-rsid="003a3632" style:font-size-asian="13pt" style:font-size-complex="13pt"/>
    </style:style>
    <style:style style:name="P23" style:family="paragraph" style:parent-style-name="Standard">
      <style:paragraph-properties fo:line-height="150%"/>
      <style:text-properties style:font-name="Ubuntu" fo:font-size="13pt" officeooo:rsid="00188aad" officeooo:paragraph-rsid="00188aad" fo:background-color="#dddddd" style:font-size-asian="13pt" style:font-size-complex="13pt"/>
    </style:style>
    <style:style style:name="P24" style:family="paragraph" style:parent-style-name="Standard">
      <style:paragraph-properties fo:line-height="150%"/>
      <style:text-properties style:font-name="Ubuntu" fo:font-size="13pt" fo:font-weight="bold" officeooo:rsid="00191ed2" officeooo:paragraph-rsid="00191ed2" style:font-size-asian="13pt" style:font-weight-asian="bold" style:font-size-complex="13pt" style:font-weight-complex="bold"/>
    </style:style>
    <style:style style:name="P25" style:family="paragraph" style:parent-style-name="Standard">
      <style:paragraph-properties fo:line-height="150%"/>
      <style:text-properties style:font-name="Ubuntu" fo:font-size="13pt" officeooo:rsid="00191ed2" officeooo:paragraph-rsid="00191ed2" style:font-size-asian="13pt" style:font-size-complex="13pt"/>
    </style:style>
    <style:style style:name="P26" style:family="paragraph" style:parent-style-name="Standard">
      <style:paragraph-properties fo:line-height="150%"/>
      <style:text-properties style:font-name="Ubuntu" fo:font-size="13pt" officeooo:rsid="00191ed2" officeooo:paragraph-rsid="00191ed2" fo:background-color="#dddddd" style:font-size-asian="13pt" style:font-size-complex="13pt"/>
    </style:style>
    <style:style style:name="P27" style:family="paragraph" style:parent-style-name="Standard">
      <style:paragraph-properties fo:line-height="150%"/>
      <style:text-properties style:font-name="Ubuntu" fo:font-size="13pt" fo:background-color="#dddddd" style:font-size-asian="13pt" style:font-size-complex="13pt"/>
    </style:style>
    <style:style style:name="P28" style:family="paragraph" style:parent-style-name="Standard">
      <style:paragraph-properties fo:line-height="150%"/>
      <style:text-properties style:font-name="Ubuntu" fo:font-size="13pt" officeooo:paragraph-rsid="001a7066" style:font-size-asian="13pt" style:font-size-complex="13pt"/>
    </style:style>
    <style:style style:name="P29" style:family="paragraph" style:parent-style-name="Standard">
      <style:paragraph-properties fo:line-height="150%"/>
      <style:text-properties style:font-name="Ubuntu" fo:font-size="13pt" officeooo:paragraph-rsid="001ac5fd" style:font-size-asian="13pt" style:font-size-complex="13pt"/>
    </style:style>
    <style:style style:name="P30" style:family="paragraph" style:parent-style-name="Standard">
      <style:paragraph-properties fo:line-height="150%"/>
      <style:text-properties style:font-name="Ubuntu" fo:font-size="13pt" officeooo:rsid="001b32de" officeooo:paragraph-rsid="003b0784" style:font-size-asian="13pt" style:font-size-complex="13pt"/>
    </style:style>
    <style:style style:name="P31" style:family="paragraph" style:parent-style-name="Standard">
      <style:paragraph-properties fo:line-height="150%"/>
      <style:text-properties style:font-name="Ubuntu" fo:font-size="13pt" officeooo:rsid="001cd10c" officeooo:paragraph-rsid="001cd10c" style:font-size-asian="13pt" style:font-size-complex="13pt"/>
    </style:style>
    <style:style style:name="P32" style:family="paragraph" style:parent-style-name="Standard">
      <style:paragraph-properties fo:line-height="150%"/>
      <style:text-properties style:font-name="Ubuntu" fo:font-size="13pt" officeooo:rsid="001cd10c" officeooo:paragraph-rsid="001cd10c" fo:background-color="#dddddd" style:font-size-asian="13pt" style:font-size-complex="13pt"/>
    </style:style>
    <style:style style:name="P33" style:family="paragraph" style:parent-style-name="Standard">
      <style:paragraph-properties fo:line-height="150%"/>
      <style:text-properties style:font-name="Ubuntu" fo:font-size="13pt" officeooo:rsid="001eaf6f" officeooo:paragraph-rsid="001eaf6f" style:font-size-asian="13pt" style:font-size-complex="13pt"/>
    </style:style>
    <style:style style:name="P34" style:family="paragraph" style:parent-style-name="Heading_20_3">
      <style:paragraph-properties fo:line-height="150%" fo:text-align="center" style:justify-single-word="false"/>
      <style:text-properties style:font-name="Ubuntu"/>
    </style:style>
    <style:style style:name="P35" style:family="paragraph" style:parent-style-name="Standard">
      <style:paragraph-properties fo:line-height="150%"/>
      <style:text-properties style:font-name="Ubuntu" fo:font-size="13pt" officeooo:rsid="001eaf6f" officeooo:paragraph-rsid="001eaf6f" fo:background-color="#dddddd" style:font-size-asian="13pt" style:font-size-complex="13pt"/>
    </style:style>
    <style:style style:name="P36" style:family="paragraph" style:parent-style-name="Standard">
      <style:paragraph-properties fo:line-height="150%"/>
      <style:text-properties style:font-name="Ubuntu" fo:font-size="13pt" officeooo:paragraph-rsid="001eaf6f" fo:background-color="#dddddd" style:font-size-asian="13pt" style:font-size-complex="13pt"/>
    </style:style>
    <style:style style:name="P37" style:family="paragraph" style:parent-style-name="Standard">
      <style:paragraph-properties fo:line-height="150%"/>
      <style:text-properties style:font-name="Ubuntu" fo:font-size="13pt" officeooo:rsid="003ce2b0" officeooo:paragraph-rsid="003ce2b0" style:font-size-asian="13pt" style:font-size-complex="13pt"/>
    </style:style>
    <style:style style:name="P38" style:family="paragraph" style:parent-style-name="Standard">
      <style:paragraph-properties fo:line-height="150%"/>
      <style:text-properties style:font-name="Ubuntu" fo:font-size="13pt" officeooo:paragraph-rsid="003ce2b0" style:font-size-asian="13pt" style:font-size-complex="13pt"/>
    </style:style>
    <style:style style:name="P39" style:family="paragraph" style:parent-style-name="Standard">
      <style:paragraph-properties fo:line-height="150%"/>
      <style:text-properties style:font-name="Ubuntu" fo:font-size="13pt" officeooo:rsid="001eaf6f" officeooo:paragraph-rsid="001f4536" fo:background-color="#dddddd" style:font-size-asian="13pt" style:font-size-complex="13pt"/>
    </style:style>
    <style:style style:name="P40" style:family="paragraph" style:parent-style-name="Standard">
      <style:paragraph-properties fo:line-height="150%"/>
      <style:text-properties style:font-name="Ubuntu" fo:font-size="13pt" officeooo:rsid="001f4536" style:font-size-asian="13pt" style:font-size-complex="13pt"/>
    </style:style>
    <style:style style:name="P41" style:family="paragraph" style:parent-style-name="Standard">
      <style:paragraph-properties fo:line-height="150%"/>
      <style:text-properties style:font-name="Ubuntu" fo:font-size="13pt" officeooo:rsid="001f4536" officeooo:paragraph-rsid="001f4536" style:font-size-asian="13pt" style:font-size-complex="13pt"/>
    </style:style>
    <style:style style:name="P42" style:family="paragraph" style:parent-style-name="Standard">
      <style:paragraph-properties fo:line-height="150%"/>
      <style:text-properties style:font-name="Ubuntu" fo:font-size="13pt" fo:font-weight="bold" officeooo:paragraph-rsid="001f4536" style:font-size-asian="13pt" style:font-weight-asian="bold" style:font-size-complex="13pt" style:font-weight-complex="bold"/>
    </style:style>
    <style:style style:name="P43" style:family="paragraph" style:parent-style-name="Standard">
      <style:paragraph-properties fo:line-height="150%"/>
      <style:text-properties style:font-name="Ubuntu" fo:font-size="13pt" officeooo:paragraph-rsid="001f4536" style:font-size-asian="13pt" style:font-size-complex="13pt"/>
    </style:style>
    <style:style style:name="P44" style:family="paragraph" style:parent-style-name="Standard">
      <style:paragraph-properties fo:line-height="150%"/>
      <style:text-properties style:font-name="Ubuntu" fo:font-size="13pt" officeooo:paragraph-rsid="001f4536" fo:background-color="#dddddd" style:font-size-asian="13pt" style:font-size-complex="13pt"/>
    </style:style>
    <style:style style:name="P45" style:family="paragraph" style:parent-style-name="Standard">
      <style:paragraph-properties fo:line-height="150%"/>
      <style:text-properties style:font-name="Ubuntu" fo:font-size="13pt" officeooo:rsid="001ffa4e" officeooo:paragraph-rsid="001ffa4e" style:font-size-asian="13pt" style:font-size-complex="13pt"/>
    </style:style>
    <style:style style:name="P46" style:family="paragraph" style:parent-style-name="Standard">
      <style:paragraph-properties fo:line-height="150%"/>
      <style:text-properties style:font-name="Ubuntu" fo:font-size="13pt" officeooo:rsid="002199a9" officeooo:paragraph-rsid="002199a9" style:font-size-asian="13pt" style:font-size-complex="13pt"/>
    </style:style>
    <style:style style:name="P47" style:family="paragraph" style:parent-style-name="Standard">
      <style:paragraph-properties fo:line-height="150%"/>
      <style:text-properties style:font-name="Ubuntu" fo:font-size="13pt" officeooo:rsid="002199a9" officeooo:paragraph-rsid="002199a9" fo:background-color="#dddddd" style:font-size-asian="13pt" style:font-size-complex="13pt"/>
    </style:style>
    <style:style style:name="P48" style:family="paragraph" style:parent-style-name="Standard">
      <style:paragraph-properties fo:line-height="150%"/>
      <style:text-properties style:font-name="Ubuntu" fo:font-size="13pt" officeooo:paragraph-rsid="00237b4e" fo:background-color="#dddddd" style:font-size-asian="13pt" style:font-size-complex="13pt"/>
    </style:style>
    <style:style style:name="P49" style:family="paragraph" style:parent-style-name="Standard">
      <style:paragraph-properties fo:line-height="150%"/>
      <style:text-properties style:font-name="Ubuntu" fo:font-size="13pt" officeooo:rsid="00255ca1" officeooo:paragraph-rsid="00255ca1" style:font-size-asian="13pt" style:font-size-complex="13pt"/>
    </style:style>
    <style:style style:name="P50" style:family="paragraph" style:parent-style-name="Standard">
      <style:paragraph-properties fo:line-height="150%"/>
      <style:text-properties style:font-name="Ubuntu" fo:font-size="13pt" fo:font-weight="bold" officeooo:rsid="00255ca1" officeooo:paragraph-rsid="0025693c" style:font-size-asian="13pt" style:font-weight-asian="bold" style:font-size-complex="13pt" style:font-weight-complex="bold"/>
    </style:style>
    <style:style style:name="P51" style:family="paragraph" style:parent-style-name="Standard">
      <style:paragraph-properties fo:line-height="150%"/>
      <style:text-properties style:font-name="Ubuntu" fo:font-size="13pt" officeooo:rsid="00255ca1" officeooo:paragraph-rsid="0025693c" style:font-size-asian="13pt" style:font-size-complex="13pt"/>
    </style:style>
    <style:style style:name="P52" style:family="paragraph" style:parent-style-name="Standard">
      <style:paragraph-properties fo:line-height="150%"/>
      <style:text-properties style:font-name="Ubuntu" fo:font-size="13pt" officeooo:rsid="0025693c" officeooo:paragraph-rsid="0025693c" fo:background-color="#dddddd" style:font-size-asian="13pt" style:font-size-complex="13pt"/>
    </style:style>
    <style:style style:name="P53" style:family="paragraph" style:parent-style-name="Standard">
      <style:paragraph-properties fo:line-height="150%"/>
      <style:text-properties style:font-name="Ubuntu" fo:font-size="13pt" officeooo:rsid="0025693c" officeooo:paragraph-rsid="0025693c" style:font-size-asian="13pt" style:font-size-complex="13pt"/>
    </style:style>
    <style:style style:name="P54" style:family="paragraph" style:parent-style-name="Standard">
      <style:paragraph-properties fo:line-height="150%"/>
      <style:text-properties style:font-name="Ubuntu" fo:font-size="13pt" officeooo:rsid="0026d85b" officeooo:paragraph-rsid="0026d85b" style:font-size-asian="13pt" style:font-size-complex="13pt"/>
    </style:style>
    <style:style style:name="P55" style:family="paragraph" style:parent-style-name="Standard">
      <style:paragraph-properties fo:line-height="150%"/>
      <style:text-properties style:font-name="Ubuntu" fo:font-size="13pt" officeooo:rsid="0026d85b" officeooo:paragraph-rsid="0026d85b" fo:background-color="#dddddd" style:font-size-asian="13pt" style:font-size-complex="13pt"/>
    </style:style>
    <style:style style:name="P56" style:family="paragraph" style:parent-style-name="Standard">
      <style:paragraph-properties fo:line-height="150%"/>
      <style:text-properties style:font-name="Ubuntu" fo:font-size="13pt" officeooo:paragraph-rsid="0025693c" style:font-size-asian="13pt" style:font-size-complex="13pt"/>
    </style:style>
    <style:style style:name="P57" style:family="paragraph" style:parent-style-name="Standard">
      <style:paragraph-properties fo:line-height="150%"/>
      <style:text-properties style:font-name="Ubuntu" fo:font-size="10pt" officeooo:rsid="0026d85b" officeooo:paragraph-rsid="0026d85b" fo:background-color="#dddddd" style:font-size-asian="10pt" style:font-size-complex="10pt"/>
    </style:style>
    <style:style style:name="P58" style:family="paragraph" style:parent-style-name="Standard">
      <style:paragraph-properties fo:line-height="150%"/>
      <style:text-properties style:font-name="Ubuntu" fo:font-size="13pt" officeooo:rsid="0029b32e" officeooo:paragraph-rsid="0029b32e" style:font-size-asian="13pt" style:font-size-complex="13pt"/>
    </style:style>
    <style:style style:name="P59" style:family="paragraph" style:parent-style-name="Standard">
      <style:paragraph-properties fo:line-height="150%"/>
      <style:text-properties style:font-name="Ubuntu" fo:font-size="13pt" fo:font-weight="bold" officeooo:rsid="0029b32e" officeooo:paragraph-rsid="0029b32e" style:font-size-asian="13pt" style:font-weight-asian="bold" style:font-size-complex="13pt" style:font-weight-complex="bold"/>
    </style:style>
    <style:style style:name="P60" style:family="paragraph" style:parent-style-name="Standard">
      <style:paragraph-properties fo:line-height="150%"/>
      <style:text-properties style:font-name="Ubuntu" fo:font-size="13pt" officeooo:rsid="0029b32e" officeooo:paragraph-rsid="0029b32e" fo:background-color="#dddddd" style:font-size-asian="13pt" style:font-size-complex="13pt"/>
    </style:style>
    <style:style style:name="P61" style:family="paragraph" style:parent-style-name="Standard">
      <style:paragraph-properties fo:line-height="150%"/>
      <style:text-properties style:font-name="Ubuntu" fo:font-size="13pt" officeooo:rsid="002b058d" officeooo:paragraph-rsid="002b058d" style:font-size-asian="13pt" style:font-size-complex="13pt"/>
    </style:style>
    <style:style style:name="P62" style:family="paragraph" style:parent-style-name="Standard">
      <style:paragraph-properties fo:line-height="150%"/>
      <style:text-properties style:font-name="Ubuntu" fo:font-size="13pt" officeooo:rsid="002ea130" officeooo:paragraph-rsid="002ea130" style:font-size-asian="13pt" style:font-size-complex="13pt"/>
    </style:style>
    <style:style style:name="P63" style:family="paragraph" style:parent-style-name="Standard">
      <style:paragraph-properties fo:line-height="150%"/>
      <style:text-properties style:font-name="Ubuntu" fo:font-size="13pt" officeooo:rsid="002d6dd8" officeooo:paragraph-rsid="002d6dd8" style:font-size-asian="13pt" style:font-size-complex="13pt"/>
    </style:style>
    <style:style style:name="P64" style:family="paragraph" style:parent-style-name="Standard">
      <style:paragraph-properties fo:line-height="150%"/>
      <style:text-properties style:font-name="Ubuntu" fo:font-size="13pt" fo:font-weight="bold" officeooo:rsid="002d6dd8" officeooo:paragraph-rsid="002d6dd8" style:font-size-asian="13pt" style:font-weight-asian="bold" style:font-size-complex="13pt" style:font-weight-complex="bold"/>
    </style:style>
    <style:style style:name="P65" style:family="paragraph" style:parent-style-name="Standard">
      <style:paragraph-properties fo:line-height="150%"/>
      <style:text-properties style:font-name="Ubuntu" fo:font-size="13pt" officeooo:rsid="002d6dd8" officeooo:paragraph-rsid="002d6dd8" fo:background-color="#dddddd" style:font-size-asian="13pt" style:font-size-complex="13pt"/>
    </style:style>
    <style:style style:name="P66" style:family="paragraph" style:parent-style-name="Standard">
      <style:paragraph-properties fo:line-height="150%"/>
      <style:text-properties style:font-name="Ubuntu" fo:font-size="13pt" officeooo:rsid="002d6dd8" officeooo:paragraph-rsid="002ea130" fo:background-color="#dddddd" style:font-size-asian="13pt" style:font-size-complex="13pt"/>
    </style:style>
    <style:style style:name="P67" style:family="paragraph" style:parent-style-name="Standard">
      <style:paragraph-properties fo:line-height="150%"/>
      <style:text-properties style:font-name="Ubuntu" fo:font-size="13pt" officeooo:rsid="0026d85b" officeooo:paragraph-rsid="002d6dd8" fo:background-color="#dddddd" style:font-size-asian="13pt" style:font-size-complex="13pt"/>
    </style:style>
    <style:style style:name="P68" style:family="paragraph" style:parent-style-name="Standard">
      <style:paragraph-properties fo:line-height="150%"/>
      <style:text-properties style:font-name="Ubuntu" fo:font-size="13pt" officeooo:rsid="002d6dd8" officeooo:paragraph-rsid="002ea130" style:font-size-asian="13pt" style:font-size-complex="13pt"/>
    </style:style>
    <style:style style:name="P69" style:family="paragraph" style:parent-style-name="Standard">
      <style:paragraph-properties fo:line-height="150%"/>
      <style:text-properties style:font-name="Ubuntu" fo:font-size="13pt" officeooo:rsid="00338752" officeooo:paragraph-rsid="00338752" style:font-size-asian="13pt" style:font-size-complex="13pt"/>
    </style:style>
    <style:style style:name="P70" style:family="paragraph" style:parent-style-name="Standard">
      <style:paragraph-properties fo:line-height="150%"/>
      <style:text-properties style:font-name="Ubuntu" fo:font-size="13pt" officeooo:rsid="00338752" officeooo:paragraph-rsid="00338752" fo:background-color="#dddddd" style:font-size-asian="13pt" style:font-size-complex="13pt"/>
    </style:style>
    <style:style style:name="P71" style:family="paragraph" style:parent-style-name="Standard">
      <style:paragraph-properties fo:line-height="150%"/>
      <style:text-properties style:font-name="Ubuntu" fo:font-size="13pt" officeooo:rsid="0035251f" officeooo:paragraph-rsid="0035251f" style:font-size-asian="13pt" style:font-size-complex="13pt"/>
    </style:style>
    <style:style style:name="P72" style:family="paragraph" style:parent-style-name="Standard">
      <style:paragraph-properties fo:line-height="150%"/>
      <style:text-properties style:font-name="Ubuntu" fo:font-size="13pt" officeooo:paragraph-rsid="0026d85b" style:font-size-asian="13pt" style:font-size-complex="13pt"/>
    </style:style>
    <style:style style:name="T1" style:family="text">
      <style:text-properties officeooo:rsid="00364e6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background-color="#dddddd" loext:char-shading-value="0"/>
    </style:style>
    <style:style style:name="T4" style:family="text">
      <style:text-properties officeooo:rsid="0038247f"/>
    </style:style>
    <style:style style:name="T5" style:family="text">
      <style:text-properties officeooo:rsid="003a3632"/>
    </style:style>
    <style:style style:name="T6" style:family="text">
      <style:text-properties officeooo:rsid="003a3632" fo:background-color="#dddddd" loext:char-shading-value="0"/>
    </style:style>
    <style:style style:name="T7" style:family="text">
      <style:text-properties fo:background-color="#dddddd" loext:char-shading-value="0"/>
    </style:style>
    <style:style style:name="T8" style:family="text">
      <style:text-properties officeooo:rsid="0013a4b8"/>
    </style:style>
    <style:style style:name="T9" style:family="text">
      <style:text-properties officeooo:rsid="0013a4b8" fo:background-color="#dddddd" loext:char-shading-value="0"/>
    </style:style>
    <style:style style:name="T10" style:family="text">
      <style:text-properties style:font-name="Ubuntu" fo:font-size="13pt" fo:font-weight="bold" officeooo:rsid="003a3632" style:font-size-asian="13pt" style:font-weight-asian="bold" style:font-size-complex="13pt" style:font-weight-complex="bold"/>
    </style:style>
    <style:style style:name="T11" style:family="text">
      <style:text-properties style:font-name="Ubuntu" fo:font-size="13pt" officeooo:rsid="003a3632" style:font-size-asian="13pt" style:font-size-complex="13pt"/>
    </style:style>
    <style:style style:name="T12" style:family="text">
      <style:text-properties style:font-name="Ubuntu" fo:font-size="13pt" officeooo:rsid="00188aad" style:font-size-asian="13pt" style:font-size-complex="13pt"/>
    </style:style>
    <style:style style:name="T13" style:family="text">
      <style:text-properties officeooo:rsid="00188aad"/>
    </style:style>
    <style:style style:name="T14" style:family="text">
      <style:text-properties officeooo:rsid="001a7066"/>
    </style:style>
    <style:style style:name="T15" style:family="text">
      <style:text-properties officeooo:rsid="001a7066" fo:background-color="#dddddd" loext:char-shading-value="0"/>
    </style:style>
    <style:style style:name="T16" style:family="text">
      <style:text-properties officeooo:rsid="001ac5fd"/>
    </style:style>
    <style:style style:name="T17" style:family="text">
      <style:text-properties officeooo:rsid="003b0784"/>
    </style:style>
    <style:style style:name="T18" style:family="text">
      <style:text-properties officeooo:rsid="001b32de"/>
    </style:style>
    <style:style style:name="T19" style:family="text">
      <style:text-properties officeooo:rsid="003ce2b0"/>
    </style:style>
    <style:style style:name="T20" style:family="text">
      <style:text-properties fo:background-color="transparent" loext:char-shading-value="0"/>
    </style:style>
    <style:style style:name="T21" style:family="text">
      <style:text-properties officeooo:rsid="001eaf6f"/>
    </style:style>
    <style:style style:name="T22" style:family="text">
      <style:text-properties officeooo:rsid="001f4536"/>
    </style:style>
    <style:style style:name="T23" style:family="text">
      <style:text-properties fo:color="#000000" loext:opacity="100%" style:text-underline-style="none" fo:background-color="#dddddd" loext:char-shading-value="0"/>
    </style:style>
    <style:style style:name="T24" style:family="text">
      <style:text-properties fo:color="#000080" loext:opacity="100%" style:text-underline-style="solid" style:text-underline-width="auto" style:text-underline-color="font-color" fo:background-color="#dddddd" loext:char-shading-value="0"/>
    </style:style>
    <style:style style:name="T25" style:family="text">
      <style:text-properties officeooo:rsid="001f4536" fo:background-color="#dddddd" loext:char-shading-value="0"/>
    </style:style>
    <style:style style:name="T26" style:family="text">
      <style:text-properties officeooo:rsid="00255ca1"/>
    </style:style>
    <style:style style:name="T27" style:family="text">
      <style:text-properties fo:font-weight="bold" officeooo:rsid="0025693c" style:font-weight-asian="bold" style:font-weight-complex="bold"/>
    </style:style>
    <style:style style:name="T28" style:family="text">
      <style:text-properties officeooo:rsid="0025693c"/>
    </style:style>
    <style:style style:name="T29" style:family="text">
      <style:text-properties officeooo:rsid="003e4e00"/>
    </style:style>
    <style:style style:name="T30" style:family="text">
      <style:text-properties fo:font-weight="bold" officeooo:rsid="0026d85b" style:font-weight-asian="bold" style:font-weight-complex="bold"/>
    </style:style>
    <style:style style:name="T31" style:family="text">
      <style:text-properties officeooo:rsid="0026d85b" fo:background-color="#dddddd" loext:char-shading-value="0"/>
    </style:style>
    <style:style style:name="T32" style:family="text">
      <style:text-properties officeooo:rsid="0035251f"/>
    </style:style>
    <style:style style:name="T33" style:family="text">
      <style:text-properties officeooo:rsid="0035251f" fo:background-color="#dddddd" loext:char-shading-value="0"/>
    </style:style>
    <style:style style:name="T34" style:family="text">
      <style:text-properties officeooo:rsid="003fb3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Criar projeto</text:h>
      <text:p text:style-name="P2"><text:a xlink:type="simple" xlink:href="mailto:create-next-app@latest" text:style-name="Internet_20_link" text:visited-style-name="Visited_20_Internet_20_Link">create-next-app@latest</text:a> nome-<text:span text:style-name="T1">projeto</text:span></text:p>
      <text:h text:style-name="P1" text:outline-level="2">Estrutura de pastas</text:h>
      <text:p text:style-name="P3"><text:span text:style-name="T2">tsconfig.json –</text:span> <text:span text:style-name="T1">C</text:span>onfiguração do typescript / projeto</text:p>
      <text:p text:style-name="P3"><text:span text:style-name="T2">tailwind.config.ts –</text:span> <text:span text:style-name="T1">C</text:span>onfiguração do tailwind</text:p>
      <text:p text:style-name="P3"><text:span text:style-name="T2">package.json –</text:span> <text:span text:style-name="T1">C</text:span>onfiguração do projeto</text:p>
      <text:p text:style-name="P3"><text:span text:style-name="T2">next.config.ts –</text:span> <text:span text:style-name="T1">C</text:span>onfigurações option extras para o projeto next</text:p>
      <text:p text:style-name="P3"><text:span text:style-name="T2">public/ -</text:span> <text:span text:style-name="T1">O</text:span>nde ficam os arquivos estáticos</text:p>
      <text:p text:style-name="P3"><text:span text:style-name="T2">src/ -</text:span> <text:span text:style-name="T1">O</text:span>nde é manipulado / escrito o projeto com next</text:p>
      <text:p text:style-name="P3"><text:span text:style-name="T2">app/ -</text:span> <text:span text:style-name="T1">É</text:span> o file system routing, ou seja, tudo que for colocado dentro dele pode se tornar uma rota (navegação de pagina)</text:p>
      <text:h text:style-name="P1" text:outline-level="2"><text:span text:style-name="T1">R</text:span>oteamento e <text:span text:style-name="T1">N</text:span>avegação <text:span text:style-name="T1">P</text:span>aginas</text:h>
      <text:p text:style-name="P4"><text:span text:style-name="T2">page.tsx -</text:span> É a pagina inicial, a home do projeto</text:p>
      <text:p text:style-name="P5"/>
      <text:p text:style-name="P6"><text:span text:style-name="T2">layout.tsx -</text:span> <text:span text:style-name="T1">É</text:span> o arquivo de configuração do layout global da aplicação, o children no layout nada mais é do que a pagina onde é exibida, ou seja, é onde ficará o page.tsx <text:span text:style-name="T1">(</text:span>onde o page.tsx será renderizado<text:span text:style-name="T1">)</text:span></text:p>
      <text:p text:style-name="P7"/>
      <text:p text:style-name="P7"><text:span text:style-name="T1">O</text:span> roteamento acon<text:span text:style-name="T1">tece</text:span> pela pasta app/, t<text:span text:style-name="T1">o</text:span>dos os arquivos dentro de app ser<text:span text:style-name="T1">ão</text:span> considerados rotas, ou seja, <text:span text:style-name="T3">app/contatos</text:span>, <text:span text:style-name="T3">app/dashboard</text:span> serão <text:span text:style-name="T3">http://localhost:3000/contatos</text:span>, <text:span text:style-name="T3">http://localhost:3000/dashboard</text:span></text:p>
      <text:p text:style-name="P8"/>
      <text:p text:style-name="P7"><text:span text:style-name="T1">O </text:span>conteúdo que ficar no layout será persistente / fixo, ou seja, mesmo que a rota da pagina mude ainda sim o conteúdo irá permanecer:</text:p>
      <text:p text:style-name="P7"><text:soft-page-break/></text:p>
      <text:p text:style-name="P9">&lt;h1&gt;Header da pagina&lt;h1&gt;</text:p>
      <text:p text:style-name="P9">{children}</text:p>
      <text:p text:style-name="P8"/>
      <text:p text:style-name="P7"><text:span text:style-name="T4">O</text:span> h1 ficará imutavel enquanto apenas o que estiver sendo exibido pelo children mudará, ou seja, o que fica for<text:span text:style-name="T5">a</text:span> do children não vai mudar</text:p>
      <text:p text:style-name="P7"/>
      <text:p text:style-name="P7"><text:span text:style-name="T4">A</text:span>rquivos for<text:span text:style-name="T5">a</text:span> do app não serão roteados, ou seja, não serão usados como caminhos da pagina, por isso, geralmente é colocado outros arquivos como components <text:span text:style-name="T4">e</text:span> configs</text:p>
      <text:h text:style-name="P1" text:outline-level="2"><text:span text:style-name="T4">L</text:span>inks de <text:span text:style-name="T4">N</text:span>avegação</text:h>
      <text:p text:style-name="P10">import Link from “next/link”</text:p>
      <text:p text:style-name="P10"/>
      <text:p text:style-name="P10">&lt;Link href=”/”&gt;Home&lt;Link&gt;</text:p>
      <text:h text:style-name="P1" text:outline-level="2"><text:span text:style-name="T4">P</text:span>aginas not-found </text:h>
      <text:p text:style-name="P11"><text:span text:style-name="T5">P</text:span>ara criar um pagina not-found global <text:span text:style-name="T5">crie </text:span>dentro do app <text:span text:style-name="T5">um arquivo chamado </text:span><text:span text:style-name="T6">not-found.tsx</text:span> (é obrigatório ter esse nome, é um nome “reservado” pelo next): <text:span text:style-name="T7">not-found.tsx</text:span></text:p>
      <text:p text:style-name="P8"/>
      <text:p text:style-name="P12">Esse arquivo global irá aparecer sempre que acessar uma pagina que não existe em qualquer lugar do projeto</text:p>
      <text:h text:style-name="P1" text:outline-level="2"><text:span text:style-name="T5">M</text:span>etadatas</text:h>
      <text:p text:style-name="P13"><text:span text:style-name="T5">S</text:span>ão tags que melhoram <text:span text:style-name="T5">a</text:span> indexação do site, melhorando o ranqueamento nos buscadores. O buscador do google faz a leitura desses dados.</text:p>
      <text:p text:style-name="P13"/>
      <text:p text:style-name="P13"><text:soft-page-break/>É possível criar metadados de diversas formas, de forma estática ou dinâmica permitindo cada pagina ter uma diferente:</text:p>
      <text:p text:style-name="P14">Import { Metadata } from “next”</text:p>
      <text:p text:style-name="P13"/>
      <text:p text:style-name="P14">export const metadata: Metadata = {</text:p>
      <text:p text:style-name="P13"><text:s text:c="3"/><text:span text:style-name="T7">title: “”,</text:span> ← <text:span text:style-name="T8">titulo da pagina</text:span></text:p>
      <text:p text:style-name="P15"><text:s text:c="3"/><text:span text:style-name="T7">description: “”,</text:span> ← <text:span text:style-name="T8">descrição da pagina</text:span></text:p>
      <text:p text:style-name="P15"><text:s text:c="3"/><text:span text:style-name="T9">openGraph: {title: “”, description: “”, images: [“url de uma imagem”]},</text:span><text:span text:style-name="T8"> </text:span>← <text:s text:c="5"/></text:p>
      <text:p text:style-name="P16"><text:s text:c="3"/>Pré-visualização quando compartilha a url em uma rede social</text:p>
      <text:p text:style-name="P16"><text:s text:c="3"/>r<text:span text:style-name="T7">obots: {index: true, follow: true, nocache: true, googleBot: {index: true, </text:span></text:p>
      <text:p text:style-name="P17"><text:s text:c="3"/>follow: true}}</text:p>
      <text:p text:style-name="P14">}</text:p>
      <text:p text:style-name="P13"/>
      <text:p text:style-name="P16"><text:span text:style-name="T5">P</text:span>ara tornar o metadata global basta inserir o metadata no layout.tsx <text:span text:style-name="T5">raiz</text:span> ao invés de na page.tsx, caso a pagina não tenha metadata será usado a que esta no layout.tsx <text:span text:style-name="T5">raiz</text:span></text:p>
      <text:h text:style-name="P1" text:outline-level="2"><text:span text:style-name="T5">S</text:span>erver e <text:span text:style-name="T5">C</text:span>lient <text:span text:style-name="T5">C</text:span>omponent</text:h>
      <text:p text:style-name="P18">Por padrão quando um componente é criado ele é um <text:span text:style-name="T5">S</text:span>erver <text:span text:style-name="T5">C</text:span>omponent, ou seja, ele é renderizado / gerado pelo servidor (pelo server side), <text:span text:style-name="T5">isso</text:span></text:p>
      <text:p text:style-name="P19"><text:span text:style-name="T5">f</text:span>az com que menos javascript seja renderizado pelo lado do cliente, <text:span text:style-name="T5">diminuindo o tamanho e tempo de carregamento</text:span></text:p>
      <text:p text:style-name="P20"/>
      <text:p text:style-name="P19">A criação de um componente com react puro é considerado um <text:span text:style-name="T5">C</text:span>lient <text:span text:style-name="T5">C</text:span>omponent, por isso pode ter reatividade, cliques de botão, use<text:span text:style-name="T5">S</text:span>tate, use<text:span text:style-name="T5">E</text:span>ffect, hooks etc.</text:p>
      <text:p text:style-name="P19"/>
      <text:p text:style-name="P19"><text:span text:style-name="T5">U</text:span>ma das <text:span text:style-name="T5">vantagens</text:span> <text:span text:style-name="T5">de </text:span>ser <text:span text:style-name="T5">S</text:span>erver <text:span text:style-name="T5">Component</text:span> é a performance, removendo a responsabilidade de renderizar as coisas pelo lado do client, permitindo trazer muita coisa ja pré renderizada gerada pelo lado do servidor</text:p>
      <text:p text:style-name="P21"><text:soft-page-break/><text:span text:style-name="T10">Server Components:</text:span><text:span text:style-name="T11"> P</text:span><text:span text:style-name="T12">or ser no servidor pode ser feito requisições http, chamadas em um banco de dados </text:span><text:span text:style-name="T11">e</text:span><text:span text:style-name="T12"> chamadas de API </text:span><text:span text:style-name="T11">(ja</text:span><text:span text:style-name="T12"> </text:span><text:span text:style-name="T11">que é </text:span><text:span text:style-name="T12">mais seguro</text:span><text:span text:style-name="T11">), N</text:span><text:span text:style-name="T12">ão</text:span><text:span text:style-name="T11"> </text:span><text:span text:style-name="T12">precisa</text:span><text:span text:style-name="T11">rá</text:span><text:span text:style-name="T12"> de hooks para fazer </text:span><text:span text:style-name="T11">essas </text:span><text:span text:style-name="T12">chamada</text:span><text:span text:style-name="T11">s</text:span></text:p>
      <text:p text:style-name="P22"/>
      <text:p text:style-name="P22"><text:span text:style-name="T2">Client Components:</text:span> P<text:span text:style-name="T13">ara criar um componente client basta colocar a seguinte diretiva no topo da pagina:</text:span></text:p>
      <text:p text:style-name="P23">“use client”</text:p>
      <text:p text:style-name="P19"/>
      <text:p text:style-name="P19"><text:span text:style-name="T5">A</text:span>gora o componente será gerado do lado do cliente, ou seja, agora é um <text:span text:style-name="T5">C</text:span>lient <text:span text:style-name="T5">C</text:span>omponent</text:p>
      <text:p text:style-name="P19"/>
      <text:p text:style-name="P24"><text:span text:style-name="T5">R</text:span>equisição com <text:span text:style-name="T5">S</text:span>erver <text:span text:style-name="T5">C</text:span>omponent:</text:p>
      <text:p text:style-name="P25"/>
      <text:p text:style-name="P26">interface PostProps {</text:p>
      <text:p text:style-name="P26"><text:s text:c="4"/>id: number,</text:p>
      <text:p text:style-name="P26"><text:s text:c="4"/>title: string,</text:p>
      <text:p text:style-name="P26"><text:s text:c="4"/>body: string,</text:p>
      <text:p text:style-name="P26"><text:s text:c="4"/>userId: number</text:p>
      <text:p text:style-name="P26">}</text:p>
      <text:p text:style-name="P25"/>
      <text:p text:style-name="P26">interface ResponseProps {</text:p>
      <text:p text:style-name="P26"><text:s text:c="4"/>posts: PostProps[]</text:p>
      <text:p text:style-name="P26">}</text:p>
      <text:p text:style-name="P20"/>
      <text:p text:style-name="P27">export default async function PostsPage() <text:span text:style-name="T14">{</text:span></text:p>
      <text:p text:style-name="P27"><text:s text:c="3"/>const response = await fetch("https://dummyjson.com/posts")</text:p>
      <text:p text:style-name="P27"><text:s text:c="3"/>const data: ResponseProps = await response.json()</text:p>
      <text:p text:style-name="P27"><text:s text:c="3"/>console.log(data)</text:p>
      <text:p text:style-name="P28"><text:span text:style-name="T15">}</text:span></text:p>
      <text:p text:style-name="P29"><text:soft-page-break/><text:span text:style-name="T16">É possível ter um </text:span><text:span text:style-name="T5">S</text:span><text:span text:style-name="T16">erver </text:span><text:span text:style-name="T17">C</text:span><text:span text:style-name="T16">omponent e dentro dele ter um </text:span><text:span text:style-name="T17">C</text:span><text:span text:style-name="T16">lient </text:span><text:span text:style-name="T17">C</text:span><text:span text:style-name="T16">omponent, </text:span><text:span text:style-name="T18">através de import</text:span><text:span text:style-name="T17">s. O contrario só é possível através de children</text:span></text:p>
      <text:h text:style-name="P1" text:outline-level="2"><text:span text:style-name="T17">S</text:span>erver <text:span text:style-name="T17">A</text:span>ctions</text:h>
      <text:p text:style-name="P30">Dentro de um server component é possível ter server actions, <text:span text:style-name="T17">que irão manipular algumas ações</text:span></text:p>
      <text:p text:style-name="P20"/>
      <text:p text:style-name="P31">Para marcar uma função como uma Server Action, adicione a diretiva <text:span text:style-name="T7">"use server"</text:span> no início da função (ou do arquivo). As Server Actions são executadas no servidor e podem ser chamadas a partir de formulários ou de componentes cliente. A função deve ser async:</text:p>
      <text:p text:style-name="P31"/>
      <text:p text:style-name="P32">async function serverFunc() {</text:p>
      <text:p text:style-name="P32"><text:s text:c="3"/>“use server”</text:p>
      <text:p text:style-name="P32"><text:s text:c="4"/>console.log(“Executando no servidor”)</text:p>
      <text:p text:style-name="P32">}</text:p>
      <text:p text:style-name="P20"/>
      <text:p text:style-name="P20">Ou em um arquivo inteiro <text:span text:style-name="T19">(Se você colocar "use server" no topo do arquivo, todas as funções exportadas desse arquivo serão Server Actions)</text:span>:</text:p>
      <text:p text:style-name="P20"/>
      <text:p text:style-name="P20"><text:span text:style-name="T7">"use server"<text:line-break/><text:line-break/>export async function serverFunc() {<text:line-break/> <text:s/>console.log("Executando no servidor")<text:line-break/>}</text:span></text:p>
      <text:p text:style-name="P20"/>
      <text:p text:style-name="P33"><text:span text:style-name="T20">Um Client Component pode utilizar uma Server Action, porém ela deve estar definida em um arquivo separado com a diretiva </text:span><text:span text:style-name="T7">"use server"</text:span><text:span text:style-name="T20">. O </text:span><text:soft-page-break/><text:span text:style-name="T20">Client Component importa essa função e o Next.js faz a comunicação com o servidor automaticamente.</text:span></text:p>
      <text:h text:style-name="P34" text:outline-level="3"><text:span text:style-name="T19">F</text:span>ormulários com <text:span text:style-name="T19">S</text:span>erver <text:span text:style-name="T19">A</text:span>ction</text:h>
      <text:p text:style-name="P35">async function <text:s/>searchUsers() {</text:p>
      <text:p text:style-name="P35"><text:s text:c="3"/>“use server”</text:p>
      <text:p text:style-name="P35">}</text:p>
      <text:p text:style-name="P35"/>
      <text:p text:style-name="P36">&lt;form <text:span text:style-name="T21">action</text:span>={searchUsers}&gt;&lt;/form&gt;</text:p>
      <text:p text:style-name="P20"/>
      <text:p text:style-name="P37">É mais apropriado utilizar action do que onSubmit.</text:p>
      <text:p text:style-name="P20"/>
      <text:p text:style-name="P38"><text:span text:style-name="T19">Utilize a propriedade name=”” e action={} para pegar o que o usuário digitou no formulário (não terá reatividade). P</text:span><text:span text:style-name="T21">or causa do action a função virá com </text:span><text:span text:style-name="T22">valores, esse</text:span><text:span text:style-name="T19">s</text:span><text:span text:style-name="T22"> valores são chamados de formData e possuem uma tipagem chamada FormData</text:span><text:span text:style-name="T21">:</text:span></text:p>
      <text:p text:style-name="P33"/>
      <text:p text:style-name="P35">async function <text:s/>searchUsers(formData: FormData) {</text:p>
      <text:p text:style-name="P35"><text:s text:c="3"/>“use server”</text:p>
      <text:p text:style-name="P39"><text:s text:c="3"/>const userName = formData.get(“nome<text:span text:style-name="T22">Usuario”)</text:span></text:p>
      <text:p text:style-name="P39"><text:s text:c="3"/><text:span text:style-name="T22">console.log(userName)</text:span></text:p>
      <text:p text:style-name="P35">}</text:p>
      <text:p text:style-name="P35"/>
      <text:p text:style-name="P36">&lt;form action={searchUsers}&gt;</text:p>
      <text:p text:style-name="P35"><text:s text:c="3"/>&lt;input name=”nome<text:span text:style-name="T22">Usuario</text:span>”&gt;&lt;/input&gt;</text:p>
      <text:p text:style-name="P36">&lt;/form&gt;</text:p>
      <text:p text:style-name="P40"/>
      <text:p text:style-name="P41"/>
      <text:p text:style-name="P41"/>
      <text:p text:style-name="P41"/>
      <text:p text:style-name="P42"><text:soft-page-break/><text:span text:style-name="T22">Buscar algo sem ter a reatividade:</text:span></text:p>
      <text:p text:style-name="P43"/>
      <text:p text:style-name="P27">async function handleSearchUsers(formData: FormData) {</text:p>
      <text:p text:style-name="P27"><text:s text:c="3"/>"use server"</text:p>
      <text:p text:style-name="P27"/>
      <text:p text:style-name="P27"><text:s text:c="3"/>const userId = formData.get("userId")</text:p>
      <text:p text:style-name="P27"/>
      <text:p text:style-name="P44"><text:s text:c="3"/>const response = await fetch(`</text:p>
      <text:p text:style-name="P43"><text:span text:style-name="T23"><text:s text:c="6"/></text:span><text:a xlink:type="simple" xlink:href="https://dummyjson.com/posts/user/$" text:style-name="Internet_20_link" text:visited-style-name="Visited_20_Internet_20_Link"><text:span text:style-name="T24">https://dummyjson.com/posts/user/</text:span><text:span text:style-name="T25">$</text:span></text:a><text:span text:style-name="T7">{userId}</text:span></text:p>
      <text:p text:style-name="P44"><text:s text:c="3"/>`)</text:p>
      <text:p text:style-name="P27"><text:s text:c="3"/>const data: ResponseProps = await response.json()</text:p>
      <text:p text:style-name="P27"/>
      <text:p text:style-name="P27"><text:s text:c="3"/>console.log(data)</text:p>
      <text:p text:style-name="P27">}</text:p>
      <text:p text:style-name="P27"/>
      <text:p text:style-name="P27">&lt;form className="flex gap-2 my-4" action={handleSearchUsers}&gt;</text:p>
      <text:p text:style-name="P27"><text:s text:c="3"/>&lt;input type="text" name="userId" /&gt;</text:p>
      <text:p text:style-name="P27"><text:s text:c="3"/>&lt;button type="submit"&gt;Buscar usuario&lt;/button&gt;</text:p>
      <text:p text:style-name="P20"><text:span text:style-name="T7">&lt;/form&gt;</text:span></text:p>
      <text:h text:style-name="P1" text:outline-level="2">Rotas Dinâmicas</text:h>
      <text:p text:style-name="P45">Para fazer uma rota dinâmica é preciso colocar o nome da pasta entre colchetes: <text:span text:style-name="T7">posts/[id]/page.tsx</text:span> ← <text:span text:style-name="T7">https://caminho1/posts/30</text:span></text:p>
      <text:p text:style-name="P20"/>
      <text:p text:style-name="P46"><text:span text:style-name="T19">P</text:span>ara cada página receber algo diferente é feito através de propriedades:</text:p>
      <text:p text:style-name="P46"/>
      <text:p text:style-name="P47">interface PostProps {</text:p>
      <text:p text:style-name="P47"><text:s text:c="4"/>id: number,</text:p>
      <text:p text:style-name="P47"><text:s text:c="4"/>title: string,</text:p>
      <text:p text:style-name="P47"><text:soft-page-break/><text:s text:c="4"/>body: string,</text:p>
      <text:p text:style-name="P47"><text:s text:c="4"/>userId: number</text:p>
      <text:p text:style-name="P47">}</text:p>
      <text:p text:style-name="P47"/>
      <text:p text:style-name="P48">export default async function DetailPost({ params }: {params: </text:p>
      <text:p text:style-name="P48">Promise&lt;{ id: string }&gt;}) {</text:p>
      <text:p text:style-name="P27"><text:s text:c="3"/>const { id } = await params</text:p>
      <text:p text:style-name="P27"/>
      <text:p text:style-name="P27">const response = await fetch(`https://dummyjson.com/posts/${id}`)</text:p>
      <text:p text:style-name="P27">const data: PostProps = await response.json()</text:p>
      <text:p text:style-name="P27"/>
      <text:p text:style-name="P27"><text:s text:c="3"/>return (</text:p>
      <text:p text:style-name="P27"><text:s text:c="6"/>&lt;div&gt;</text:p>
      <text:p text:style-name="P27"><text:s text:c="9"/>&lt;h1&gt;Detalhes do Post: {id}&lt;/h1&gt;</text:p>
      <text:p text:style-name="P27"/>
      <text:p text:style-name="P27"><text:s text:c="9"/>&lt;h2&gt;{data.title}&lt;/h2&gt;</text:p>
      <text:p text:style-name="P27"><text:s text:c="9"/>&lt;p&gt;{data.body}&lt;/p&gt;</text:p>
      <text:p text:style-name="P27"><text:s text:c="6"/>&lt;/div&gt;</text:p>
      <text:p text:style-name="P27"><text:s text:c="3"/>)</text:p>
      <text:p text:style-name="P20"><text:span text:style-name="T7">}</text:span></text:p>
      <text:h text:style-name="P1" text:outline-level="2"><text:span text:style-name="T26">Loading UI </text:span><text:span text:style-name="T19">e</text:span><text:span text:style-name="T26"> </text:span>Streaming</text:h>
      <text:p text:style-name="P49">São recursos utilizados para quando uma chamada feita em um server component demora para responder, tem o objetivo de melhorar a experiência do usuário</text:p>
      <text:p text:style-name="P49"/>
      <text:p text:style-name="P50">Tem duas formas de melhorar a experiencia do usuário caso uma requisição demore</text:p>
      <text:p text:style-name="P51"/>
      <text:p text:style-name="P51"><text:soft-page-break/><text:span text:style-name="T27">loading UI:</text:span><text:span text:style-name="T28"> </text:span><text:span text:style-name="T29">C</text:span>riar um arquivo junto do page.tsx que tem a requisição demorada chamado <text:span text:style-name="T7">loading.tsx</text:span>, o next vai identificar esse arquivo e vai mostrá-lo enquanto a pagina não <text:span text:style-name="T29">aparecer</text:span></text:p>
      <text:p text:style-name="P51"/>
      <text:p text:style-name="P52">page.tsx</text:p>
      <text:p text:style-name="P52">loading.tsx</text:p>
      <text:p text:style-name="P20"/>
      <text:p text:style-name="P53"><text:span text:style-name="T2">Streaming:</text:span> fazer com que apenas o elemento que esteja demorando a aparecer fique carregando</text:p>
      <text:p text:style-name="P53"/>
      <text:p text:style-name="P53">Todos os elementos que forem mostrar os dados da requisição e a requisição precisarão ser levados para um componente diferente:</text:p>
      <text:p text:style-name="P53"/>
      <text:p text:style-name="P54">envolta do componente que tem a requisição lenta será usado o </text:p>
      <text:p text:style-name="P54"><text:span text:style-name="T7">&lt;Suspense fallback={}&gt;</text:span>, o suspense possui uma propriedade chamada <text:span text:style-name="T7">fallback</text:span>, dentro dela <text:span text:style-name="T29">será</text:span> colocado o que irá aparecer enquanto a requisição não finaliza, ou seja, é o carregamento <text:span text:style-name="T29">(</text:span>aceita html e até componente<text:span text:style-name="T29">):</text:span> <text:span text:style-name="T7">&lt;Suspense fallback={&lt;LoadingComment /&gt;}&gt;</text:span></text:p>
      <text:p text:style-name="P54"/>
      <text:p text:style-name="P55">import <text:s/>RequisicaoDemorada from “./”</text:p>
      <text:p text:style-name="P55">import { Suspense } from “react”</text:p>
      <text:p text:style-name="P55"/>
      <text:p text:style-name="P55">&lt;h1&gt;Requisição&lt;/h1&gt;</text:p>
      <text:p text:style-name="P55">&lt;Suspense fallback={&lt;h1&gt;Carregando...&lt;h1&gt;}&gt;</text:p>
      <text:p text:style-name="P55"><text:s text:c="3"/>&lt;RequisicaoDemorada /&gt;</text:p>
      <text:p text:style-name="P55">&lt;/Suspense&gt;</text:p>
      <text:p text:style-name="P53"/>
      <text:p text:style-name="P56"><text:span text:style-name="T29">N</text:span><text:span text:style-name="T28">o primeiro caso o carregamento é pra pagina inteira, no segundo o carregamento fica mais específico, apenas para o item que ta demorando, </text:span><text:soft-page-break/><text:span text:style-name="T29">o </text:span><text:span text:style-name="T28">resto aparecerá. Ex: seção de comentários em um video no youtube, apenas os comentários estão carregando enquanto o video e outros elementos ja estão na tela. </text:span><text:span text:style-name="T30">Ex:</text:span></text:p>
      <text:p text:style-name="P57">page.tsx</text:p>
      <text:p text:style-name="P57">import { Suspense } from "react"</text:p>
      <text:p text:style-name="P57">import { PostProps } from "../page"</text:p>
      <text:p text:style-name="P57">import PostInfo from "./_components/post"</text:p>
      <text:p text:style-name="P57"/>
      <text:p text:style-name="P57">export default async function DetailPost({ params }: {params: Promise&lt;{ id: string }&gt;}) {</text:p>
      <text:p text:style-name="P57"><text:s text:c="4"/>const { id } = await params</text:p>
      <text:p text:style-name="P57"/>
      <text:p text:style-name="P57"><text:s text:c="4"/>return (</text:p>
      <text:p text:style-name="P57"><text:s text:c="8"/>&lt;div&gt;</text:p>
      <text:p text:style-name="P57"><text:s text:c="12"/>&lt;h1&gt;Detalhes do Post: {id}&lt;/h1&gt;</text:p>
      <text:p text:style-name="P57"/>
      <text:p text:style-name="P57"><text:s text:c="12"/>&lt;Suspense fallback={&lt;h1&gt;Carregando...&lt;/h1&gt;}&gt;</text:p>
      <text:p text:style-name="P57"><text:s text:c="16"/>&lt;PostInfo id={id} /&gt;</text:p>
      <text:p text:style-name="P57"><text:s text:c="12"/>&lt;/Suspense&gt;</text:p>
      <text:p text:style-name="P57"><text:s text:c="8"/>&lt;/div&gt;</text:p>
      <text:p text:style-name="P57"><text:s text:c="4"/>)</text:p>
      <text:p text:style-name="P57">}</text:p>
      <text:p text:style-name="P57"/>
      <text:p text:style-name="P57">post.tsx</text:p>
      <text:p text:style-name="P57">import { PostProps } from "../../page"</text:p>
      <text:p text:style-name="P57"/>
      <text:p text:style-name="P57">export default async function PostInfo({ id }: { id: string }) {</text:p>
      <text:p text:style-name="P57"><text:s text:c="4"/>await new Promise(resolve =&gt; setTimeout(resolve, 4000))</text:p>
      <text:p text:style-name="P57"><text:s text:c="4"/>const response = await fetch(`https://dummyjson.com/posts/${id}`)</text:p>
      <text:p text:style-name="P57"><text:s text:c="4"/>const data: PostProps = await response.json()</text:p>
      <text:p text:style-name="P57"/>
      <text:p text:style-name="P57"><text:s text:c="4"/>return (</text:p>
      <text:p text:style-name="P57"><text:s text:c="8"/>&lt;div&gt;</text:p>
      <text:p text:style-name="P57"><text:s text:c="12"/>&lt;h2&gt;{data.title}&lt;/h2&gt;</text:p>
      <text:p text:style-name="P57"><text:s text:c="12"/>&lt;p&gt;{data.body}&lt;/p&gt;</text:p>
      <text:p text:style-name="P57"><text:s text:c="8"/>&lt;/div&gt;</text:p>
      <text:p text:style-name="P57"><text:s text:c="4"/>)</text:p>
      <text:p text:style-name="P57">}</text:p>
      <text:h text:style-name="P1" text:outline-level="2"><text:soft-page-break/>Revalidate, Cache <text:span text:style-name="T29">e</text:span> ISR</text:h>
      <text:p text:style-name="P58"><text:span text:style-name="T29">Q</text:span>uando uma requisição http utilizando fetch é feita ela retorna propriedades, uma dessas propriedades é o cache</text:p>
      <text:p text:style-name="P58"/>
      <text:p text:style-name="P58">É possível passar propriedades dentro do fetch </text:p>
      <text:p text:style-name="P58"/>
      <text:p text:style-name="P58"><text:span text:style-name="T29">P</text:span>or padrão o fetch define o cache como no-store, ou seja, não ta armazenando nada, toda vez busca direto da API / do servidor, o que torna mais lento do que se tivesse o cache</text:p>
      <text:p text:style-name="P58"/>
      <text:p text:style-name="P59"><text:span text:style-name="T29">A</text:span>tivar o cache em uma requisição fetch:</text:p>
      <text:p text:style-name="P60">const response = await fetch("https://dummyjson.com/posts", {cache: "force-cache"})</text:p>
      <text:p text:style-name="P58"/>
      <text:p text:style-name="P58"><text:span text:style-name="T29">P</text:span>ara definir de quanto em quanto tempo acontecerá uma revalidação de dados da chamada, ou seja, de quanto em quanto tempo os dados serão pegos do servidor / api diretamente para atualizar:</text:p>
      <text:p text:style-name="P58"><text:span text:style-name="T7">const response = await fetch("https://dummyjson.com/posts", {cache: "force-cache", next: {revalidate: 60}})</text:span> ← vai deixar no cache por 60 segundo (revalidate: 3600 ← 1 hora)</text:p>
      <text:p text:style-name="P54"/>
      <text:p text:style-name="P58"><text:span text:style-name="T29">O</text:span> cache só funciona se os dados buscados não são dinâmicos, ou seja, não ficam mudando</text:p>
      <text:p text:style-name="P58"/>
      <text:p text:style-name="P61"><text:span text:style-name="T29">T</text:span>ambém é possível utilizar o revalidate dentro de componentes, caso o componente precise que a cada tempo tenha uma revalidação para verificar ou pegar algo diferente: <text:span text:style-name="T31">export const revalidate = 60</text:span></text:p>
      <text:p text:style-name="P54"/>
      <text:p text:style-name="P54"/>
      <text:h text:style-name="P1" text:outline-level="2"><text:soft-page-break/>Middlewares</text:h>
      <text:p text:style-name="P62">Esta depreciado, ao invés de middleware agora é usado proxy:</text:p>
      <text:p text:style-name="P62"><text:a xlink:type="simple" xlink:href="https://nextjs.org/docs/app/api-reference/file-conventions/proxy" text:style-name="Internet_20_link" text:visited-style-name="Visited_20_Internet_20_Link">https://nextjs.org/docs/app/api-reference/file-conventions/proxy</text:a></text:p>
      <text:p text:style-name="P63"/>
      <text:p text:style-name="P63">É possível ter middlewares dentro do nextjs. <text:span text:style-name="T29">P</text:span>ode ser usado para quando acessar alguma rota fazer algo, uma verificação, bloquear uma rota. Por exemplo deixar apenas <text:span text:style-name="T29">o</text:span> usuário logado acessar uma rota especifica, ou <text:span text:style-name="T29">o</text:span> adm acessar as configs, etc.</text:p>
      <text:p text:style-name="P63"/>
      <text:p text:style-name="P64"><text:span text:style-name="T29">A</text:span>penas o usuário logado pode acessar o dashboard:</text:p>
      <text:p text:style-name="P63"/>
      <text:p text:style-name="P63"><text:span text:style-name="T2">criar o arquivo dentro de src:</text:span> <text:span text:style-name="T7">middleware.ts</text:span> ← <text:span text:style-name="T7">src/middleware.ts</text:span></text:p>
      <text:p text:style-name="P63"/>
      <text:p text:style-name="P65">import { NextRequest, NextResponse } from "next/server";</text:p>
      <text:p text:style-name="P65"/>
      <text:p text:style-name="P65">export function middleware(request: NextRequest) {</text:p>
      <text:p text:style-name="P65"><text:s text:c="3"/>const authenticated = false ← Não esta autenticado</text:p>
      <text:p text:style-name="P65"/>
      <text:p text:style-name="P66"><text:s text:c="3"/>if(request.nextUrl.pathname.startsWith("/dashboard") &amp;&amp; !authenticated) </text:p>
      <text:p text:style-name="P66"><text:s text:c="4"/>{</text:p>
      <text:p text:style-name="P66"><text:s text:c="8"/>return NextResponse.redirect(new URL("/", request.url))</text:p>
      <text:p text:style-name="P66"><text:s text:c="4"/>}</text:p>
      <text:p text:style-name="P65"/>
      <text:p text:style-name="P65"><text:s text:c="3"/>return NextResponse.next()</text:p>
      <text:p text:style-name="P65">} </text:p>
      <text:p text:style-name="P67"/>
      <text:p text:style-name="P66">if(request.nextUrl.pathname.startsWith("/dashboard") &amp;&amp; !authenticated) {</text:p>
      <text:p text:style-name="P66"><text:s text:c="3"/>return NextResponse.redirect(new URL("/", request.url))</text:p>
      <text:p text:style-name="P66">} </text:p>
      <text:p text:style-name="P68"><text:soft-page-break/>← se a rota que você estiver acessando começar com /dashboard e você não estiver autenticado você será redirecionado para a home<text:tab/></text:p>
      <text:h text:style-name="P1" text:outline-level="2">Route handlers</text:h>
      <text:p text:style-name="P69">É possível ter backend dentro do nextjs e criar API Routes <text:span text:style-name="T32">(rota API)</text:span></text:p>
      <text:p text:style-name="P69"/>
      <text:p text:style-name="P69"><text:span text:style-name="T29">D</text:span>entro do app criar uma pasta chamada api, dentro dessa pasta outra pasta chamada info e dentro de info um arquivo chamado route.ts</text:p>
      <text:p text:style-name="P69"/>
      <text:p text:style-name="P70">app/api/info/route.ts</text:p>
      <text:p text:style-name="P69"/>
      <text:p text:style-name="P69"><text:span text:style-name="T7">export async function GET() {</text:span> ← Rota do tipo GET</text:p>
      <text:p text:style-name="P69"><text:span text:style-name="T7"><text:s text:c="4"/>return </text:span><text:span text:style-name="T33">Response.json(</text:span><text:span text:style-name="T7">{</text:span> ← <text:span text:style-name="T32">ta dizendo que vai retornar um json</text:span></text:p>
      <text:p text:style-name="P70"><text:s text:c="6"/>name: “Rafael”,</text:p>
      <text:p text:style-name="P70"><text:s text:c="6"/>insta: “@rafa”,</text:p>
      <text:p text:style-name="P70"><text:s text:c="6"/>youtube: “Rafael”</text:p>
      <text:p text:style-name="P70"><text:s text:c="3"/>}<text:span text:style-name="T32">)</text:span></text:p>
      <text:p text:style-name="P70">}</text:p>
      <text:p text:style-name="P54"/>
      <text:p text:style-name="P71"><text:span text:style-name="T34">D</text:span>entro de api é criado as pastas das rotas</text:p>
      <text:p text:style-name="P71"/>
      <text:p text:style-name="P71">para acessar: <text:span text:style-name="T7">url-da-aplicação/api/info</text:span></text:p>
      <text:p text:style-name="P54"/>
      <text:p text:style-name="P71">Além do GET, da para criar rotas DELETE, POST, PATCH, PUT, HEAD e OPTIONS.</text:p>
      <text:p text:style-name="P7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pt" number:country="BR" loext:transliteration-spellout="title cardinal" number:transliteration-language="pt" number:transliteration-country="BR">
      <number:number number:decimal-places="0" number:min-decimal-places="0" number:min-integer-digits="1"/>
    </number:number-style>
    <number:number-style style:name="N10115" number:language="pt" number:country="BR" loext:transliteration-spellout="title USD" number:transliteration-language="pt" number:transliteration-country="BR">
      <number:number number:decimal-places="0" number:min-decimal-places="0" number:min-integer-digits="1"/>
    </number:number-style>
    <number:number-style style:name="N10116" number:language="pt" number:country="BR" loext:transliteration-spellout="title USD" number:transliteration-language="pt" number:transliteration-country="BR">
      <number:number number:decimal-places="2" number:min-decimal-places="2" number:min-integer-digits="1"/>
    </number:number-style>
    <number:number-style style:name="N10117" number:language="pt" number:country="BR" loext:transliteration-spellout="upper USD" number:transliteration-language="pt" number:transliteration-country="BR">
      <number:number number:decimal-places="0" number:min-decimal-places="0" number:min-integer-digits="1"/>
    </number:number-style>
    <number:number-style style:name="N10118" number:language="pt" number:country="BR" loext:transliteration-spellout="upper USD" number:transliteration-language="pt" number:transliteration-country="BR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01T18:11:48.475484000</meta:creation-date>
    <dc:date>2026-07-12T10:28:58.501147600</dc:date>
    <meta:editing-duration>PT13H52M14S</meta:editing-duration>
    <meta:editing-cycles>22</meta:editing-cycles>
    <meta:generator>LibreOffice/25.2.7.2$Windows_X86_64 LibreOffice_project/5cbfd1ab6520636bb5f7b99185aa69bd7456825d</meta:generator>
    <meta:document-statistic meta:table-count="0" meta:image-count="0" meta:object-count="0" meta:page-count="13" meta:paragraph-count="212" meta:word-count="1718" meta:character-count="11862" meta:non-whitespace-character-count="9972"/>
  </office:meta>
</office:document-meta>
</file>