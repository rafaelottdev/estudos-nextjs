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automatic-styles>
    <style:style style:name="P1" style:family="paragraph" style:parent-style-name="Standard">
      <style:paragraph-properties fo:line-height="150%"/>
      <style:text-properties style:font-name="Ubuntu" fo:font-size="13pt" officeooo:rsid="000f2b1d" officeooo:paragraph-rsid="000f2b1d" style:font-size-asian="13pt" style:font-size-complex="13pt"/>
    </style:style>
    <style:style style:name="P2" style:family="paragraph" style:parent-style-name="Standard">
      <style:paragraph-properties fo:line-height="150%"/>
      <style:text-properties style:font-name="Ubuntu" fo:font-size="13pt" officeooo:rsid="0008b771" officeooo:paragraph-rsid="0008b771" style:font-size-asian="13pt" style:font-size-complex="13pt"/>
    </style:style>
    <style:style style:name="P3" style:family="paragraph" style:parent-style-name="Standard">
      <style:paragraph-properties fo:line-height="150%" fo:text-align="center" style:justify-single-word="false"/>
      <style:text-properties style:font-name="Ubuntu" fo:font-size="13pt" officeooo:rsid="000a03a9" officeooo:paragraph-rsid="000a03a9" style:font-size-asian="13pt" style:font-size-complex="13pt"/>
    </style:style>
    <style:style style:name="P4" style:family="paragraph" style:parent-style-name="Standard">
      <style:paragraph-properties fo:line-height="150%"/>
      <style:text-properties style:font-name="Ubuntu" fo:font-size="13pt" officeooo:rsid="000a03a9" officeooo:paragraph-rsid="000a03a9" style:font-size-asian="13pt" style:font-size-complex="13pt"/>
    </style:style>
    <style:style style:name="P5" style:family="paragraph" style:parent-style-name="Standard">
      <style:paragraph-properties fo:line-height="150%" fo:text-align="center" style:justify-single-word="false"/>
      <style:text-properties style:font-name="Ubuntu" fo:font-size="13pt" officeooo:rsid="000f2b1d" officeooo:paragraph-rsid="000f2b1d" style:font-size-asian="13pt" style:font-size-complex="13pt"/>
    </style:style>
    <style:style style:name="P6" style:family="paragraph" style:parent-style-name="Standard">
      <style:paragraph-properties fo:line-height="150%" fo:text-align="start" style:justify-single-word="false"/>
      <style:text-properties style:font-name="Ubuntu" fo:font-size="13pt" officeooo:rsid="000bf7bf" officeooo:paragraph-rsid="000a03a9" style:font-size-asian="13pt" style:font-size-complex="13pt"/>
    </style:style>
    <style:style style:name="P7" style:family="paragraph" style:parent-style-name="Standard">
      <style:paragraph-properties fo:line-height="150%"/>
      <style:text-properties style:font-name="Ubuntu" fo:font-size="13pt" officeooo:rsid="000bf7bf" officeooo:paragraph-rsid="000bf7bf" style:font-size-asian="13pt" style:font-size-complex="13pt"/>
    </style:style>
    <style:style style:name="P8" style:family="paragraph" style:parent-style-name="Standard">
      <style:paragraph-properties fo:line-height="150%" fo:text-align="start" style:justify-single-word="false"/>
      <style:text-properties style:font-name="Ubuntu" fo:font-size="13pt" officeooo:rsid="000bf7bf" officeooo:paragraph-rsid="000bf7bf" style:font-size-asian="13pt" style:font-size-complex="13pt"/>
    </style:style>
    <style:style style:name="P9" style:family="paragraph" style:parent-style-name="Standard">
      <style:paragraph-properties fo:line-height="150%"/>
      <style:text-properties style:font-name="Ubuntu" fo:font-size="13pt" officeooo:rsid="000d4331" officeooo:paragraph-rsid="000d4331" style:font-size-asian="13pt" style:font-size-complex="13pt"/>
    </style:style>
    <style:style style:name="P10" style:family="paragraph" style:parent-style-name="Standard">
      <style:paragraph-properties fo:line-height="150%"/>
      <style:text-properties style:font-name="Ubuntu" fo:font-size="13pt" officeooo:rsid="000bf7bf" officeooo:paragraph-rsid="000a03a9" style:font-size-asian="13pt" style:font-size-complex="13pt"/>
    </style:style>
    <style:style style:name="P11" style:family="paragraph" style:parent-style-name="Standard">
      <style:paragraph-properties fo:line-height="150%" fo:text-align="start" style:justify-single-word="false"/>
      <style:text-properties style:font-name="Ubuntu" fo:font-size="13pt" officeooo:rsid="000f2b1d" officeooo:paragraph-rsid="000f2b1d" style:font-size-asian="13pt" style:font-size-complex="13pt"/>
    </style:style>
    <style:style style:name="P12" style:family="paragraph" style:parent-style-name="Standard">
      <style:paragraph-properties fo:line-height="150%"/>
      <style:text-properties style:font-name="Ubuntu" fo:font-size="13pt" officeooo:rsid="0010ca21" officeooo:paragraph-rsid="000d4331" style:font-size-asian="13pt" style:font-size-complex="13pt"/>
    </style:style>
    <style:style style:name="P13" style:family="paragraph" style:parent-style-name="Standard">
      <style:paragraph-properties fo:line-height="150%"/>
      <style:text-properties style:font-name="Ubuntu" fo:font-size="13pt" officeooo:rsid="0011677a" officeooo:paragraph-rsid="0011677a" style:font-size-asian="13pt" style:font-size-complex="13pt"/>
    </style:style>
    <style:style style:name="P14" style:family="paragraph" style:parent-style-name="Standard">
      <style:paragraph-properties fo:line-height="150%"/>
      <style:text-properties style:font-name="Ubuntu" fo:font-size="13pt" officeooo:rsid="0012f7da" officeooo:paragraph-rsid="0012f7da" style:font-size-asian="13pt" style:font-size-complex="13pt"/>
    </style:style>
    <style:style style:name="P15" style:family="paragraph" style:parent-style-name="Standard">
      <style:paragraph-properties fo:line-height="150%" fo:text-align="center" style:justify-single-word="false"/>
      <style:text-properties style:font-name="Ubuntu" fo:font-size="13pt" officeooo:rsid="00137b16" style:font-size-asian="13pt" style:font-size-complex="13pt"/>
    </style:style>
    <style:style style:name="P16" style:family="paragraph" style:parent-style-name="Standard">
      <style:paragraph-properties fo:line-height="150%"/>
      <style:text-properties style:font-name="Ubuntu" fo:font-size="13pt" officeooo:rsid="00137b16" officeooo:paragraph-rsid="00137b16" style:font-size-asian="13pt" style:font-size-complex="13pt"/>
    </style:style>
    <style:style style:name="P17" style:family="paragraph" style:parent-style-name="Standard">
      <style:paragraph-properties fo:line-height="150%"/>
      <style:text-properties style:font-name="Ubuntu" fo:font-size="13pt" officeooo:rsid="00137b16" officeooo:paragraph-rsid="0013a4b8" style:font-size-asian="13pt" style:font-size-complex="13pt"/>
    </style:style>
    <style:style style:name="P18" style:family="paragraph" style:parent-style-name="Standard">
      <style:paragraph-properties fo:line-height="150%"/>
      <style:text-properties style:font-name="Ubuntu" fo:font-size="13pt" officeooo:rsid="0013a4b8" officeooo:paragraph-rsid="0013a4b8" style:font-size-asian="13pt" style:font-size-complex="13pt"/>
    </style:style>
    <style:style style:name="P19" style:family="paragraph" style:parent-style-name="Standard">
      <style:paragraph-properties fo:line-height="150%" fo:text-align="center" style:justify-single-word="false"/>
      <style:text-properties style:font-name="Ubuntu" fo:font-size="13pt" officeooo:rsid="0014d755" officeooo:paragraph-rsid="0014d755" style:font-size-asian="13pt" style:font-size-complex="13pt"/>
    </style:style>
    <style:style style:name="P20" style:family="paragraph" style:parent-style-name="Standard">
      <style:paragraph-properties fo:line-height="150%"/>
      <style:text-properties style:font-name="Ubuntu" fo:font-size="13pt" officeooo:rsid="0016c21b" officeooo:paragraph-rsid="0016c21b" style:font-size-asian="13pt" style:font-size-complex="13pt"/>
    </style:style>
    <style:style style:name="P21" style:family="paragraph" style:parent-style-name="Standard">
      <style:paragraph-properties fo:line-height="150%"/>
      <style:text-properties style:font-name="Ubuntu" fo:font-size="13pt" officeooo:rsid="00188aad" officeooo:paragraph-rsid="00188aad" style:font-size-asian="13pt" style:font-size-complex="13pt"/>
    </style:style>
    <style:style style:name="P22" style:family="paragraph" style:parent-style-name="Standard">
      <style:paragraph-properties fo:line-height="150%"/>
      <style:text-properties style:font-name="Ubuntu" fo:font-size="13pt" style:font-size-asian="13pt" style:font-size-complex="13pt"/>
    </style:style>
    <style:style style:name="P23" style:family="paragraph" style:parent-style-name="Standard">
      <style:paragraph-properties fo:line-height="150%"/>
      <style:text-properties style:font-name="Ubuntu" fo:font-size="13pt" officeooo:rsid="00191ed2" officeooo:paragraph-rsid="00191ed2" style:font-size-asian="13pt" style:font-size-complex="13pt"/>
    </style:style>
    <style:style style:name="P24" style:family="paragraph" style:parent-style-name="Standard">
      <style:paragraph-properties fo:line-height="150%"/>
      <style:text-properties style:font-name="Ubuntu" fo:font-size="13pt" officeooo:rsid="001a7066" officeooo:paragraph-rsid="001a7066" style:font-size-asian="13pt" style:font-size-complex="13pt"/>
    </style:style>
    <style:style style:name="P25" style:family="paragraph" style:parent-style-name="Standard">
      <style:paragraph-properties fo:line-height="150%"/>
      <style:text-properties style:font-name="Ubuntu" fo:font-size="13pt" officeooo:rsid="001ac5fd" officeooo:paragraph-rsid="001ac5fd" style:font-size-asian="13pt" style:font-size-complex="13pt"/>
    </style:style>
    <style:style style:name="P26" style:family="paragraph" style:parent-style-name="Standard">
      <style:paragraph-properties fo:line-height="150%" fo:text-align="center" style:justify-single-word="false"/>
      <style:text-properties style:font-name="Ubuntu" fo:font-size="13pt" officeooo:rsid="001b32de" officeooo:paragraph-rsid="001b32de" style:font-size-asian="13pt" style:font-size-complex="13pt"/>
    </style:style>
    <style:style style:name="P27" style:family="paragraph" style:parent-style-name="Standard">
      <style:paragraph-properties fo:line-height="150%"/>
      <style:text-properties style:font-name="Ubuntu" fo:font-size="13pt" officeooo:rsid="001b32de" officeooo:paragraph-rsid="001b32de" style:font-size-asian="13pt" style:font-size-complex="13pt"/>
    </style:style>
    <style:style style:name="P28" style:family="paragraph" style:parent-style-name="Standard">
      <style:paragraph-properties fo:line-height="150%"/>
      <style:text-properties style:font-name="Ubuntu" fo:font-size="13pt" officeooo:rsid="001cd10c" officeooo:paragraph-rsid="001cd10c" style:font-size-asian="13pt" style:font-size-complex="13pt"/>
    </style:style>
    <style:style style:name="P29" style:family="paragraph" style:parent-style-name="Standard">
      <style:paragraph-properties fo:line-height="150%"/>
      <style:text-properties style:font-name="Ubuntu" fo:font-size="13pt" officeooo:rsid="001eaf6f" officeooo:paragraph-rsid="001eaf6f" style:font-size-asian="13pt" style:font-size-complex="13pt"/>
    </style:style>
    <style:style style:name="P30" style:family="paragraph" style:parent-style-name="Standard">
      <style:paragraph-properties fo:line-height="150%"/>
      <style:text-properties style:font-name="Ubuntu" fo:font-size="13pt" officeooo:paragraph-rsid="001eaf6f" style:font-size-asian="13pt" style:font-size-complex="13pt"/>
    </style:style>
    <style:style style:name="P31" style:family="paragraph" style:parent-style-name="Standard">
      <style:paragraph-properties fo:line-height="150%"/>
      <style:text-properties style:font-name="Ubuntu" fo:font-size="13pt" officeooo:rsid="001eaf6f" officeooo:paragraph-rsid="001f4536" style:font-size-asian="13pt" style:font-size-complex="13pt"/>
    </style:style>
    <style:style style:name="P32" style:family="paragraph" style:parent-style-name="Standard">
      <style:paragraph-properties fo:line-height="150%"/>
      <style:text-properties style:font-name="Ubuntu" fo:font-size="13pt" officeooo:rsid="001f4536" officeooo:paragraph-rsid="001f4536" style:font-size-asian="13pt" style:font-size-complex="13pt"/>
    </style:style>
    <style:style style:name="P33" style:family="paragraph" style:parent-style-name="Standard">
      <style:paragraph-properties fo:line-height="150%"/>
      <style:text-properties style:font-name="Ubuntu" fo:font-size="13pt" officeooo:paragraph-rsid="001f4536" style:font-size-asian="13pt" style:font-size-complex="13pt"/>
    </style:style>
    <style:style style:name="P34" style:family="paragraph" style:parent-style-name="Standard">
      <style:paragraph-properties fo:line-height="150%" fo:text-align="center" style:justify-single-word="false"/>
      <style:text-properties style:font-name="Ubuntu" fo:font-size="13pt" officeooo:rsid="001fd3eb" officeooo:paragraph-rsid="001fd3eb" style:font-size-asian="13pt" style:font-size-complex="13pt"/>
    </style:style>
    <style:style style:name="P35" style:family="paragraph" style:parent-style-name="Standard">
      <style:paragraph-properties fo:line-height="150%"/>
      <style:text-properties style:font-name="Ubuntu" fo:font-size="13pt" officeooo:rsid="001ffa4e" officeooo:paragraph-rsid="001ffa4e" style:font-size-asian="13pt" style:font-size-complex="13pt"/>
    </style:style>
    <style:style style:name="P36" style:family="paragraph" style:parent-style-name="Standard">
      <style:paragraph-properties fo:line-height="150%"/>
      <style:text-properties style:font-name="Ubuntu" fo:font-size="13pt" officeooo:rsid="002199a9" officeooo:paragraph-rsid="002199a9" style:font-size-asian="13pt" style:font-size-complex="13pt"/>
    </style:style>
    <style:style style:name="P37" style:family="paragraph" style:parent-style-name="Standard">
      <style:paragraph-properties fo:line-height="150%"/>
      <style:text-properties style:font-name="Ubuntu" fo:font-size="13pt" officeooo:paragraph-rsid="00237b4e" style:font-size-asian="13pt" style:font-size-complex="13pt"/>
    </style:style>
    <style:style style:name="P38" style:family="paragraph" style:parent-style-name="Standard">
      <style:paragraph-properties fo:line-height="150%" fo:text-align="center" style:justify-single-word="false"/>
      <style:text-properties style:font-name="Ubuntu" fo:font-size="13pt" officeooo:rsid="0023bab6" officeooo:paragraph-rsid="0023bab6" style:font-size-asian="13pt" style:font-size-complex="13pt"/>
    </style:style>
    <style:style style:name="P39" style:family="paragraph" style:parent-style-name="Standard">
      <style:paragraph-properties fo:line-height="150%"/>
      <style:text-properties style:font-name="Ubuntu" fo:font-size="13pt" officeooo:rsid="00255ca1" officeooo:paragraph-rsid="00255ca1" style:font-size-asian="13pt" style:font-size-complex="13pt"/>
    </style:style>
    <style:style style:name="P40" style:family="paragraph" style:parent-style-name="Standard">
      <style:paragraph-properties fo:line-height="150%"/>
      <style:text-properties style:font-name="Ubuntu" fo:font-size="13pt" officeooo:rsid="00255ca1" officeooo:paragraph-rsid="0025693c" style:font-size-asian="13pt" style:font-size-complex="13pt"/>
    </style:style>
    <style:style style:name="P41" style:family="paragraph" style:parent-style-name="Standard">
      <style:paragraph-properties fo:line-height="150%"/>
      <style:text-properties style:font-name="Ubuntu" fo:font-size="13pt" officeooo:rsid="0025693c" officeooo:paragraph-rsid="0025693c" style:font-size-asian="13pt" style:font-size-complex="13pt"/>
    </style:style>
    <style:style style:name="P42" style:family="paragraph" style:parent-style-name="Standard">
      <style:paragraph-properties fo:line-height="150%"/>
      <style:text-properties style:font-name="Ubuntu" fo:font-size="13pt" officeooo:rsid="0026d85b" officeooo:paragraph-rsid="0026d85b" style:font-size-asian="13pt" style:font-size-complex="13pt"/>
    </style:style>
    <style:style style:name="P43" style:family="paragraph" style:parent-style-name="Standard">
      <style:paragraph-properties fo:line-height="150%"/>
      <style:text-properties style:font-name="Ubuntu" fo:font-size="10pt" officeooo:rsid="0026d85b" officeooo:paragraph-rsid="0026d85b" style:font-size-asian="10pt" style:font-size-complex="10pt"/>
    </style:style>
    <style:style style:name="P44" style:family="paragraph" style:parent-style-name="Standard">
      <style:paragraph-properties fo:line-height="150%" fo:text-align="center" style:justify-single-word="false"/>
      <style:text-properties style:font-name="Ubuntu" fo:font-size="13pt" officeooo:rsid="002848e1" officeooo:paragraph-rsid="002848e1" style:font-size-asian="13pt" style:font-size-complex="13pt"/>
    </style:style>
    <style:style style:name="P45" style:family="paragraph" style:parent-style-name="Standard">
      <style:paragraph-properties fo:line-height="150%"/>
      <style:text-properties style:font-name="Ubuntu" fo:font-size="13pt" officeooo:rsid="0029b32e" officeooo:paragraph-rsid="0029b32e" style:font-size-asian="13pt" style:font-size-complex="13pt"/>
    </style:style>
    <style:style style:name="P46" style:family="paragraph" style:parent-style-name="Standard">
      <style:paragraph-properties fo:line-height="150%"/>
      <style:text-properties style:font-name="Ubuntu" fo:font-size="13pt" officeooo:rsid="002b058d" officeooo:paragraph-rsid="002b058d" style:font-size-asian="13pt" style:font-size-complex="13pt"/>
    </style:style>
    <style:style style:name="P47" style:family="paragraph" style:parent-style-name="Standard">
      <style:paragraph-properties fo:line-height="150%" fo:text-align="center" style:justify-single-word="false"/>
      <style:text-properties style:font-name="Ubuntu" fo:font-size="13pt" officeooo:rsid="002c0d12" officeooo:paragraph-rsid="002c0d12" style:font-size-asian="13pt" style:font-size-complex="13pt"/>
    </style:style>
    <style:style style:name="P48" style:family="paragraph" style:parent-style-name="Standard">
      <style:paragraph-properties fo:line-height="150%"/>
      <style:text-properties style:font-name="Ubuntu" fo:font-size="13pt" officeooo:rsid="002ea130" officeooo:paragraph-rsid="002ea130" style:font-size-asian="13pt" style:font-size-complex="13pt"/>
    </style:style>
    <style:style style:name="P49" style:family="paragraph" style:parent-style-name="Standard">
      <style:paragraph-properties fo:line-height="150%"/>
      <style:text-properties style:font-name="Ubuntu" fo:font-size="13pt" officeooo:rsid="002d6dd8" officeooo:paragraph-rsid="002d6dd8" style:font-size-asian="13pt" style:font-size-complex="13pt"/>
    </style:style>
    <style:style style:name="P50" style:family="paragraph" style:parent-style-name="Standard">
      <style:paragraph-properties fo:line-height="150%"/>
      <style:text-properties style:font-name="Ubuntu" fo:font-size="13pt" officeooo:rsid="002d6dd8" officeooo:paragraph-rsid="002ea130" style:font-size-asian="13pt" style:font-size-complex="13pt"/>
    </style:style>
    <style:style style:name="P51" style:family="paragraph" style:parent-style-name="Standard">
      <style:paragraph-properties fo:line-height="150%"/>
      <style:text-properties style:font-name="Ubuntu" fo:font-size="13pt" officeooo:rsid="0026d85b" officeooo:paragraph-rsid="002d6dd8" style:font-size-asian="13pt" style:font-size-complex="13pt"/>
    </style:style>
    <style:style style:name="P52" style:family="paragraph" style:parent-style-name="Standard">
      <style:paragraph-properties fo:line-height="150%" fo:text-align="center" style:justify-single-word="false"/>
      <style:text-properties style:font-name="Ubuntu" fo:font-size="13pt" officeooo:rsid="002fdf02" officeooo:paragraph-rsid="002fdf02" style:font-size-asian="13pt" style:font-size-complex="13pt"/>
    </style:style>
    <style:style style:name="P53" style:family="paragraph" style:parent-style-name="Standard">
      <style:paragraph-properties fo:line-height="150%"/>
      <style:text-properties style:font-name="Ubuntu" fo:font-size="13pt" officeooo:rsid="00338752" officeooo:paragraph-rsid="00338752" style:font-size-asian="13pt" style:font-size-complex="13pt"/>
    </style:style>
    <style:style style:name="P54" style:family="paragraph" style:parent-style-name="Standard">
      <style:paragraph-properties fo:line-height="150%"/>
      <style:text-properties style:font-name="Ubuntu" fo:font-size="13pt" officeooo:rsid="0035251f" officeooo:paragraph-rsid="0035251f" style:font-size-asian="13pt" style:font-size-complex="13pt"/>
    </style:style>
    <style:style style:name="P55" style:family="paragraph" style:parent-style-name="Standard">
      <style:paragraph-properties fo:line-height="150%"/>
      <style:text-properties style:font-name="Ubuntu" fo:font-size="13pt" officeooo:paragraph-rsid="0026d85b" style:font-size-asian="13pt" style:font-size-complex="13pt"/>
    </style:style>
    <style:style style:name="T1" style:family="text">
      <style:text-properties officeooo:rsid="0013a4b8"/>
    </style:style>
    <style:style style:name="T2" style:family="text">
      <style:text-properties officeooo:rsid="001a7066"/>
    </style:style>
    <style:style style:name="T3" style:family="text">
      <style:text-properties officeooo:rsid="001b32de"/>
    </style:style>
    <style:style style:name="T4" style:family="text">
      <style:text-properties officeooo:rsid="001eaf6f"/>
    </style:style>
    <style:style style:name="T5" style:family="text">
      <style:text-properties officeooo:rsid="001f4536"/>
    </style:style>
    <style:style style:name="T6" style:family="text">
      <style:text-properties fo:color="#000000" loext:opacity="100%" style:text-underline-style="none"/>
    </style:style>
    <style:style style:name="T7" style:family="text">
      <style:text-properties fo:color="#000080" loext:opacity="100%" style:text-underline-style="solid" style:text-underline-width="auto" style:text-underline-color="font-color"/>
    </style:style>
    <style:style style:name="T8" style:family="text">
      <style:text-properties officeooo:rsid="00255ca1"/>
    </style:style>
    <style:style style:name="T9" style:family="text">
      <style:text-properties officeooo:rsid="0025693c"/>
    </style:style>
    <style:style style:name="T10" style:family="text">
      <style:text-properties officeooo:rsid="0035251f"/>
    </style:style>
    <style:style style:name="T11" style:family="text">
      <style:text-properties officeooo:rsid="0026d8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iar projeto</text:p>
      <text:p text:style-name="P2"><text:a xlink:type="simple" xlink:href="mailto:create-next-app@latest" text:style-name="Internet_20_link" text:visited-style-name="Visited_20_Internet_20_Link"/></text:p>
      <text:p text:style-name="P2"><text:a xlink:type="simple" xlink:href="mailto:create-next-app@latest" text:style-name="Internet_20_link" text:visited-style-name="Visited_20_Internet_20_Link">create-next-app@latest</text:a> nome</text:p>
      <text:p text:style-name="P2"/>
      <text:p text:style-name="P3">Estrutura de pastas</text:p>
      <text:p text:style-name="P4">tsconfig.json – configuração do typescript / projeto</text:p>
      <text:p text:style-name="P4">tailwind.config.ts – configuração do tailwind</text:p>
      <text:p text:style-name="P4">package.json – configuração do projeto</text:p>
      <text:p text:style-name="P4">next.config.ts – configurações option extras para o projeto next</text:p>
      <text:p text:style-name="P4">public/ - onde ficam os arquivos estaticos</text:p>
      <text:p text:style-name="P4">src/ - onde é manipulado / escrito o projeto com next</text:p>
      <text:p text:style-name="P4">app/ - é o file system routing, ou seja, tudo que for colocado dentro dele pode se tornar uma rota (navegação de pagina)</text:p>
      <text:p text:style-name="P4"/>
      <text:p text:style-name="P5">roteamento e navegação paginas</text:p>
      <text:p text:style-name="P6">page.tsx</text:p>
      <text:p text:style-name="P7">É a pagina inicial, a home do projeto</text:p>
      <text:p text:style-name="P7"/>
      <text:p text:style-name="P8">layout.tsx</text:p>
      <text:p text:style-name="P7">é o arquivo de configuração do layout global da aplicação, o children no layout nada mais é do que a pagina onde é exibida, ou seja, é onde ficará o page.tsx, onde o page.tsx será renderizado</text:p>
      <text:p text:style-name="P9"/>
      <text:p text:style-name="P9">o roteamento aconce pela pasta app/, tudos os arquivos dentro de app será considerados rotas, ou seja, app/contatos, app/dashboard serão http://localhost:3000/contatos, http://localhost:3000/dashboard</text:p>
      <text:p text:style-name="P10"/>
      <text:p text:style-name="P9">conteudo que ficar no layout será persistente / fixo, ou seja, mesmo que a rota da pagina mude ainda sim o conteudo irá permanecer:</text:p>
      <text:p text:style-name="P9"/>
      <text:p text:style-name="P9"><text:soft-page-break/>&lt;h1&gt;Header da pagina&lt;h1&gt;</text:p>
      <text:p text:style-name="P9">{children}</text:p>
      <text:p text:style-name="P10"/>
      <text:p text:style-name="P9">o h1 ficará imutavel enquanto apenas o que estiver sendo exibido pelo children mudará, ou seja, o que fica forá do children não vai mudar</text:p>
      <text:p text:style-name="P9"/>
      <text:p text:style-name="P9">arquivos forá do app não serão roteados, ou seja, não serão usados como caminhos da pagina, por isso, geralmente é colocado outros arquivos como components ou configs</text:p>
      <text:p text:style-name="P9"/>
      <text:p text:style-name="P11">links de navegação</text:p>
      <text:p text:style-name="P1"/>
      <text:p text:style-name="P1">import Link from “next/link</text:p>
      <text:p text:style-name="P1"/>
      <text:p text:style-name="P1">&lt;Link href=”/”&gt;Home&lt;Link&gt;</text:p>
      <text:p text:style-name="P9"/>
      <text:p text:style-name="P12">paginas not found </text:p>
      <text:p text:style-name="P12"/>
      <text:p text:style-name="P13">para criar um pagina not found pode ser uma global, dentro do app (é obrigatorio ter esse nome, é um nome “reservado” pelo next): </text:p>
      <text:p text:style-name="P13">not-found.tsx</text:p>
      <text:p text:style-name="P10"/>
      <text:p text:style-name="P14">Esse arquivo global irá aparecer sempre que acessar uma pagina que não existe em qualquer lugar do projeto</text:p>
      <text:p text:style-name="P4"/>
      <text:p text:style-name="P15">metadatas</text:p>
      <text:p text:style-name="P15"/>
      <text:p text:style-name="P16">são tags que melhoram o indexação do site, melhorando o ranqueamento nos buscadores. O buscador do google faz a leitura desses dados.</text:p>
      <text:p text:style-name="P16"><text:soft-page-break/>É possivel criar metadados de diversas formas, de forma estatica ou dinamica permitindo cada pagina ter uma diferente.</text:p>
      <text:p text:style-name="P16">Import { Metadata } from “next”</text:p>
      <text:p text:style-name="P16"/>
      <text:p text:style-name="P16">export const metadata: Metadata = {</text:p>
      <text:p text:style-name="P16"><text:s text:c="3"/>title: “”, ← <text:span text:style-name="T1">titulo da pagina</text:span></text:p>
      <text:p text:style-name="P17"><text:s text:c="3"/>description: “”, ← <text:span text:style-name="T1">descrição da pagina</text:span></text:p>
      <text:p text:style-name="P17"><text:s text:c="3"/><text:span text:style-name="T1">openGraph: {title: “”, description: “”, images: [“url de uma imagem”]}, </text:span>← <text:s text:c="5"/></text:p>
      <text:p text:style-name="P18"><text:s text:c="3"/>Pré-visualização quando compartilha a url em uma rede social</text:p>
      <text:p text:style-name="P18"><text:s text:c="3"/>robots: {index: true, follow: true, nocache: true, googleBot: {index: true, </text:p>
      <text:p text:style-name="P18"><text:s text:c="3"/>follow: true}}</text:p>
      <text:p text:style-name="P16">}</text:p>
      <text:p text:style-name="P16"/>
      <text:p text:style-name="P18">para tornar o metadata global basta inserir o metadata no layout.tsx ao invés de na page.tsx, caso a pagina não tenha metadata será usado a que esta no layout.tsx</text:p>
      <text:p text:style-name="P16"/>
      <text:p text:style-name="P19">server e client component</text:p>
      <text:p text:style-name="P19"/>
      <text:p text:style-name="P20">Por padrao, quando um componente é criado, ele é um server component, ou seja, ele é renderizado / gerado pelo servidor (pelo server side).</text:p>
      <text:p text:style-name="P21">Faz com que menos javascript seja renderizado pelo lado do cliente</text:p>
      <text:p text:style-name="P22"/>
      <text:p text:style-name="P21">A criação de um componente com react puro é considerado um client component, por isso podem ter reatividade, cliques de botão, use state, use effect, hooks etc.</text:p>
      <text:p text:style-name="P21"/>
      <text:p text:style-name="P21">uma das coisas que ganha ao ser server é a performance, removendo a responsabilidade de renderizar as coisas pelo lado do client, permitindo trazer muita coisa ja pré-renderizada gerada pelo lado do servidor</text:p>
      <text:p text:style-name="P21"><text:soft-page-break/></text:p>
      <text:p text:style-name="P21">server component: por ser no servidor pode ser feito, requisições http, chamadas em um banco de dados, chamadas de API, por ser mais seguro</text:p>
      <text:p text:style-name="P21"/>
      <text:p text:style-name="P21">não precisa de hooks para fazer uma chamada ja que ta no server</text:p>
      <text:p text:style-name="P21"/>
      <text:p text:style-name="P21">para criar um componente client basta colocar a seguinte diretiva no topo da pagina:</text:p>
      <text:p text:style-name="P21">“use client”</text:p>
      <text:p text:style-name="P21"/>
      <text:p text:style-name="P21">agora o componente será gerado do lado do cliente, ou seja, agora é um client component</text:p>
      <text:p text:style-name="P21"/>
      <text:p text:style-name="P23">requisição com server component:</text:p>
      <text:p text:style-name="P23"/>
      <text:p text:style-name="P23">interface PostProps {</text:p>
      <text:p text:style-name="P23"><text:s text:c="4"/>id: number,</text:p>
      <text:p text:style-name="P23"><text:s text:c="4"/>title: string,</text:p>
      <text:p text:style-name="P23"><text:s text:c="4"/>body: string,</text:p>
      <text:p text:style-name="P23"><text:s text:c="4"/>userId: number</text:p>
      <text:p text:style-name="P23">}</text:p>
      <text:p text:style-name="P23"/>
      <text:p text:style-name="P23">interface ResponseProps {</text:p>
      <text:p text:style-name="P23"><text:s text:c="4"/>posts: PostProps[]</text:p>
      <text:p text:style-name="P23">}</text:p>
      <text:p text:style-name="P22"/>
      <text:p text:style-name="P22">export default async function PostsPage() <text:span text:style-name="T2">{</text:span></text:p>
      <text:p text:style-name="P22"><text:s text:c="3"/>const response = await fetch("https://dummyjson.com/posts")</text:p>
      <text:p text:style-name="P22"><text:s text:c="3"/>const data: ResponseProps = await response.json()</text:p>
      <text:p text:style-name="P22"/>
      <text:p text:style-name="P22"><text:soft-page-break/><text:s text:c="3"/>console.log(data)</text:p>
      <text:p text:style-name="P24">}</text:p>
      <text:p text:style-name="P22"/>
      <text:p text:style-name="P25">É possivel ter um server component e dentro dele ter um client component, <text:span text:style-name="T3">através de um import</text:span></text:p>
      <text:p text:style-name="P22"/>
      <text:p text:style-name="P22"/>
      <text:p text:style-name="P26">server actions</text:p>
      <text:p text:style-name="P27">Dentro de um server component é possivel ter server actions que vai manipular algumas ações</text:p>
      <text:p text:style-name="P22"/>
      <text:p text:style-name="P28">para permitir que uma função seja executada no lado do servidor passe uma diretiva no topo da função (com isso será possivel utilizar eventos): “use server”</text:p>
      <text:p text:style-name="P28"/>
      <text:p text:style-name="P28">a função deve ser assincrona:</text:p>
      <text:p text:style-name="P28"/>
      <text:p text:style-name="P28">async function serverFunc() {</text:p>
      <text:p text:style-name="P28"><text:s text:c="3"/>“use server”</text:p>
      <text:p text:style-name="P28"><text:s text:c="4"/>console.log(“”)</text:p>
      <text:p text:style-name="P28">}</text:p>
      <text:p text:style-name="P22"/>
      <text:p text:style-name="P29">Tambem é possivel criar uma server action dentro do client utilizando “use server”</text:p>
      <text:p text:style-name="P29"/>
      <text:p text:style-name="P29">É possivel tambem ter formularios com server action:</text:p>
      <text:p text:style-name="P29">async function <text:s/>searchUsers() {</text:p>
      <text:p text:style-name="P29"><text:s text:c="3"/>“use server”</text:p>
      <text:p text:style-name="P29">}</text:p>
      <text:p text:style-name="P30">&lt;<text:span text:style-name="T4">form onSubmit={searchUsers}&gt;&lt;/form&gt;</text:span></text:p>
      <text:p text:style-name="P29"><text:soft-page-break/>Ao invés de utilizar o onSubmit no server component é recomendado utilizar a propriedade action={}:</text:p>
      <text:p text:style-name="P29"/>
      <text:p text:style-name="P29">async function <text:s/>searchUsers() {</text:p>
      <text:p text:style-name="P29"><text:s text:c="3"/>“use server”</text:p>
      <text:p text:style-name="P29">}</text:p>
      <text:p text:style-name="P29"/>
      <text:p text:style-name="P30">&lt;form <text:span text:style-name="T4">action</text:span>={searchUsers}&gt;&lt;/form&gt;</text:p>
      <text:p text:style-name="P22"/>
      <text:p text:style-name="P29">pra pegar o que o usuario digitou sem usar uma função client e utilizando o action é utilizado <text:span text:style-name="T5">a propriedade</text:span> name, por causa do action a função virá com <text:span text:style-name="T5">valores, esse valores são chamados de formData e possuem uma tipagem chamada FormData</text:span>:</text:p>
      <text:p text:style-name="P29"/>
      <text:p text:style-name="P29">async function <text:s/>searchUsers(formData: FormData) {</text:p>
      <text:p text:style-name="P29"><text:s text:c="3"/>“use server”</text:p>
      <text:p text:style-name="P31"><text:s text:c="3"/>const userName = formData.get(“nome<text:span text:style-name="T5">Usuario”)</text:span></text:p>
      <text:p text:style-name="P31"><text:s text:c="3"/><text:span text:style-name="T5">console.log(userName)</text:span></text:p>
      <text:p text:style-name="P29">}</text:p>
      <text:p text:style-name="P29"/>
      <text:p text:style-name="P30">&lt;form action={searchUsers}&gt;</text:p>
      <text:p text:style-name="P29"><text:s text:c="3"/>&lt;input name=”nome<text:span text:style-name="T5">Usuario</text:span>”&gt;&lt;/input&gt;</text:p>
      <text:p text:style-name="P30">&lt;/form&gt;</text:p>
      <text:p text:style-name="P22"/>
      <text:p text:style-name="P32">Ta sendo pego o que o usuario digitou sem reatividade. </text:p>
      <text:p text:style-name="P32"/>
      <text:p text:style-name="P32"/>
      <text:p text:style-name="P32"/>
      <text:p text:style-name="P32"/>
      <text:p text:style-name="P32"/>
      <text:p text:style-name="P33"><text:soft-page-break/><text:span text:style-name="T5">Buscar algo sem ter a reatividade:</text:span></text:p>
      <text:p text:style-name="P33"/>
      <text:p text:style-name="P22">async function handleSearchUsers(formData: FormData) {</text:p>
      <text:p text:style-name="P22"><text:s text:c="3"/>"use server"</text:p>
      <text:p text:style-name="P22"/>
      <text:p text:style-name="P22"><text:s text:c="3"/>const userId = formData.get("userId")</text:p>
      <text:p text:style-name="P22"/>
      <text:p text:style-name="P33"><text:s text:c="3"/>const response = await fetch(`</text:p>
      <text:p text:style-name="P33"><text:span text:style-name="T6"><text:s text:c="6"/></text:span><text:a xlink:type="simple" xlink:href="https://dummyjson.com/posts/user/$" text:style-name="Internet_20_link" text:visited-style-name="Visited_20_Internet_20_Link"><text:span text:style-name="T7">https://dummyjson.com/posts/user/</text:span><text:span text:style-name="T5">$</text:span></text:a>{userId}</text:p>
      <text:p text:style-name="P33"><text:s text:c="3"/>`)</text:p>
      <text:p text:style-name="P22"><text:s text:c="3"/>const data: ResponseProps = await response.json()</text:p>
      <text:p text:style-name="P22"/>
      <text:p text:style-name="P22"><text:s text:c="3"/>console.log(data)</text:p>
      <text:p text:style-name="P22">}</text:p>
      <text:p text:style-name="P22"/>
      <text:p text:style-name="P22">&lt;form className="flex gap-2 my-4" action={handleSearchUsers}&gt;</text:p>
      <text:p text:style-name="P22"><text:s text:c="3"/>&lt;input type="text" name="userId" /&gt;</text:p>
      <text:p text:style-name="P22"><text:s text:c="3"/>&lt;button type="submit"&gt;Buscar usuario&lt;/button&gt;</text:p>
      <text:p text:style-name="P22">&lt;/form&gt;</text:p>
      <text:p text:style-name="P22"/>
      <text:p text:style-name="P34">Rotas Dinamicas</text:p>
      <text:p text:style-name="P35">Para fazer uma rota dinamica é preciso colocar o nome da pasta entre colchetes: posts/[id]/page.tsx ← https://caminho1/posts/30</text:p>
      <text:p text:style-name="P22"/>
      <text:p text:style-name="P36">para cada pagina receber algo diferente é feito através de propriedades:</text:p>
      <text:p text:style-name="P36"/>
      <text:p text:style-name="P36">interface PostProps {</text:p>
      <text:p text:style-name="P36"><text:s text:c="4"/>id: number,</text:p>
      <text:p text:style-name="P36"><text:s text:c="4"/>title: string,</text:p>
      <text:p text:style-name="P36"><text:s text:c="4"/>body: string,</text:p>
      <text:p text:style-name="P36"><text:soft-page-break/><text:s text:c="4"/>userId: number</text:p>
      <text:p text:style-name="P36">}</text:p>
      <text:p text:style-name="P36"/>
      <text:p text:style-name="P37">export default async function DetailPost({ params }: {params: </text:p>
      <text:p text:style-name="P37">Promise&lt;{ id: string }&gt;}) {</text:p>
      <text:p text:style-name="P22"><text:s text:c="3"/>const { id } = await params</text:p>
      <text:p text:style-name="P22"/>
      <text:p text:style-name="P22">const response = await fetch(`https://dummyjson.com/posts/${id}`)</text:p>
      <text:p text:style-name="P22">const data: PostProps = await response.json()</text:p>
      <text:p text:style-name="P22"/>
      <text:p text:style-name="P22"><text:s text:c="3"/>return (</text:p>
      <text:p text:style-name="P22"><text:s text:c="6"/>&lt;div&gt;</text:p>
      <text:p text:style-name="P22"><text:s text:c="9"/>&lt;h1&gt;Detalhes do Post: {id}&lt;/h1&gt;</text:p>
      <text:p text:style-name="P22"/>
      <text:p text:style-name="P22"><text:s text:c="9"/>&lt;h2&gt;{data.title}&lt;/h2&gt;</text:p>
      <text:p text:style-name="P22"><text:s text:c="9"/>&lt;p&gt;{data.body}&lt;/p&gt;</text:p>
      <text:p text:style-name="P22"><text:s text:c="6"/>&lt;/div&gt;</text:p>
      <text:p text:style-name="P22"><text:s text:c="3"/>)</text:p>
      <text:p text:style-name="P22">}</text:p>
      <text:p text:style-name="P22"/>
      <text:p text:style-name="P38"><text:span text:style-name="T8">Loading UI Ee</text:span>Streaming</text:p>
      <text:p text:style-name="P39">São recursos utilizados para quando uma chamada feita em um server component demora para responder, tem o objetivo de melhorar a experiencia do usuario</text:p>
      <text:p text:style-name="P39"/>
      <text:p text:style-name="P40">tem duas formas de melhorar a experiencia do usuario caso uma requisição demore: </text:p>
      <text:p text:style-name="P40"/>
      <text:p text:style-name="P40"><text:soft-page-break/><text:span text:style-name="T9">loading UI: </text:span>criar um arquivo junto do page.tsx que tem a requisição demorada chamado loading.tsx, o next vai identificar esse arquivo e vai mostra-lo enquanto a pagina não é mostrada</text:p>
      <text:p text:style-name="P40"/>
      <text:p text:style-name="P41">page.tsx</text:p>
      <text:p text:style-name="P41">loading.tsx</text:p>
      <text:p text:style-name="P22"/>
      <text:p text:style-name="P41">Streaming: fazer com que apenas o elemento que esteja demorando a aparecer fique carregando</text:p>
      <text:p text:style-name="P41"/>
      <text:p text:style-name="P41">Todos os elementos que forem mostrar os dados da requisição e a requisição precisarão ser levados para um componente diferente:</text:p>
      <text:p text:style-name="P41"/>
      <text:p text:style-name="P42">envolta do componente que tem a requisição lenta será usado o </text:p>
      <text:p text:style-name="P42">&lt;Suspense fallback={}&gt;, o suspense possui uma propriedade chamada fallback, dentro dela pode será colocado o que irá aparecer enquanto a requisição não finaliza, ou seja, é o carregamento, aceita html e até componente: &lt;Suspense fallback={&lt;LoadingComment /&gt;}&gt;</text:p>
      <text:p text:style-name="P42"/>
      <text:p text:style-name="P42">import <text:s/>RequisicaoDemorada from “./”</text:p>
      <text:p text:style-name="P42">import { Suspense } from “react”</text:p>
      <text:p text:style-name="P42"/>
      <text:p text:style-name="P42">&lt;h1&gt;Requisição&lt;/h1&gt;</text:p>
      <text:p text:style-name="P42">&lt;Suspense fallback={&lt;h1&gt;Carregando...&lt;h1&gt;}&gt;</text:p>
      <text:p text:style-name="P42"><text:s text:c="3"/>&lt;RequisicaoDemorada /&gt;</text:p>
      <text:p text:style-name="P42">&lt;/Suspense&gt;</text:p>
      <text:p text:style-name="P41"/>
      <text:p text:style-name="P41">no primeiro caso o carregamento é pra pagina inteira, no segundo o carregamento fica mais especifico, apenas para o item que ta demorando, todo o resto irá <text:s/>aparecer. Ex: seção de comentarios em um video no <text:soft-page-break/>youtube, apenas os comentarios estão carregando enquanto o video e outros elementos ja estão na tela</text:p>
      <text:p text:style-name="P22"/>
      <text:p text:style-name="P42">Ex:</text:p>
      <text:p text:style-name="P43">page.tsx</text:p>
      <text:p text:style-name="P43">import { Suspense } from "react"</text:p>
      <text:p text:style-name="P43">import { PostProps } from "../page"</text:p>
      <text:p text:style-name="P43">import PostInfo from "./_components/post"</text:p>
      <text:p text:style-name="P43"/>
      <text:p text:style-name="P43">export default async function DetailPost({ params }: {params: Promise&lt;{ id: string }&gt;}) {</text:p>
      <text:p text:style-name="P43"><text:s text:c="4"/>const { id } = await params</text:p>
      <text:p text:style-name="P43"/>
      <text:p text:style-name="P43"><text:s text:c="4"/>return (</text:p>
      <text:p text:style-name="P43"><text:s text:c="8"/>&lt;div&gt;</text:p>
      <text:p text:style-name="P43"><text:s text:c="12"/>&lt;h1&gt;Detalhes do Post: {id}&lt;/h1&gt;</text:p>
      <text:p text:style-name="P43"/>
      <text:p text:style-name="P43"><text:s text:c="12"/>&lt;Suspense fallback={&lt;h1&gt;Carregando...&lt;/h1&gt;}&gt;</text:p>
      <text:p text:style-name="P43"><text:s text:c="16"/>&lt;PostInfo id={id} /&gt;</text:p>
      <text:p text:style-name="P43"><text:s text:c="12"/>&lt;/Suspense&gt;</text:p>
      <text:p text:style-name="P43"><text:s text:c="8"/>&lt;/div&gt;</text:p>
      <text:p text:style-name="P43"><text:s text:c="4"/>)</text:p>
      <text:p text:style-name="P43">}</text:p>
      <text:p text:style-name="P43"/>
      <text:p text:style-name="P43">post.tsx</text:p>
      <text:p text:style-name="P43">import { PostProps } from "../../page"</text:p>
      <text:p text:style-name="P43"/>
      <text:p text:style-name="P43">export default async function PostInfo({ id }: { id: string }) {</text:p>
      <text:p text:style-name="P43"><text:s text:c="4"/>await new Promise(resolve =&gt; setTimeout(resolve, 4000))</text:p>
      <text:p text:style-name="P43"><text:s text:c="4"/>const response = await fetch(`https://dummyjson.com/posts/${id}`)</text:p>
      <text:p text:style-name="P43"><text:s text:c="4"/>const data: PostProps = await response.json()</text:p>
      <text:p text:style-name="P43"/>
      <text:p text:style-name="P43"><text:s text:c="4"/>return (</text:p>
      <text:p text:style-name="P43"><text:s text:c="8"/>&lt;div&gt;</text:p>
      <text:p text:style-name="P43"><text:s text:c="12"/>&lt;h2&gt;{data.title}&lt;/h2&gt;</text:p>
      <text:p text:style-name="P43"><text:s text:c="12"/>&lt;p&gt;{data.body}&lt;/p&gt;</text:p>
      <text:p text:style-name="P43"><text:s text:c="8"/>&lt;/div&gt;</text:p>
      <text:p text:style-name="P43"><text:s text:c="4"/>)</text:p>
      <text:p text:style-name="P43">}</text:p>
      <text:p text:style-name="P44"><text:soft-page-break/>Revalidate, Cache, ISR</text:p>
      <text:p text:style-name="P45">quando uma requisição http utilizando fetch é feita ela retorna propriedades, uma dessas propriedades é o cache</text:p>
      <text:p text:style-name="P45"/>
      <text:p text:style-name="P45">É possivel passar propriedades dentro do fetch </text:p>
      <text:p text:style-name="P45"/>
      <text:p text:style-name="P45">por padrão o fetch define o cache como no-store, ou seja, não ta armazenando nada, ou seja, toda vez busca direto da API / do servidor, o que torna mais lento do que se tivesse o cache</text:p>
      <text:p text:style-name="P45"/>
      <text:p text:style-name="P45">para ativar o cache em uma requisição fetch:</text:p>
      <text:p text:style-name="P45">const response = await fetch("https://dummyjson.com/posts", {cache: "force-cache"})</text:p>
      <text:p text:style-name="P45"/>
      <text:p text:style-name="P45">para definir de quanto em quanto tempo irá acontecer uma revalidação de dados da chamada, ou seja, de quanto em quanto tempo os dados serão pegos do servidor / api diretamente para atualizar:</text:p>
      <text:p text:style-name="P45">const response = await fetch("https://dummyjson.com/posts", {cache: "force-cache", next: {revalidate: 60}}) ← vai deixar no cache por 60 segundo (revalidate: 3600 ← 1 hora)</text:p>
      <text:p text:style-name="P42"/>
      <text:p text:style-name="P45">o cache só funciona se os dados buscados não são dinamicos, ou seja, não ficam mudando</text:p>
      <text:p text:style-name="P45"/>
      <text:p text:style-name="P46">tambem é possivel utilizar o revalidate dentro de componentes, caso o componente precise que a cada tempo tenha uma revalidação para verificar ou pegar algo diferente:</text:p>
      <text:p text:style-name="P42">export const revalidate = 60</text:p>
      <text:p text:style-name="P42"/>
      <text:p text:style-name="P42"/>
      <text:p text:style-name="P47"><text:soft-page-break/>Middlewares</text:p>
      <text:p text:style-name="P48">Esta depreciado, ao invés de middleware agora é usado proxy:</text:p>
      <text:p text:style-name="P48">https://nextjs.org/docs/app/api-reference/file-conventions/proxy</text:p>
      <text:p text:style-name="P49"/>
      <text:p text:style-name="P49">É possivel ter middlewares dentro do nextjs, pode ser usado para quando acessar alguma rota fazer algo, uma verificação, bloquear uma rota. Por exemplo deixar apenas um usuario logado acessar uma rota especifica, ou um adm acessar as configs, etc.</text:p>
      <text:p text:style-name="P49"/>
      <text:p text:style-name="P49">apenas o usuario logado pode acessar o dashboard:</text:p>
      <text:p text:style-name="P49"/>
      <text:p text:style-name="P49">criar o arquivo dentro de src: middleware.ts ← src/middleware.ts</text:p>
      <text:p text:style-name="P49"/>
      <text:p text:style-name="P49">import { NextRequest, NextResponse } from "next/server";</text:p>
      <text:p text:style-name="P49"/>
      <text:p text:style-name="P49">export function middleware(request: NextRequest) {</text:p>
      <text:p text:style-name="P49"/>
      <text:p text:style-name="P49"><text:s text:c="3"/>const authenticated = false ← Não esta autenticado</text:p>
      <text:p text:style-name="P49"/>
      <text:p text:style-name="P50"><text:s text:c="3"/>if(request.nextUrl.pathname.startsWith("/dashboard") &amp;&amp; !authenticated) </text:p>
      <text:p text:style-name="P50"><text:s text:c="3"/>{</text:p>
      <text:p text:style-name="P50"><text:s text:c="8"/>return NextResponse.redirect(new URL("/", request.url))</text:p>
      <text:p text:style-name="P50"><text:s text:c="4"/>}</text:p>
      <text:p text:style-name="P49"/>
      <text:p text:style-name="P49"><text:s text:c="3"/>return NextResponse.next()</text:p>
      <text:p text:style-name="P49">} </text:p>
      <text:p text:style-name="P51"/>
      <text:p text:style-name="P50">if(request.nextUrl.pathname.startsWith("/dashboard") &amp;&amp; !authenticated) {</text:p>
      <text:p text:style-name="P50"><text:s text:c="3"/>return NextResponse.redirect(new URL("/", request.url))</text:p>
      <text:p text:style-name="P50">} </text:p>
      <text:p text:style-name="P50"><text:soft-page-break/>← se a rota que voce estiver acessando começar com /dashboard e voce não estiver autenticado voce será redirecionado para a home<text:tab/></text:p>
      <text:p text:style-name="P42"/>
      <text:p text:style-name="P52">Route handlers</text:p>
      <text:p text:style-name="P53">É possivel ter backend dentro do nextjs e criar API Routes <text:span text:style-name="T10">(rota API)</text:span></text:p>
      <text:p text:style-name="P53"/>
      <text:p text:style-name="P53">dentro do app criar uma pasta chamada api: dentro dessa pasta outra pasta chamada info e dentro de info um arquivo chamado route.ts</text:p>
      <text:p text:style-name="P53"/>
      <text:p text:style-name="P53">app/api/info/route.ts</text:p>
      <text:p text:style-name="P53"/>
      <text:p text:style-name="P53">export async function GET() { ← Rota do tipo GET</text:p>
      <text:p text:style-name="P53"><text:s text:c="4"/>return <text:span text:style-name="T10">Response.json(</text:span>{ ← <text:span text:style-name="T10">ta dizendo que vai retornar um json</text:span></text:p>
      <text:p text:style-name="P53"><text:s text:c="6"/>name: “Rafael”,</text:p>
      <text:p text:style-name="P53"><text:s text:c="6"/>insta: “@rafa”,</text:p>
      <text:p text:style-name="P53"><text:s text:c="6"/>youtube: “Rafael”</text:p>
      <text:p text:style-name="P53"><text:s text:c="3"/>}<text:span text:style-name="T10">)</text:span></text:p>
      <text:p text:style-name="P53">}</text:p>
      <text:p text:style-name="P42"/>
      <text:p text:style-name="P54">dentro de api é criado as pastas das rotas</text:p>
      <text:p text:style-name="P54"/>
      <text:p text:style-name="P54">para acessar: url da aplicação/api/info</text:p>
      <text:p text:style-name="P42"/>
      <text:p text:style-name="P54">Alem do GET, da para criar rotas DELETE, POST, PATCH, PUT, HEAD e OPTIONS</text:p>
      <text:p text:style-name="P42"/>
      <text:p text:style-name="P42"/>
      <text:p text:style-name="P55"><text:span text:style-name="T11"><text:s/></text:span></text:p>
      <text:p text:style-name="P55"/>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1T18:11:48.475484000</meta:creation-date>
    <dc:date>2026-07-05T16:24:13.622561800</dc:date>
    <meta:editing-duration>PT13H36M6S</meta:editing-duration>
    <meta:editing-cycles>17</meta:editing-cycles>
    <meta:generator>LibreOffice/25.2.7.2$Windows_X86_64 LibreOffice_project/5cbfd1ab6520636bb5f7b99185aa69bd7456825d</meta:generator>
    <meta:document-statistic meta:table-count="0" meta:image-count="0" meta:object-count="0" meta:page-count="13" meta:paragraph-count="223" meta:word-count="1668" meta:character-count="11464" meta:non-whitespace-character-count="9629"/>
  </office:meta>
</office:document-meta>
</file>