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officeooo:rsid="0008b771" officeooo:paragraph-rsid="000f2b1d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rsid="0008b771" officeooo:paragraph-rsid="0008b771" style:font-size-asian="13pt" style:font-size-complex="13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Ubuntu" fo:font-size="13pt" officeooo:rsid="000a03a9" officeooo:paragraph-rsid="000a03a9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0a03a9" officeooo:paragraph-rsid="000a03a9" style:font-size-asian="13pt" style:font-size-complex="13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Ubuntu" fo:font-size="13pt" officeooo:rsid="000f2b1d" officeooo:paragraph-rsid="000f2b1d" style:font-size-asian="13pt" style:font-size-complex="13pt"/>
    </style:style>
    <style:style style:name="P6" style:family="paragraph" style:parent-style-name="Standard">
      <style:paragraph-properties fo:line-height="150%" fo:text-align="start" style:justify-single-word="false"/>
      <style:text-properties style:font-name="Ubuntu" fo:font-size="13pt" officeooo:rsid="000bf7bf" officeooo:paragraph-rsid="000a03a9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0bf7bf" officeooo:paragraph-rsid="000bf7bf" style:font-size-asian="13pt" style:font-size-complex="13pt"/>
    </style:style>
    <style:style style:name="P8" style:family="paragraph" style:parent-style-name="Standard">
      <style:paragraph-properties fo:line-height="150%" fo:text-align="start" style:justify-single-word="false"/>
      <style:text-properties style:font-name="Ubuntu" fo:font-size="13pt" officeooo:rsid="000bf7bf" officeooo:paragraph-rsid="000bf7bf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0d4331" officeooo:paragraph-rsid="000d4331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0bf7bf" officeooo:paragraph-rsid="000a03a9" style:font-size-asian="13pt" style:font-size-complex="13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Ubuntu" fo:font-size="13pt" officeooo:rsid="000f2b1d" officeooo:paragraph-rsid="000f2b1d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0f2b1d" officeooo:paragraph-rsid="000f2b1d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10ca21" officeooo:paragraph-rsid="000d4331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11677a" officeooo:paragraph-rsid="0011677a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12f7da" officeooo:paragraph-rsid="0012f7da" style:font-size-asian="13pt" style:font-size-complex="13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Ubuntu" fo:font-size="13pt" officeooo:rsid="00137b16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137b16" officeooo:paragraph-rsid="00137b16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137b16" officeooo:paragraph-rsid="0013a4b8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13a4b8" officeooo:paragraph-rsid="0013a4b8" style:font-size-asian="13pt" style:font-size-complex="13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Ubuntu" fo:font-size="13pt" officeooo:rsid="0014d755" officeooo:paragraph-rsid="0014d755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T1" style:family="text">
      <style:text-properties officeooo:rsid="000f2b1d"/>
    </style:style>
    <style:style style:name="T2" style:family="text">
      <style:text-properties officeooo:rsid="0013a4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iar projeto</text:span></text:p>
      <text:p text:style-name="P2"><text:a xlink:type="simple" xlink:href="mailto:create-next-app@latest" text:style-name="Internet_20_link" text:visited-style-name="Visited_20_Internet_20_Link"/></text:p>
      <text:p text:style-name="P2"><text:a xlink:type="simple" xlink:href="mailto:create-next-app@latest" text:style-name="Internet_20_link" text:visited-style-name="Visited_20_Internet_20_Link">create-next-app@latest</text:a> nome</text:p>
      <text:p text:style-name="P2"/>
      <text:p text:style-name="P3">Estrutura de pastas</text:p>
      <text:p text:style-name="P4">tsconfig.json – configuração do typescript / projeto</text:p>
      <text:p text:style-name="P4">tailwind.config.ts – configuração do tailwind</text:p>
      <text:p text:style-name="P4">package.json – configuração do projeto</text:p>
      <text:p text:style-name="P4">next.config.ts – configurações option extras para o projeto next</text:p>
      <text:p text:style-name="P4">public/ - onde ficam os arquivos estaticos</text:p>
      <text:p text:style-name="P4">src/ - onde é manipulado / escrito o projeto com next</text:p>
      <text:p text:style-name="P4">app/ - é o file system routing, ou seja, tudo que for colocado dentro dele pode se tornar uma rota (navegação de pagina)</text:p>
      <text:p text:style-name="P4"/>
      <text:p text:style-name="P5">roteamento e navegação paginas</text:p>
      <text:p text:style-name="P6">page.tsx</text:p>
      <text:p text:style-name="P7">É a pagina inicial, a home do projeto</text:p>
      <text:p text:style-name="P7"/>
      <text:p text:style-name="P8">layout.tsx</text:p>
      <text:p text:style-name="P7">é o arquivo de configuração do layout global da aplicação, o children no layout nada mais é do que a pagina onde é exibida, ou seja, é onde ficará o page.tsx, onde o page.tsx será renderizado</text:p>
      <text:p text:style-name="P9"/>
      <text:p text:style-name="P9">o roteamento aconce pela pasta app/, tudos os arquivos dentro de app será considerados rotas, ou seja, app/contatos, app/dashboard serão http://localhost:3000/contatos, http://localhost:3000/dashboard</text:p>
      <text:p text:style-name="P10"/>
      <text:p text:style-name="P9">conteudo que ficar no layout será persistente / fixo, ou seja, mesmo que a rota da pagina mude ainda sim o conteudo irá permanecer:</text:p>
      <text:p text:style-name="P9"/>
      <text:p text:style-name="P9"><text:soft-page-break/>&lt;h1&gt;Header da pagina&lt;h1&gt;</text:p>
      <text:p text:style-name="P9">{children}</text:p>
      <text:p text:style-name="P10"/>
      <text:p text:style-name="P9">o h1 ficará imutavel enquanto apenas o que estiver sendo exibido pelo children mudará, ou seja, o que fica forá do children não vai mudar</text:p>
      <text:p text:style-name="P9"/>
      <text:p text:style-name="P9">arquivos forá do app não serão roteados, ou seja, não serão usados como caminhos da pagina, por isso, geralmente é colocado outros arquivos como components ou configs</text:p>
      <text:p text:style-name="P9"/>
      <text:p text:style-name="P11">links de navegação</text:p>
      <text:p text:style-name="P12"/>
      <text:p text:style-name="P12">import Link from “next/link</text:p>
      <text:p text:style-name="P12"/>
      <text:p text:style-name="P12">&lt;Link href=”/”&gt;Home&lt;Link&gt;</text:p>
      <text:p text:style-name="P9"/>
      <text:p text:style-name="P13">paginas not found </text:p>
      <text:p text:style-name="P13"/>
      <text:p text:style-name="P14">para criar um pagina not found pode ser uma global, dentro do app (é obrigatorio ter esse nome, é um nome “reservado” pelo next): </text:p>
      <text:p text:style-name="P14">not-found.tsx</text:p>
      <text:p text:style-name="P10"/>
      <text:p text:style-name="P15">Esse arquivo global irá aparecer sempre que acessar uma pagina que não existe em qualquer lugar do projeto</text:p>
      <text:p text:style-name="P4"/>
      <text:p text:style-name="P16">metadatas</text:p>
      <text:p text:style-name="P16"/>
      <text:p text:style-name="P17">são tags que melhoram o indexação do site, melhorando o ranqueamento nos buscadores. O buscador do google faz a leitura desses dados.</text:p>
      <text:p text:style-name="P17"><text:soft-page-break/>É possivel criar metadados de diversas formas, de forma estatica ou dinamica permitindo cada pagina ter uma diferente.</text:p>
      <text:p text:style-name="P17">Import { Metadata } from “next”</text:p>
      <text:p text:style-name="P17"/>
      <text:p text:style-name="P17">export const metadata: Metadata = {</text:p>
      <text:p text:style-name="P17"><text:s text:c="3"/>title: “”, ← <text:span text:style-name="T2">titulo da pagina</text:span></text:p>
      <text:p text:style-name="P18"><text:s text:c="3"/>description: “”, ← <text:span text:style-name="T2">descrição da pagina</text:span></text:p>
      <text:p text:style-name="P18"><text:s text:c="3"/><text:span text:style-name="T2">openGraph: {title: “”, description: “”, images: [“url de uma imagem”]}, </text:span>← <text:s text:c="5"/></text:p>
      <text:p text:style-name="P19"><text:s text:c="3"/>Pré-visualização quando compartilha a url em uma rede social</text:p>
      <text:p text:style-name="P19"><text:s text:c="3"/>robots: {index: true, follow: true, nocache: true, googleBot: {index: true, </text:p>
      <text:p text:style-name="P19"><text:s text:c="3"/>follow: true}}</text:p>
      <text:p text:style-name="P17">}</text:p>
      <text:p text:style-name="P17"/>
      <text:p text:style-name="P19">para tornar o metadata global basta inserir o metadata no layout.tsx ao invés de na page.tsx, caso a pagina não tenha metadata será usado a que esta no layout.tsx</text:p>
      <text:p text:style-name="P17"/>
      <text:p text:style-name="P20">server e client component</text:p>
      <text:p text:style-name="P1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1T18:11:48.475484000</meta:creation-date>
    <dc:date>2026-07-03T17:57:46.089631600</dc:date>
    <meta:editing-duration>PT40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4" meta:paragraph-count="42" meta:word-count="408" meta:character-count="2582" meta:non-whitespace-character-count="2185"/>
  </office:meta>
</office:document-meta>
</file>