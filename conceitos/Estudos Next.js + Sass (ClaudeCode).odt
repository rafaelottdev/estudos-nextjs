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2681in" fo:margin-left="0.0035in" fo:margin-top="0in" fo:margin-bottom="0in" table:align="left" style:writing-mode="page"/>
    </style:style>
    <style:style style:name="Table1.A" style:family="table-column">
      <style:table-column-properties style:column-width="2.0889in"/>
    </style:style>
    <style:style style:name="Table1.B" style:family="table-column">
      <style:table-column-properties style:column-width="2.0896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#2e74b5" fo:padding-left="0.0694in" fo:padding-right="0.0694in" fo:padding-top="0.0417in" fo:padding-bottom="0.0417in" fo:border="0.5pt solid #000000">
        <style:background-image/>
      </style:table-cell-properties>
    </style:style>
    <style:style style:name="Table1.A2" style:family="table-cell">
      <style:table-cell-properties style:vertical-align="middle" fo:padding-left="0.0694in" fo:padding-right="0.0694in" fo:padding-top="0.0417in" fo:padding-bottom="0.0417in" fo:border="0.5pt solid #000000"/>
    </style:style>
    <style:style style:name="Table1.B2" style:family="table-cell">
      <style:table-cell-properties style:vertical-align="middle" fo:padding-left="0.0694in" fo:padding-right="0.0694in" fo:padding-top="0.0417in" fo:padding-bottom="0.0417in" fo:border="0.5pt solid #000000"/>
    </style:style>
    <style:style style:name="Table1.C2" style:family="table-cell">
      <style:table-cell-properties style:vertical-align="middle" fo:padding-left="0.0694in" fo:padding-right="0.0694in" fo:padding-top="0.0417in" fo:padding-bottom="0.0417in" fo:border="0.5pt solid #000000"/>
    </style:style>
    <style:style style:name="Table1.A3" style:family="table-cell">
      <style:table-cell-properties style:vertical-align="middle" fo:padding-left="0.0694in" fo:padding-right="0.0694in" fo:padding-top="0.0417in" fo:padding-bottom="0.0417in" fo:border="0.5pt solid #000000"/>
    </style:style>
    <style:style style:name="Table1.B3" style:family="table-cell">
      <style:table-cell-properties style:vertical-align="middle" fo:padding-left="0.0694in" fo:padding-right="0.0694in" fo:padding-top="0.0417in" fo:padding-bottom="0.0417in" fo:border="0.5pt solid #000000"/>
    </style:style>
    <style:style style:name="Table1.C3" style:family="table-cell">
      <style:table-cell-properties style:vertical-align="middle" fo:padding-left="0.0694in" fo:padding-right="0.0694in" fo:padding-top="0.0417in" fo:padding-bottom="0.0417in" fo:border="0.5pt solid #000000"/>
    </style:style>
    <style:style style:name="Table1.A4" style:family="table-cell">
      <style:table-cell-properties style:vertical-align="middle" fo:padding-left="0.0694in" fo:padding-right="0.0694in" fo:padding-top="0.0417in" fo:padding-bottom="0.0417in" fo:border="0.5pt solid #000000"/>
    </style:style>
    <style:style style:name="Table1.B4" style:family="table-cell">
      <style:table-cell-properties style:vertical-align="middle" fo:padding-left="0.0694in" fo:padding-right="0.0694in" fo:padding-top="0.0417in" fo:padding-bottom="0.0417in" fo:border="0.5pt solid #000000"/>
    </style:style>
    <style:style style:name="Table1.C4" style:family="table-cell">
      <style:table-cell-properties style:vertical-align="middle" fo:padding-left="0.0694in" fo:padding-right="0.0694in" fo:padding-top="0.0417in" fo:padding-bottom="0.0417in" fo:border="0.5pt solid #000000"/>
    </style:style>
    <style:style style:name="Table1.A5" style:family="table-cell">
      <style:table-cell-properties style:vertical-align="middle" fo:padding-left="0.0694in" fo:padding-right="0.0694in" fo:padding-top="0.0417in" fo:padding-bottom="0.0417in" fo:border="0.5pt solid #000000"/>
    </style:style>
    <style:style style:name="Table1.B5" style:family="table-cell">
      <style:table-cell-properties style:vertical-align="middle" fo:padding-left="0.0694in" fo:padding-right="0.0694in" fo:padding-top="0.0417in" fo:padding-bottom="0.0417in" fo:border="0.5pt solid #000000"/>
    </style:style>
    <style:style style:name="Table1.C5" style:family="table-cell">
      <style:table-cell-properties style:vertical-align="middle" fo:padding-left="0.0694in" fo:padding-right="0.0694in" fo:padding-top="0.0417in" fo:padding-bottom="0.0417in" fo:border="0.5pt solid #000000"/>
    </style:style>
    <style:style style:name="Table2" style:family="table">
      <style:table-properties style:width="6.2681in" fo:margin-left="0.0035in" fo:margin-top="0in" fo:margin-bottom="0in" table:align="left" style:writing-mode="page"/>
    </style:style>
    <style:style style:name="Table2.A" style:family="table-column">
      <style:table-column-properties style:column-width="2.0889in"/>
    </style:style>
    <style:style style:name="Table2.B" style:family="table-column">
      <style:table-column-properties style:column-width="2.0896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background-color="#2e74b5" fo:padding-left="0.0694in" fo:padding-right="0.0694in" fo:padding-top="0.0417in" fo:padding-bottom="0.0417in" fo:border="0.5pt solid #000000">
        <style:background-image/>
      </style:table-cell-properties>
    </style:style>
    <style:style style:name="Table2.A2" style:family="table-cell">
      <style:table-cell-properties style:vertical-align="middle" fo:padding-left="0.0694in" fo:padding-right="0.0694in" fo:padding-top="0.0417in" fo:padding-bottom="0.0417in" fo:border="0.5pt solid #000000"/>
    </style:style>
    <style:style style:name="Table2.B2" style:family="table-cell">
      <style:table-cell-properties style:vertical-align="middle" fo:padding-left="0.0694in" fo:padding-right="0.0694in" fo:padding-top="0.0417in" fo:padding-bottom="0.0417in" fo:border="0.5pt solid #000000"/>
    </style:style>
    <style:style style:name="Table2.C2" style:family="table-cell">
      <style:table-cell-properties style:vertical-align="middle" fo:padding-left="0.0694in" fo:padding-right="0.0694in" fo:padding-top="0.0417in" fo:padding-bottom="0.0417in" fo:border="0.5pt solid #000000"/>
    </style:style>
    <style:style style:name="Table2.A3" style:family="table-cell">
      <style:table-cell-properties style:vertical-align="middle" fo:padding-left="0.0694in" fo:padding-right="0.0694in" fo:padding-top="0.0417in" fo:padding-bottom="0.0417in" fo:border="0.5pt solid #000000"/>
    </style:style>
    <style:style style:name="Table2.B3" style:family="table-cell">
      <style:table-cell-properties style:vertical-align="middle" fo:padding-left="0.0694in" fo:padding-right="0.0694in" fo:padding-top="0.0417in" fo:padding-bottom="0.0417in" fo:border="0.5pt solid #000000"/>
    </style:style>
    <style:style style:name="Table2.C3" style:family="table-cell">
      <style:table-cell-properties style:vertical-align="middle" fo:padding-left="0.0694in" fo:padding-right="0.0694in" fo:padding-top="0.0417in" fo:padding-bottom="0.0417in" fo:border="0.5pt solid #000000"/>
    </style:style>
    <style:style style:name="Table2.A4" style:family="table-cell">
      <style:table-cell-properties style:vertical-align="middle" fo:padding-left="0.0694in" fo:padding-right="0.0694in" fo:padding-top="0.0417in" fo:padding-bottom="0.0417in" fo:border="0.5pt solid #000000"/>
    </style:style>
    <style:style style:name="Table2.B4" style:family="table-cell">
      <style:table-cell-properties style:vertical-align="middle" fo:padding-left="0.0694in" fo:padding-right="0.0694in" fo:padding-top="0.0417in" fo:padding-bottom="0.0417in" fo:border="0.5pt solid #000000"/>
    </style:style>
    <style:style style:name="Table2.C4" style:family="table-cell">
      <style:table-cell-properties style:vertical-align="middle" fo:padding-left="0.0694in" fo:padding-right="0.0694in" fo:padding-top="0.0417in" fo:padding-bottom="0.0417in" fo:border="0.5pt solid #000000"/>
    </style:style>
    <style:style style:name="Table2.A5" style:family="table-cell">
      <style:table-cell-properties style:vertical-align="middle" fo:padding-left="0.0694in" fo:padding-right="0.0694in" fo:padding-top="0.0417in" fo:padding-bottom="0.0417in" fo:border="0.5pt solid #000000"/>
    </style:style>
    <style:style style:name="Table2.B5" style:family="table-cell">
      <style:table-cell-properties style:vertical-align="middle" fo:padding-left="0.0694in" fo:padding-right="0.0694in" fo:padding-top="0.0417in" fo:padding-bottom="0.0417in" fo:border="0.5pt solid #000000"/>
    </style:style>
    <style:style style:name="Table2.C5" style:family="table-cell">
      <style:table-cell-properties style:vertical-align="middle" fo:padding-left="0.0694in" fo:padding-right="0.0694in" fo:padding-top="0.0417in" fo:padding-bottom="0.0417in" fo:border="0.5pt solid #000000"/>
    </style:style>
    <style:style style:name="Table3" style:family="table">
      <style:table-properties style:width="6.2681in" fo:margin-left="0.0035in" fo:margin-top="0in" fo:margin-bottom="0in" table:align="left" style:writing-mode="page"/>
    </style:style>
    <style:style style:name="Table3.A" style:family="table-column">
      <style:table-column-properties style:column-width="3.134in"/>
    </style:style>
    <style:style style:name="Table3.B" style:family="table-column">
      <style:table-column-properties style:column-width="3.1333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background-color="#2e74b5" fo:padding-left="0.0694in" fo:padding-right="0.0694in" fo:padding-top="0.0417in" fo:padding-bottom="0.0417in" fo:border="0.5pt solid #000000">
        <style:background-image/>
      </style:table-cell-properties>
    </style:style>
    <style:style style:name="Table3.A2" style:family="table-cell">
      <style:table-cell-properties style:vertical-align="middle" fo:padding-left="0.0694in" fo:padding-right="0.0694in" fo:padding-top="0.0417in" fo:padding-bottom="0.0417in" fo:border="0.5pt solid #000000"/>
    </style:style>
    <style:style style:name="Table3.B2" style:family="table-cell">
      <style:table-cell-properties style:vertical-align="middle" fo:padding-left="0.0694in" fo:padding-right="0.0694in" fo:padding-top="0.0417in" fo:padding-bottom="0.0417in" fo:border="0.5pt solid #000000"/>
    </style:style>
    <style:style style:name="Table3.A3" style:family="table-cell">
      <style:table-cell-properties style:vertical-align="middle" fo:padding-left="0.0694in" fo:padding-right="0.0694in" fo:padding-top="0.0417in" fo:padding-bottom="0.0417in" fo:border="0.5pt solid #000000"/>
    </style:style>
    <style:style style:name="Table3.B3" style:family="table-cell">
      <style:table-cell-properties style:vertical-align="middle" fo:padding-left="0.0694in" fo:padding-right="0.0694in" fo:padding-top="0.0417in" fo:padding-bottom="0.0417in" fo:border="0.5pt solid #000000"/>
    </style:style>
    <style:style style:name="Table3.A4" style:family="table-cell">
      <style:table-cell-properties style:vertical-align="middle" fo:padding-left="0.0694in" fo:padding-right="0.0694in" fo:padding-top="0.0417in" fo:padding-bottom="0.0417in" fo:border="0.5pt solid #000000"/>
    </style:style>
    <style:style style:name="Table3.B4" style:family="table-cell">
      <style:table-cell-properties style:vertical-align="middle" fo:padding-left="0.0694in" fo:padding-right="0.0694in" fo:padding-top="0.0417in" fo:padding-bottom="0.0417in" fo:border="0.5pt solid #000000"/>
    </style:style>
    <style:style style:name="Table3.A5" style:family="table-cell">
      <style:table-cell-properties style:vertical-align="middle" fo:padding-left="0.0694in" fo:padding-right="0.0694in" fo:padding-top="0.0417in" fo:padding-bottom="0.0417in" fo:border="0.5pt solid #000000"/>
    </style:style>
    <style:style style:name="Table3.B5" style:family="table-cell">
      <style:table-cell-properties style:vertical-align="middle" fo:padding-left="0.0694in" fo:padding-right="0.0694in" fo:padding-top="0.0417in" fo:padding-bottom="0.0417in" fo:border="0.5pt solid #000000"/>
    </style:style>
    <style:style style:name="Table3.A6" style:family="table-cell">
      <style:table-cell-properties style:vertical-align="middle" fo:padding-left="0.0694in" fo:padding-right="0.0694in" fo:padding-top="0.0417in" fo:padding-bottom="0.0417in" fo:border="0.5pt solid #000000"/>
    </style:style>
    <style:style style:name="Table3.B6" style:family="table-cell">
      <style:table-cell-properties style:vertical-align="middle" fo:padding-left="0.0694in" fo:padding-right="0.0694in" fo:padding-top="0.0417in" fo:padding-bottom="0.0417in" fo:border="0.5pt solid #000000"/>
    </style:style>
    <style:style style:name="Table4" style:family="table">
      <style:table-properties style:width="6.2681in" fo:margin-left="0.0035in" fo:margin-top="0in" fo:margin-bottom="0in" table:align="left" style:writing-mode="page"/>
    </style:style>
    <style:style style:name="Table4.A" style:family="table-column">
      <style:table-column-properties style:column-width="1.5667in"/>
    </style:style>
    <style:style style:name="Table4.B" style:family="table-column">
      <style:table-column-properties style:column-width="1.5674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middle" fo:background-color="#2e74b5" fo:padding-left="0.0694in" fo:padding-right="0.0694in" fo:padding-top="0.0417in" fo:padding-bottom="0.0417in" fo:border="0.5pt solid #000000">
        <style:background-image/>
      </style:table-cell-properties>
    </style:style>
    <style:style style:name="Table4.A2" style:family="table-cell">
      <style:table-cell-properties style:vertical-align="middle" fo:padding-left="0.0694in" fo:padding-right="0.0694in" fo:padding-top="0.0417in" fo:padding-bottom="0.0417in" fo:border="0.5pt solid #000000"/>
    </style:style>
    <style:style style:name="Table4.B2" style:family="table-cell">
      <style:table-cell-properties style:vertical-align="middle" fo:padding-left="0.0694in" fo:padding-right="0.0694in" fo:padding-top="0.0417in" fo:padding-bottom="0.0417in" fo:border="0.5pt solid #000000"/>
    </style:style>
    <style:style style:name="Table4.C2" style:family="table-cell">
      <style:table-cell-properties style:vertical-align="middle" fo:padding-left="0.0694in" fo:padding-right="0.0694in" fo:padding-top="0.0417in" fo:padding-bottom="0.0417in" fo:border="0.5pt solid #000000"/>
    </style:style>
    <style:style style:name="Table4.D2" style:family="table-cell">
      <style:table-cell-properties style:vertical-align="middle" fo:padding-left="0.0694in" fo:padding-right="0.0694in" fo:padding-top="0.0417in" fo:padding-bottom="0.0417in" fo:border="0.5pt solid #000000"/>
    </style:style>
    <style:style style:name="Table4.A3" style:family="table-cell">
      <style:table-cell-properties style:vertical-align="middle" fo:padding-left="0.0694in" fo:padding-right="0.0694in" fo:padding-top="0.0417in" fo:padding-bottom="0.0417in" fo:border="0.5pt solid #000000"/>
    </style:style>
    <style:style style:name="Table4.B3" style:family="table-cell">
      <style:table-cell-properties style:vertical-align="middle" fo:padding-left="0.0694in" fo:padding-right="0.0694in" fo:padding-top="0.0417in" fo:padding-bottom="0.0417in" fo:border="0.5pt solid #000000"/>
    </style:style>
    <style:style style:name="Table4.C3" style:family="table-cell">
      <style:table-cell-properties style:vertical-align="middle" fo:padding-left="0.0694in" fo:padding-right="0.0694in" fo:padding-top="0.0417in" fo:padding-bottom="0.0417in" fo:border="0.5pt solid #000000"/>
    </style:style>
    <style:style style:name="Table4.D3" style:family="table-cell">
      <style:table-cell-properties style:vertical-align="middle" fo:padding-left="0.0694in" fo:padding-right="0.0694in" fo:padding-top="0.0417in" fo:padding-bottom="0.0417in" fo:border="0.5pt solid #000000"/>
    </style:style>
    <style:style style:name="Table5" style:family="table">
      <style:table-properties style:width="6.2681in" fo:margin-left="0.0035in" fo:margin-top="0in" fo:margin-bottom="0in" table:align="left" style:writing-mode="page"/>
    </style:style>
    <style:style style:name="Table5.A" style:family="table-column">
      <style:table-column-properties style:column-width="2.0889in"/>
    </style:style>
    <style:style style:name="Table5.B" style:family="table-column">
      <style:table-column-properties style:column-width="2.0896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middle" fo:background-color="#2e74b5" fo:padding-left="0.0694in" fo:padding-right="0.0694in" fo:padding-top="0.0417in" fo:padding-bottom="0.0417in" fo:border="0.5pt solid #000000">
        <style:background-image/>
      </style:table-cell-properties>
    </style:style>
    <style:style style:name="Table5.A2" style:family="table-cell">
      <style:table-cell-properties style:vertical-align="middle" fo:padding-left="0.0694in" fo:padding-right="0.0694in" fo:padding-top="0.0417in" fo:padding-bottom="0.0417in" fo:border="0.5pt solid #000000"/>
    </style:style>
    <style:style style:name="Table5.B2" style:family="table-cell">
      <style:table-cell-properties style:vertical-align="middle" fo:padding-left="0.0694in" fo:padding-right="0.0694in" fo:padding-top="0.0417in" fo:padding-bottom="0.0417in" fo:border="0.5pt solid #000000"/>
    </style:style>
    <style:style style:name="Table5.C2" style:family="table-cell">
      <style:table-cell-properties style:vertical-align="middle" fo:padding-left="0.0694in" fo:padding-right="0.0694in" fo:padding-top="0.0417in" fo:padding-bottom="0.0417in" fo:border="0.5pt solid #000000"/>
    </style:style>
    <style:style style:name="Table5.A3" style:family="table-cell">
      <style:table-cell-properties style:vertical-align="middle" fo:padding-left="0.0694in" fo:padding-right="0.0694in" fo:padding-top="0.0417in" fo:padding-bottom="0.0417in" fo:border="0.5pt solid #000000"/>
    </style:style>
    <style:style style:name="Table5.B3" style:family="table-cell">
      <style:table-cell-properties style:vertical-align="middle" fo:padding-left="0.0694in" fo:padding-right="0.0694in" fo:padding-top="0.0417in" fo:padding-bottom="0.0417in" fo:border="0.5pt solid #000000"/>
    </style:style>
    <style:style style:name="Table5.C3" style:family="table-cell">
      <style:table-cell-properties style:vertical-align="middle" fo:padding-left="0.0694in" fo:padding-right="0.0694in" fo:padding-top="0.0417in" fo:padding-bottom="0.0417in" fo:border="0.5pt solid #000000"/>
    </style:style>
    <style:style style:name="Table5.A4" style:family="table-cell">
      <style:table-cell-properties style:vertical-align="middle" fo:padding-left="0.0694in" fo:padding-right="0.0694in" fo:padding-top="0.0417in" fo:padding-bottom="0.0417in" fo:border="0.5pt solid #000000"/>
    </style:style>
    <style:style style:name="Table5.B4" style:family="table-cell">
      <style:table-cell-properties style:vertical-align="middle" fo:padding-left="0.0694in" fo:padding-right="0.0694in" fo:padding-top="0.0417in" fo:padding-bottom="0.0417in" fo:border="0.5pt solid #000000"/>
    </style:style>
    <style:style style:name="Table5.C4" style:family="table-cell">
      <style:table-cell-properties style:vertical-align="middle" fo:padding-left="0.0694in" fo:padding-right="0.0694in" fo:padding-top="0.0417in" fo:padding-bottom="0.0417in" fo:border="0.5pt solid #000000"/>
    </style:style>
    <style:style style:name="P1" style:family="paragraph" style:parent-style-name="Heading_20_1">
      <style:paragraph-properties fo:break-before="page"/>
    </style:style>
    <style:style style:name="P2" style:family="paragraph" style:parent-style-name="Heading_20_1">
      <style:paragraph-properties fo:margin-top="0.139in" fo:margin-bottom="0.139in" style:contextual-spacing="false" fo:break-before="page"/>
    </style:style>
    <style:style style:name="P3" style:family="paragraph" style:parent-style-name="Heading_20_3">
      <style:paragraph-properties fo:margin-top="0.139in" fo:margin-bottom="0.0693in" style:contextual-spacing="false"/>
    </style:style>
    <style:style style:name="P4" style:family="paragraph" style:parent-style-name="List_20_Paragraph" style:list-style-name="WWNum1">
      <style:paragraph-properties fo:margin-top="0in" fo:margin-bottom="0.0555in" style:contextual-spacing="false"/>
    </style:style>
    <style:style style:name="P5" style:family="paragraph" style:parent-style-name="Standard">
      <style:paragraph-properties fo:margin-top="1.6665in" fo:margin-bottom="0in" style:contextual-spacing="false"/>
    </style:style>
    <style:style style:name="P6" style:family="paragraph" style:parent-style-name="Standard">
      <style:paragraph-properties fo:margin-top="0in" fo:margin-bottom="0.278in" style:contextual-spacing="false" fo:text-align="center" style:justify-single-word="false"/>
    </style:style>
    <style:style style:name="P7" style:family="paragraph" style:parent-style-name="Standard">
      <style:paragraph-properties fo:margin-top="0.2083in" fo:margin-bottom="0in" style:contextual-spacing="false" fo:text-align="center" style:justify-single-word="false"/>
    </style:style>
    <style:style style:name="P8" style:family="paragraph" style:parent-style-name="Standard">
      <style:paragraph-properties fo:margin-top="0in" fo:margin-bottom="0.111in" style:contextual-spacing="false">
        <style:tab-stops>
          <style:tab-stop style:position="6.2681in" style:type="right" style:leader-style="dotted" style:leader-text="."/>
        </style:tab-stops>
      </style:paragraph-properties>
    </style:style>
    <style:style style:name="P9" style:family="paragraph" style:parent-style-name="Standard">
      <loext:graphic-properties draw:fill="solid" draw:fill-color="#e8f1fc"/>
      <style:paragraph-properties fo:margin-top="0.139in" fo:margin-bottom="0.0555in" style:contextual-spacing="false" fo:background-color="#e8f1fc" fo:padding-left="0.111in" fo:padding-right="0in" fo:padding-top="0in" fo:padding-bottom="0in" fo:border-left="3pt solid #2e74b5" fo:border-right="none" fo:border-top="none" fo:border-bottom="none"/>
    </style:style>
    <style:style style:name="P10" style:family="paragraph" style:parent-style-name="Standard">
      <loext:graphic-properties draw:fill="solid" draw:fill-color="#e8f1fc"/>
      <style:paragraph-properties fo:margin-top="0in" fo:margin-bottom="0.139in" style:contextual-spacing="false" fo:background-color="#e8f1fc" fo:padding-left="0.111in" fo:padding-right="0in" fo:padding-top="0in" fo:padding-bottom="0in" fo:border-left="3pt solid #2e74b5" fo:border-right="none" fo:border-top="none" fo:border-bottom="none"/>
    </style:style>
    <style:style style:name="P11" style:family="paragraph" style:parent-style-name="Standard">
      <style:paragraph-properties fo:margin-top="0.0693in" fo:margin-bottom="0.0835in" style:contextual-spacing="false"/>
    </style:style>
    <style:style style:name="P12" style:family="paragraph" style:parent-style-name="Standard">
      <style:paragraph-properties fo:margin-top="0in" fo:margin-bottom="0.111in" style:contextual-spacing="false"/>
    </style:style>
    <style:style style:name="P13" style:family="paragraph" style:parent-style-name="Standard">
      <loext:graphic-properties draw:fill="solid" draw:fill-color="#ededed"/>
      <style:paragraph-properties fo:margin-top="0in" fo:margin-bottom="0in" style:contextual-spacing="false" fo:line-height="0.1665in" fo:background-color="#ededed" fo:padding-left="0.0835in" fo:padding-right="0in" fo:padding-top="0in" fo:padding-bottom="0in" fo:border-left="1.5pt solid #cccccc" fo:border-right="none" fo:border-top="none" fo:border-bottom="none"/>
    </style:style>
    <style:style style:name="P14" style:family="paragraph" style:parent-style-name="Standard">
      <style:paragraph-properties fo:margin-top="0in" fo:margin-bottom="0.0835in" style:contextual-spacing="false"/>
    </style:style>
    <style:style style:name="P15" style:family="paragraph" style:parent-style-name="Title">
      <style:paragraph-properties fo:text-align="center" style:justify-single-word="false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color="#555555" loext:opacity="100%" fo:font-size="12pt" fo:font-style="italic" style:font-size-asian="12pt" style:font-style-asian="italic" style:font-size-complex="12pt" style:font-style-complex="italic"/>
    </style:style>
    <style:style style:name="T3" style:family="text">
      <style:text-properties fo:color="#2e74b5" loext:opacity="100%" style:text-underline-style="solid" style:text-underline-width="auto" style:text-underline-color="font-color"/>
    </style:style>
    <style:style style:name="T4" style:family="text">
      <style:text-properties fo:color="#2e74b5" loext:opacity="100%"/>
    </style:style>
    <style:style style:name="T5" style:family="text">
      <style:text-properties fo:color="#2e74b5" loext:opacity="100%" fo:font-weight="bold" style:font-weight-asian="bold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color="#2e7d32" loext:opacity="100%" fo:font-size="12pt" fo:font-weight="bold" style:font-size-asian="12pt" style:font-weight-asian="bold" style:font-size-complex="12pt" style:font-weight-complex="bol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style:font-name="Consolas" fo:font-size="9pt" style:font-name-asian="Consolas1" style:font-size-asian="9pt" style:font-name-complex="Consolas1" style:font-size-complex="9pt"/>
    </style:style>
    <style:style style:name="T10" style:family="text">
      <style:text-properties fo:color="#ffffff" loext:opacity="100%" fo:font-size="10pt" fo:font-weight="bold" style:font-size-asian="10pt" style:font-weight-asian="bold" style:font-size-complex="10pt" style:font-weight-complex="bold"/>
    </style:style>
    <style:style style:name="T11" style:family="text">
      <style:text-properties fo:font-size="10pt" fo:font-weight="normal" style:font-size-asian="10pt" style:font-weight-asian="normal" style:font-size-complex="10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ext:p text:style-name="P6"><text:span text:style-name="T1">📖</text:span></text:p>
      <text:p text:style-name="P15">Estudos Next.js + Sass</text:p>
      <text:p text:style-name="P7"><text:span text:style-name="T2">Guia de consulta — configuração, arquitetura Sass e boas práticas em projetos Next.js</text:span></text:p>
      <text:p text:style-name="P1">Índice</text:p>
      <text:p text:style-name="P8"><text:a xlink:type="simple" xlink:href="#sec1" text:style-name="ListLabel_20_11" text:visited-style-name="ListLabel_20_11"><text:span text:style-name="T3">1. Configuração inicial: Sass no Next.js</text:span><text:span text:style-name="T4">3</text:span></text:a></text:p>
      <text:p text:style-name="P8"><text:a xlink:type="simple" xlink:href="#sec2" text:style-name="ListLabel_20_11" text:visited-style-name="ListLabel_20_11"><text:span text:style-name="T3">2. Como o Next.js decide quais arquivos Sass compilar</text:span><text:span text:style-name="T4">5</text:span></text:a></text:p>
      <text:p text:style-name="P8"><text:a xlink:type="simple" xlink:href="#sec3" text:style-name="ListLabel_20_11" text:visited-style-name="ListLabel_20_11"><text:span text:style-name="T3">3. Combinando Tailwind e Sass no mesmo projeto</text:span><text:span text:style-name="T4">6</text:span></text:a></text:p>
      <text:p text:style-name="P8"><text:a xlink:type="simple" xlink:href="#sec4" text:style-name="ListLabel_20_11" text:visited-style-name="ListLabel_20_11"><text:span text:style-name="T3">4. Customizando o Tailwind com tokens do projeto</text:span><text:span text:style-name="T4">8</text:span></text:a></text:p>
      <text:p text:style-name="P8"><text:a xlink:type="simple" xlink:href="#sec5" text:style-name="ListLabel_20_11" text:visited-style-name="ListLabel_20_11"><text:span text:style-name="T3">5. Usando Bootstrap no lugar do Tailwind</text:span><text:span text:style-name="T4">10</text:span></text:a></text:p>
      <text:p text:style-name="P8"><text:a xlink:type="simple" xlink:href="#sec6" text:style-name="ListLabel_20_11" text:visited-style-name="ListLabel_20_11"><text:span text:style-name="T3">6. Tailwind é a única forma "certa" de estilizar no Next.js?</text:span><text:span text:style-name="T4">12</text:span></text:a></text:p>
      <text:p text:style-name="P8"><text:a xlink:type="simple" xlink:href="#sec7" text:style-name="ListLabel_20_11" text:visited-style-name="ListLabel_20_11"><text:span text:style-name="T3">7. Estrutura completa de projeto Next.js + Sass</text:span><text:span text:style-name="T4">13</text:span></text:a></text:p>
      <text:p text:style-name="P8"><text:a xlink:type="simple" xlink:href="#sec8" text:style-name="ListLabel_20_11" text:visited-style-name="ListLabel_20_11"><text:span text:style-name="T3">8. O que é o _tokens.scss</text:span><text:span text:style-name="T4">19</text:span></text:a></text:p>
      <text:p text:style-name="P8"><text:a xlink:type="simple" xlink:href="#sec9" text:style-name="ListLabel_20_11" text:visited-style-name="ListLabel_20_11"><text:span text:style-name="T3">9. Por que themes/_index.scss usa @forward para tokens e @use para light/dark</text:span><text:span text:style-name="T4">20</text:span></text:a></text:p>
      <text:p text:style-name="P8"><text:a xlink:type="simple" xlink:href="#sec10" text:style-name="ListLabel_20_11" text:visited-style-name="ListLabel_20_11"><text:span text:style-name="T3">10. Onde o _index.scss de themes é importado</text:span><text:span text:style-name="T4">21</text:span></text:a></text:p>
      <text:p text:style-name="P8"><text:a xlink:type="simple" xlink:href="#sec11" text:style-name="ListLabel_20_11" text:visited-style-name="ListLabel_20_11"><text:span text:style-name="T3">11. Por que o globals.scss não importa o abstracts</text:span><text:span text:style-name="T4">22</text:span></text:a></text:p>
      <text:p text:style-name="P8"><text:a xlink:type="simple" xlink:href="#sec12" text:style-name="ListLabel_20_11" text:visited-style-name="ListLabel_20_11"><text:span text:style-name="T3">12. Confirmando: cada .module.scss precisa importar abstracts com @use</text:span><text:span text:style-name="T4">23</text:span></text:a></text:p>
      <text:p text:style-name="P8"><text:a xlink:type="simple" xlink:href="#sec13" text:style-name="ListLabel_20_11" text:visited-style-name="ListLabel_20_11"><text:span text:style-name="T3">13. Localização do globals.scss e estilização do app/page.tsx</text:span><text:span text:style-name="T4">24</text:span></text:a></text:p>
      <text:p text:style-name="P8"><text:a xlink:type="simple" xlink:href="#sec14" text:style-name="ListLabel_20_11" text:visited-style-name="ListLabel_20_11"><text:span text:style-name="T3">14. O que é o lib/theme.ts</text:span><text:span text:style-name="T4">26</text:span></text:a></text:p>
      <text:p text:style-name="P2"><text:bookmark-start text:name="sec1"/>1. Configuração inicial: Sass no Next.js<text:bookmark-end text:name="sec1"/></text:p>
      <text:p text:style-name="P9"><text:span text:style-name="T5">👤 Pergunta do usuário</text:span></text:p>
      <text:p text:style-name="P10"><text:span text:style-name="T6">Qual a melhor forma de utilizar sass junto ao nextjs</text:span></text:p>
      <text:p text:style-name="P11"><text:span text:style-name="T7">🤖 Resposta</text:span></text:p>
      <text:p text:style-name="P12"><text:span text:style-name="T8">O Next.js tem suporte nativo ao Sass, então a configuração é bem simples.</text:span></text:p>
      <text:p text:style-name="P3">1. Instalação</text:p>
      <text:p text:style-name="P12"><text:span text:style-name="T8">Só precisa instalar o compilador Sass (não precisa de plugins adicionais):</text:span></text:p>
      <text:p text:style-name="P13"><text:span text:style-name="T9">npm install sass</text:span></text:p>
      <text:p text:style-name="P12"><text:span text:style-name="T8">O Next.js detecta automaticamente arquivos .scss e .sass a partir daí.</text:span></text:p>
      <text:p text:style-name="P3">2. Estilos globais</text:p>
      <text:p text:style-name="P12"><text:span text:style-name="T8">Em app/globals.scss (App Router) ou styles/globals.scss (Pages Router), importe normalmente no arquivo de layout raiz:</text:span></text:p>
      <text:p text:style-name="P13"><text:span text:style-name="T9">// app/layout.jsx</text:span></text:p>
      <text:p text:style-name="P13"><text:span text:style-name="T9">import './globals.scss'</text:span></text:p>
      <text:p text:style-name="P3">3. CSS Modules com Sass (recomendado para componentes)</text:p>
      <text:p text:style-name="P12"><text:span text:style-name="T8">Essa é a forma mais idiomática no Next.js — escopo local automático, evita conflito de classes:</text:span></text:p>
      <text:p text:style-name="P13"><text:span text:style-name="T9">Button.module.scss</text:span></text:p>
      <text:p text:style-name="P13"><text:span text:style-name="T9">.button {</text:span></text:p>
      <text:p text:style-name="P13"><text:span text:style-name="T9"><text:s text:c="2"/>padding: 8px 16px;</text:span></text:p>
      <text:p text:style-name="P13"><text:span text:style-name="T9"><text:s/></text:span></text:p>
      <text:p text:style-name="P13"><text:span text:style-name="T9"><text:s text:c="2"/>&amp;:hover {</text:span></text:p>
      <text:p text:style-name="P13"><text:span text:style-name="T9"><text:s text:c="4"/>opacity: 0.8;</text:span></text:p>
      <text:p text:style-name="P13"><text:soft-page-break/><text:span text:style-name="T9"><text:s text:c="2"/>}</text:span></text:p>
      <text:p text:style-name="P13"><text:span text:style-name="T9">}</text:span></text:p>
      <text:p text:style-name="P13"><text:span text:style-name="T9">import styles from './Button.module.scss'</text:span></text:p>
      <text:p text:style-name="P13"><text:span text:style-name="T9"><text:s/></text:span></text:p>
      <text:p text:style-name="P13"><text:span text:style-name="T9">export default function Button() {</text:span></text:p>
      <text:p text:style-name="P13"><text:span text:style-name="T9"><text:s text:c="2"/>return &lt;button className={styles.button}&gt;Clique&lt;/button&gt;</text:span></text:p>
      <text:p text:style-name="P13"><text:span text:style-name="T9">}</text:span></text:p>
      <text:p text:style-name="P3">4. Variáveis e partials compartilhados</text:p>
      <text:p text:style-name="P12"><text:span text:style-name="T8">Crie um arquivo de variáveis/mixins e importe onde precisar:</text:span></text:p>
      <text:p text:style-name="P13"><text:span text:style-name="T9">// styles/_variables.scss</text:span></text:p>
      <text:p text:style-name="P13"><text:span text:style-name="T9">$primary-color: #0070f3;</text:span></text:p>
      <text:p text:style-name="P13"><text:span text:style-name="T9">$breakpoint-md: 768px;</text:span></text:p>
      <text:p text:style-name="P13"><text:span text:style-name="T9">// Button.module.scss</text:span></text:p>
      <text:p text:style-name="P13"><text:span text:style-name="T9">@use '../styles/variables' as vars;</text:span></text:p>
      <text:p text:style-name="P13"><text:span text:style-name="T9"><text:s/></text:span></text:p>
      <text:p text:style-name="P13"><text:span text:style-name="T9">.button {</text:span></text:p>
      <text:p text:style-name="P13"><text:span text:style-name="T9"><text:s text:c="2"/>background: vars.$primary-color;</text:span></text:p>
      <text:p text:style-name="P13"><text:span text:style-name="T9">}</text:span></text:p>
      <text:p text:style-name="P12"><text:span text:style-name="T8">Prefira @use/@forward em vez de @import (que está depreciado no Dart Sass).</text:span></text:p>
      <text:p text:style-name="P3">5. Configurar paths de import (opcional, mas útil)</text:p>
      <text:p text:style-name="P12"><text:span text:style-name="T8">Se você tem uma pasta styles/ e quer importar sem ../../../, configure no next.config.js:</text:span></text:p>
      <text:p text:style-name="P13"><text:soft-page-break/><text:span text:style-name="T9">// next.config.js</text:span></text:p>
      <text:p text:style-name="P13"><text:span text:style-name="T9">module.exports = {</text:span></text:p>
      <text:p text:style-name="P13"><text:span text:style-name="T9"><text:s text:c="2"/>sassOptions: {</text:span></text:p>
      <text:p text:style-name="P13"><text:span text:style-name="T9"><text:s text:c="4"/>includePaths: ['./styles'],</text:span></text:p>
      <text:p text:style-name="P13"><text:span text:style-name="T9"><text:s text:c="2"/>},</text:span></text:p>
      <text:p text:style-name="P13"><text:span text:style-name="T9">}</text:span></text:p>
      <text:p text:style-name="P12"><text:span text:style-name="T8">Aí você importa direto: @use 'variables' as vars;</text:span></text:p>
      <text:p text:style-name="P3">Boas práticas gerais</text:p>
      <text:list text:style-name="WWNum1">
        <text:list-item text:start-value="1">
          <text:p text:style-name="P4">Componentes → .module.scss: evita vazamento de estilo entre componentes.</text:p>
        </text:list-item>
        <text:list-item>
          <text:p text:style-name="P4">Global → só para reset, tipografia base e coisas realmente globais.</text:p>
        </text:list-item>
        <text:list-item>
          <text:p text:style-name="P4">Variáveis/mixins em partials (_nome.scss, com underscore) para não gerar CSS solto.</text:p>
        </text:list-item>
        <text:list-item>
          <text:p text:style-name="P4">Se o projeto usa Tailwind também, dá pra combinar, mas geralmente vale escolher um "motor" principal para não duplicar responsabilidade.</text:p>
        </text:list-item>
        <text:list-item>
          <text:p text:style-name="P4">Sass só funciona em arquivos importados por componentes React/JS — não dá pra usar em arquivos fora da árvore de import do Next.</text:p>
        </text:list-item>
      </text:list>
      <text:p text:style-name="P2"><text:bookmark-start text:name="sec2"/>2. Como o Next.js decide quais arquivos Sass compilar<text:bookmark-end text:name="sec2"/></text:p>
      <text:p text:style-name="P9"><text:span text:style-name="T5">👤 Pergunta do usuário</text:span></text:p>
      <text:p text:style-name="P10"><text:span text:style-name="T6">primeiro: não entendi essa ultima "Sass só funciona em arquivos importados por componentes React/JS — não dá pra usar em arquivos fora da árvore de import do Next."</text:span></text:p>
      <text:p text:style-name="P11"><text:span text:style-name="T7">🤖 Resposta</text:span></text:p>
      <text:p text:style-name="P3">O que isso significa</text:p>
      <text:p text:style-name="P12"><text:span text:style-name="T8">O Next.js não "varre a pasta toda" procurando arquivos .scss para compilar. Ele só processa um arquivo Sass se esse arquivo estiver conectado por uma cadeia de imports que começa em algum arquivo .js/.jsx/.tsx que o Next realmente carrega (uma página, um layout, um componente usado em algum lugar).</text:span></text:p>
      <text:p text:style-name="P3">Exemplo prático</text:p>
      <text:p text:style-name="P12"><text:span text:style-name="T8">Se você criar isso:</text:span></text:p>
      <text:p text:style-name="P13"><text:span text:style-name="T9">styles/</text:span></text:p>
      <text:p text:style-name="P13"><text:span text:style-name="T9"><text:s text:c="2"/>solto.scss <text:s text:c="2"/>← ninguém importa esse arquivo</text:span></text:p>
      <text:p text:style-name="P12"><text:span text:style-name="T8">Esse arquivo nunca vai virar CSS. Ele fica ali parado, o Next simplesmente ignora, porque nenhum componente faz import './solto.scss'.</text:span></text:p>
      <text:p text:style-name="P12"><text:span text:style-name="T8">Já isso aqui funciona:</text:span></text:p>
      <text:p text:style-name="P13"><text:span text:style-name="T9">// app/page.jsx</text:span></text:p>
      <text:p text:style-name="P13"><text:span text:style-name="T9">import './solto.scss' <text:s text:c="2"/>// agora está "na árvore"</text:span></text:p>
      <text:p text:style-name="P13"><text:span text:style-name="T9"><text:s/></text:span></text:p>
      <text:p text:style-name="P13"><text:span text:style-name="T9">export default function Page() {</text:span></text:p>
      <text:p text:style-name="P13"><text:span text:style-name="T9"><text:s text:c="2"/>return &lt;div&gt;Oi&lt;/div&gt;</text:span></text:p>
      <text:p text:style-name="P13"><text:span text:style-name="T9">}</text:span></text:p>
      <text:p text:style-name="P12"><text:span text:style-name="T8">Ou de forma indireta, via cadeia de imports:</text:span></text:p>
      <text:p text:style-name="P13"><text:span text:style-name="T9">page.jsx → importa Button.jsx → importa Button.module.scss</text:span></text:p>
      <text:p text:style-name="P12"><text:span text:style-name="T8">O Next segue esse caminho e por isso compila o Sass. Se em algum ponto dessa cadeia não existir um import, o arquivo fica "órfão" e é ignorado no build.</text:span></text:p>
      <text:p text:style-name="P3"><text:soft-page-break/>Por que isso importa na prática</text:p>
      <text:list text:continue-numbering="true" text:style-name="WWNum1">
        <text:list-item>
          <text:p text:style-name="P4">Um arquivo de variáveis/mixins (tipo _variables.scss) não precisa estar na árvore sozinho — ele é usado via @use dentro de outro .scss que já está na árvore. Isso conta como "conectado".</text:p>
        </text:list-item>
        <text:list-item>
          <text:p text:style-name="P4">Se você criar um .scss pensando "depois eu uso", ele não vai gerar nenhum CSS até que algo realmente o importe.</text:p>
        </text:list-item>
        <text:list-item>
          <text:p text:style-name="P4">Diferente de colocar um .css solto na pasta public/ e linkar via tag &lt;link&gt; no HTML — isso é outro mecanismo (arquivo estático servido direto), não passa pelo compilador Sass do Next.</text:p>
        </text:list-item>
      </text:list>
      <text:p text:style-name="P2"><text:bookmark-start text:name="sec3"/>3. Combinando Tailwind e Sass no mesmo projeto<text:bookmark-end text:name="sec3"/></text:p>
      <text:p text:style-name="P9"><text:span text:style-name="T5">👤 Pergunta do usuário</text:span></text:p>
      <text:p text:style-name="P10"><text:span text:style-name="T6">segundo: explique melhor isso "Se o projeto usa Tailwind também, dá pra combinar, mas geralmente vale escolher um 'motor' principal para não duplicar responsabilidade (ex: Tailwind para utilitários, Sass só para casos específicos)."</text:span></text:p>
      <text:p text:style-name="P11"><text:span text:style-name="T7">🤖 Resposta</text:span></text:p>
      <text:p text:style-name="P3">O problema de fundo</text:p>
      <text:p text:style-name="P12"><text:span text:style-name="T8">Tailwind e Sass resolvem o "mesmo problema" (estilização) de formas filosoficamente opostas:</text:span></text:p>
      <text:list text:continue-numbering="true" text:style-name="WWNum1">
        <text:list-item>
          <text:p text:style-name="P4">Tailwind: você escreve o estilo inline, via classes utilitárias, direto no JSX. Não existe "arquivo de CSS do componente" — o estilo vive junto com o markup.</text:p>
        </text:list-item>
        <text:list-item>
          <text:p text:style-name="P4">Sass: você escreve o estilo separado, em arquivo .scss, com seletores, aninhamento, variáveis próprias do Sass (mixins, etc).</text:p>
        </text:list-item>
      </text:list>
      <text:p text:style-name="P13"><text:span text:style-name="T9">&lt;button className="px-4 py-2 bg-blue-500 hover:opacity-80 rounded"&gt;</text:span></text:p>
      <text:p text:style-name="P13"><text:span text:style-name="T9">.button {</text:span></text:p>
      <text:p text:style-name="P13"><text:span text:style-name="T9"><text:s text:c="2"/>padding: 8px 16px;</text:span></text:p>
      <text:p text:style-name="P13"><text:span text:style-name="T9"><text:s text:c="2"/>background: $primary-color;</text:span></text:p>
      <text:p text:style-name="P13"><text:span text:style-name="T9"><text:s text:c="2"/>&amp;:hover { opacity: 0.8; }</text:span></text:p>
      <text:p text:style-name="P13"><text:span text:style-name="T9">}</text:span></text:p>
      <text:p text:style-name="P12"><text:span text:style-name="T8">Se você usa os dois sem critério, o mesmo componente pode acabar com estilo espalhado em dois lugares diferentes, e fica difícil saber "onde eu mexo pra mudar isso" quando for dar manutenção.</text:span></text:p>
      <text:p text:style-name="P3">Exemplo do que evitar</text:p>
      <text:p text:style-name="P13"><text:span text:style-name="T9">import styles from './Card.module.scss'</text:span></text:p>
      <text:p text:style-name="P13"><text:span text:style-name="T9"><text:s/></text:span></text:p>
      <text:p text:style-name="P13"><text:span text:style-name="T9">function Card() {</text:span></text:p>
      <text:p text:style-name="P13"><text:span text:style-name="T9"><text:s text:c="2"/>return (</text:span></text:p>
      <text:p text:style-name="P13"><text:span text:style-name="T9"><text:s text:c="4"/>&lt;div className={`p-4 rounded shadow ${styles.card}`}&gt;</text:span></text:p>
      <text:p text:style-name="P13"><text:soft-page-break/><text:span text:style-name="T9"><text:s text:c="6"/>...</text:span></text:p>
      <text:p text:style-name="P13"><text:span text:style-name="T9"><text:s text:c="4"/>&lt;/div&gt;</text:span></text:p>
      <text:p text:style-name="P13"><text:span text:style-name="T9"><text:s text:c="2"/>)</text:span></text:p>
      <text:p text:style-name="P13"><text:span text:style-name="T9">}</text:span></text:p>
      <text:p text:style-name="P13"><text:span text:style-name="T9">.card {</text:span></text:p>
      <text:p text:style-name="P13"><text:span text:style-name="T9"><text:s text:c="2"/>background: $bg-color;</text:span></text:p>
      <text:p text:style-name="P13"><text:span text:style-name="T9"><text:s text:c="2"/>transition: transform 0.2s;</text:span></text:p>
      <text:p text:style-name="P13"><text:span text:style-name="T9"><text:s/></text:span></text:p>
      <text:p text:style-name="P13"><text:span text:style-name="T9"><text:s text:c="2"/>&amp;:hover {</text:span></text:p>
      <text:p text:style-name="P13"><text:span text:style-name="T9"><text:s text:c="4"/>transform: scale(1.02);</text:span></text:p>
      <text:p text:style-name="P13"><text:span text:style-name="T9"><text:s text:c="2"/>}</text:span></text:p>
      <text:p text:style-name="P13"><text:span text:style-name="T9">}</text:span></text:p>
      <text:p text:style-name="P12"><text:span text:style-name="T8">Aqui o padding, o rounded e a sombra vêm do Tailwind, mas o background e a transição vêm do Sass. Pra saber o visual completo do componente, é preciso olhar dois arquivos.</text:span></text:p>
      <text:p text:style-name="P3">A sugestão: dividir por responsabilidade</text:p>
      <text:p text:style-name="P12"><text:span text:style-name="T8">Tailwind cuida de: espaçamento, layout (flex/grid), cores do design system, tipografia básica, estados simples (hover, focus, responsivo).</text:span></text:p>
      <text:p text:style-name="P12"><text:span text:style-name="T8">Sass entra só quando o Tailwind não alcança facilmente: animações/keyframes complexas, lógica com @if/@each/@for, sobrescrever bibliotecas de terceiros com seletores específicos, cálculos com calc()/map/funções reutilizáveis.</text:span></text:p>
      <text:p text:style-name="P3">Alternativa mais radical (e comum hoje em dia)</text:p>
      <text:p text:style-name="P12"><text:span text:style-name="T8">Muitos projetos Next.js simplesmente não usam Sass junto com Tailwind — usam só Tailwind, e quando precisam de algo que Tailwind não cobre bem, usam CSS puro (dentro do @layer do Tailwind ou um .module.css simples), sem trazer o Sass pra dentro do projeto.</text:span></text:p>
      <text:p text:style-name="P12"><text:span text:style-name="T8">Resumo: se for combinar, decida antes de começar qual ferramenta é "dona" de qual tipo de estilo. Se não tiver um motivo específico pra usar Sass, vale considerar nem incluir ele no projeto.</text:span></text:p>
      <text:p text:style-name="P2"><text:bookmark-start text:name="sec4"/>4. Customizando o Tailwind com tokens do projeto<text:bookmark-end text:name="sec4"/></text:p>
      <text:p text:style-name="P9"><text:span text:style-name="T5">👤 Pergunta do usuário</text:span></text:p>
      <text:p text:style-name="P10"><text:span text:style-name="T6">então muitos projeto alteram o tailwind?</text:span></text:p>
      <text:p text:style-name="P11"><text:span text:style-name="T7">🤖 Resposta</text:span></text:p>
      <text:p text:style-name="P12"><text:span text:style-name="T8">Sim — e é aí que mora boa parte da resposta pra "por que não precisar de Sass".</text:span></text:p>
      <text:p text:style-name="P3">O que significa "alterar o Tailwind"</text:p>
      <text:p text:style-name="P12"><text:span text:style-name="T8">Ao invés de escrever suas próprias variáveis Sass e depois aplicar isso via classe customizada, você estende a configuração do próprio Tailwind para incluir os tokens de design do seu projeto. Aí você usa tudo via classe utilitária normal, sem sair do JSX.</text:span></text:p>
      <text:p text:style-name="P3">Tailwind v3 (tailwind.config.js)</text:p>
      <text:p text:style-name="P13"><text:span text:style-name="T9">module.exports = {</text:span></text:p>
      <text:p text:style-name="P13"><text:span text:style-name="T9"><text:s text:c="2"/>theme: {</text:span></text:p>
      <text:p text:style-name="P13"><text:span text:style-name="T9"><text:s text:c="4"/>extend: {</text:span></text:p>
      <text:p text:style-name="P13"><text:span text:style-name="T9"><text:s text:c="6"/>colors: {</text:span></text:p>
      <text:p text:style-name="P13"><text:span text:style-name="T9"><text:s text:c="8"/>primary: '#0070f3',</text:span></text:p>
      <text:p text:style-name="P13"><text:span text:style-name="T9"><text:s text:c="8"/>'brand-gray': '#1a1a1a',</text:span></text:p>
      <text:p text:style-name="P13"><text:span text:style-name="T9"><text:s text:c="6"/>},</text:span></text:p>
      <text:p text:style-name="P13"><text:span text:style-name="T9"><text:s text:c="6"/>spacing: {</text:span></text:p>
      <text:p text:style-name="P13"><text:span text:style-name="T9"><text:s text:c="8"/>'128': '32rem',</text:span></text:p>
      <text:p text:style-name="P13"><text:span text:style-name="T9"><text:s text:c="6"/>},</text:span></text:p>
      <text:p text:style-name="P13"><text:span text:style-name="T9"><text:s text:c="6"/>screens: {</text:span></text:p>
      <text:p text:style-name="P13"><text:span text:style-name="T9"><text:s text:c="8"/>'tablet': '768px',</text:span></text:p>
      <text:p text:style-name="P13"><text:span text:style-name="T9"><text:s text:c="6"/>},</text:span></text:p>
      <text:p text:style-name="P13"><text:soft-page-break/><text:span text:style-name="T9"><text:s text:c="4"/>},</text:span></text:p>
      <text:p text:style-name="P13"><text:span text:style-name="T9"><text:s text:c="2"/>},</text:span></text:p>
      <text:p text:style-name="P13"><text:span text:style-name="T9">}</text:span></text:p>
      <text:p text:style-name="P13"><text:span text:style-name="T9">&lt;div className="bg-primary text-brand-gray p-128"&gt;</text:span></text:p>
      <text:p text:style-name="P3">Tailwind v4 (configuração direto no CSS)</text:p>
      <text:p text:style-name="P13"><text:span text:style-name="T9">/* globals.css */</text:span></text:p>
      <text:p text:style-name="P13"><text:span text:style-name="T9">@import "tailwindcss";</text:span></text:p>
      <text:p text:style-name="P13"><text:span text:style-name="T9"><text:s/></text:span></text:p>
      <text:p text:style-name="P13"><text:span text:style-name="T9">@theme {</text:span></text:p>
      <text:p text:style-name="P13"><text:span text:style-name="T9"><text:s text:c="2"/>--color-primary: #0070f3;</text:span></text:p>
      <text:p text:style-name="P13"><text:span text:style-name="T9"><text:s text:c="2"/>--color-brand-gray: #1a1a1a;</text:span></text:p>
      <text:p text:style-name="P13"><text:span text:style-name="T9"><text:s text:c="2"/>--breakpoint-tablet: 768px;</text:span></text:p>
      <text:p text:style-name="P13"><text:span text:style-name="T9">}</text:span></text:p>
      <text:p text:style-name="P13"><text:span text:style-name="T9">&lt;div className="bg-primary text-brand-gray"&gt;</text:span></text:p>
      <text:p text:style-name="P3">Por que isso substitui boa parte do que o Sass faria</text:p>
      <table:table table:name="Table1" table:style-name="Table1">
        <table:table-column table:style-name="Table1.A"/>
        <table:table-column table:style-name="Table1.B" table:number-columns-repeated="2"/>
        <table:table-header-rows>
          <table:table-row table:style-name="Table1.1">
            <table:table-cell table:style-name="Table1.A1" office:value-type="string">
              <text:p text:style-name="Standard"><text:span text:style-name="T10">Precisa de...</text:span></text:p>
            </table:table-cell>
            <table:table-cell table:style-name="Table1.A1" office:value-type="string">
              <text:p text:style-name="Standard"><text:span text:style-name="T10">No Sass seria</text:span></text:p>
            </table:table-cell>
            <table:table-cell table:style-name="Table1.A1" office:value-type="string">
              <text:p text:style-name="Standard"><text:span text:style-name="T10">No Tailwind customizado é</text:span></text:p>
            </table:table-cell>
          </table:table-row>
        </table:table-header-rows>
        <table:table-row table:style-name="Table1.1">
          <table:table-cell table:style-name="Table1.A2" office:value-type="string">
            <text:p text:style-name="Standard"><text:span text:style-name="T11">Cor da marca</text:span></text:p>
          </table:table-cell>
          <table:table-cell table:style-name="Table1.B2" office:value-type="string">
            <text:p text:style-name="Standard"><text:span text:style-name="T11">$primary-color</text:span></text:p>
          </table:table-cell>
          <table:table-cell table:style-name="Table1.C2" office:value-type="string">
            <text:p text:style-name="Standard"><text:span text:style-name="T11">theme.colors.primary</text:span></text:p>
          </table:table-cell>
        </table:table-row>
        <table:table-row table:style-name="Table1.1">
          <table:table-cell table:style-name="Table1.A3" office:value-type="string">
            <text:p text:style-name="Standard"><text:span text:style-name="T11">Breakpoint próprio</text:span></text:p>
          </table:table-cell>
          <table:table-cell table:style-name="Table1.B3" office:value-type="string">
            <text:p text:style-name="Standard"><text:span text:style-name="T11">$breakpoint-md + @media</text:span></text:p>
          </table:table-cell>
          <table:table-cell table:style-name="Table1.C3" office:value-type="string">
            <text:p text:style-name="Standard"><text:span text:style-name="T11">screens.tablet no config</text:span></text:p>
          </table:table-cell>
        </table:table-row>
        <table:table-row table:style-name="Table1.1">
          <table:table-cell table:style-name="Table1.A4" office:value-type="string">
            <text:p text:style-name="Standard"><text:span text:style-name="T11">Fonte customizada</text:span></text:p>
          </table:table-cell>
          <table:table-cell table:style-name="Table1.B4" office:value-type="string">
            <text:p text:style-name="Standard"><text:span text:style-name="T11">$font-heading</text:span></text:p>
          </table:table-cell>
          <table:table-cell table:style-name="Table1.C4" office:value-type="string">
            <text:p text:style-name="Standard"><text:span text:style-name="T11">fontFamily.heading</text:span></text:p>
          </table:table-cell>
        </table:table-row>
        <table:table-row table:style-name="Table1.1">
          <table:table-cell table:style-name="Table1.A5" office:value-type="string">
            <text:p text:style-name="Standard"><text:span text:style-name="T11">Espaçamento fora do padrão</text:span></text:p>
          </table:table-cell>
          <table:table-cell table:style-name="Table1.B5" office:value-type="string">
            <text:p text:style-name="Standard"><text:span text:style-name="T11">valor solto em .scss</text:span></text:p>
          </table:table-cell>
          <table:table-cell table:style-name="Table1.C5" office:value-type="string">
            <text:p text:style-name="Standard"><text:span text:style-name="T11">spacing no config</text:span></text:p>
          </table:table-cell>
        </table:table-row>
      </table:table>
      <text:p text:style-name="P14"/>
      <text:p text:style-name="P12"><text:soft-page-break/><text:span text:style-name="T8">A "fonte da verdade" do design system fica um único lugar (o config do Tailwind), e todo componente consome dali via classe.</text:span></text:p>
      <text:p text:style-name="P3">Onde o Tailwind ainda "não alcança"</text:p>
      <text:list text:continue-numbering="true" text:style-name="WWNum1">
        <text:list-item>
          <text:p text:style-name="P4">Animações complexas com múltiplos keyframes encadeados (dá pra fazer, mas fica verboso)</text:p>
        </text:list-item>
        <text:list-item>
          <text:p text:style-name="P4">Lógica condicional para gerar classes (ex: um loop que gera 20 variações de cor programaticamente)</text:p>
        </text:list-item>
        <text:list-item>
          <text:p text:style-name="P4">Seletores muito específicos pra sobrescrever biblioteca de terceiros (ex: customizar um datepicker)</text:p>
        </text:list-item>
      </text:list>
      <text:p text:style-name="P12"><text:span text:style-name="T8">A tendência atual em projetos Next.js é usar o Tailwind customizado como o "sistema de design tokens", e deixar o Sass de fora a menos que exista uma necessidade técnica específica que o Tailwind não cubra.</text:span></text:p>
      <text:p text:style-name="P2"><text:bookmark-start text:name="sec5"/>5. Usando Bootstrap no lugar do Tailwind<text:bookmark-end text:name="sec5"/></text:p>
      <text:p text:style-name="P9"><text:span text:style-name="T5">👤 Pergunta do usuário</text:span></text:p>
      <text:p text:style-name="P10"><text:span text:style-name="T6">da para usar ao inves de tailwind bootstrap no nextjs</text:span></text:p>
      <text:p text:style-name="P11"><text:span text:style-name="T7">🤖 Resposta</text:span></text:p>
      <text:p text:style-name="P12"><text:span text:style-name="T8">Sim, dá tranquilamente. Bootstrap não tem nada de específico que impeça uso com Next.js — só tem particularidades pela forma como foi originalmente pensado (com JS que depende do DOM, na versão clássica).</text:span></text:p>
      <text:p text:style-name="P3">Opção 1: só o CSS do Bootstrap (mais simples e comum)</text:p>
      <text:p text:style-name="P13"><text:span text:style-name="T9">npm install bootstrap</text:span></text:p>
      <text:p text:style-name="P13"><text:span text:style-name="T9">// app/layout.jsx</text:span></text:p>
      <text:p text:style-name="P13"><text:span text:style-name="T9">import 'bootstrap/dist/css/bootstrap.min.css'</text:span></text:p>
      <text:p text:style-name="P13"><text:span text:style-name="T9">&lt;div className="container"&gt;</text:span></text:p>
      <text:p text:style-name="P13"><text:span text:style-name="T9"><text:s text:c="2"/>&lt;div className="row"&gt;</text:span></text:p>
      <text:p text:style-name="P13"><text:span text:style-name="T9"><text:s text:c="4"/>&lt;div className="col-md-6"&gt;</text:span></text:p>
      <text:p text:style-name="P13"><text:span text:style-name="T9"><text:s text:c="6"/>&lt;button className="btn btn-primary"&gt;Clique&lt;/button&gt;</text:span></text:p>
      <text:p text:style-name="P13"><text:span text:style-name="T9"><text:s text:c="4"/>&lt;/div&gt;</text:span></text:p>
      <text:p text:style-name="P13"><text:span text:style-name="T9"><text:s text:c="2"/>&lt;/div&gt;</text:span></text:p>
      <text:p text:style-name="P13"><text:span text:style-name="T9">&lt;/div&gt;</text:span></text:p>
      <text:p text:style-name="P12"><text:span text:style-name="T8">Limitação: componentes que dependem de JS (modal, dropdown, carousel, tooltip) não funcionam só com isso, porque o JS do Bootstrap manipula o DOM diretamente — e isso conflita com o Virtual DOM do React.</text:span></text:p>
      <text:p text:style-name="P3">Opção 2: react-bootstrap (recomendado para componentes interativos)</text:p>
      <text:p text:style-name="P13"><text:span text:style-name="T9">npm install react-bootstrap bootstrap</text:span></text:p>
      <text:p text:style-name="P13"><text:span text:style-name="T9">import 'bootstrap/dist/css/bootstrap.min.css'</text:span></text:p>
      <text:p text:style-name="P13"><text:span text:style-name="T9">import { Button, Modal } from 'react-bootstrap'</text:span></text:p>
      <text:p text:style-name="P13"><text:soft-page-break/><text:span text:style-name="T9"><text:s/></text:span></text:p>
      <text:p text:style-name="P13"><text:span text:style-name="T9">function MeuComponente() {</text:span></text:p>
      <text:p text:style-name="P13"><text:span text:style-name="T9"><text:s text:c="2"/>const [show, setShow] = useState(false)</text:span></text:p>
      <text:p text:style-name="P13"><text:span text:style-name="T9"><text:s/></text:span></text:p>
      <text:p text:style-name="P13"><text:span text:style-name="T9"><text:s text:c="2"/>return (</text:span></text:p>
      <text:p text:style-name="P13"><text:span text:style-name="T9"><text:s text:c="4"/>&lt;&gt;</text:span></text:p>
      <text:p text:style-name="P13"><text:span text:style-name="T9"><text:s text:c="6"/>&lt;Button onClick={() =&gt; setShow(true)}&gt;Abrir modal&lt;/Button&gt;</text:span></text:p>
      <text:p text:style-name="P13"><text:span text:style-name="T9"><text:s text:c="6"/>&lt;Modal show={show} onHide={() =&gt; setShow(false)}&gt;</text:span></text:p>
      <text:p text:style-name="P13"><text:span text:style-name="T9"><text:s text:c="8"/>&lt;Modal.Body&gt;Conteúdo&lt;/Modal.Body&gt;</text:span></text:p>
      <text:p text:style-name="P13"><text:span text:style-name="T9"><text:s text:c="6"/>&lt;/Modal&gt;</text:span></text:p>
      <text:p text:style-name="P13"><text:span text:style-name="T9"><text:s text:c="4"/>&lt;/&gt;</text:span></text:p>
      <text:p text:style-name="P13"><text:span text:style-name="T9"><text:s text:c="2"/>)</text:span></text:p>
      <text:p text:style-name="P13"><text:span text:style-name="T9">}</text:span></text:p>
      <text:p text:style-name="P3">Opção 3: react-bootstrap + App Router (cuidado com Server Components)</text:p>
      <text:p text:style-name="P12"><text:span text:style-name="T8">Componentes do react-bootstrap usam hooks e estado — então precisam ser Client Components:</text:span></text:p>
      <text:p text:style-name="P13"><text:span text:style-name="T9">'use client'</text:span></text:p>
      <text:p text:style-name="P13"><text:span text:style-name="T9"><text:s/></text:span></text:p>
      <text:p text:style-name="P13"><text:span text:style-name="T9">import { Button } from 'react-bootstrap'</text:span></text:p>
      <text:p text:style-name="P3">Comparando rapidamente com Tailwind</text:p>
      <table:table table:name="Table2" table:style-name="Table2">
        <table:table-column table:style-name="Table2.A"/>
        <table:table-column table:style-name="Table2.B" table:number-columns-repeated="2"/>
        <table:table-header-rows>
          <text:soft-page-break/>
          <table:table-row table:style-name="Table2.1">
            <table:table-cell table:style-name="Table2.A1" office:value-type="string">
              <text:p text:style-name="Standard"/>
            </table:table-cell>
            <table:table-cell table:style-name="Table2.A1" office:value-type="string">
              <text:p text:style-name="Standard"><text:span text:style-name="T10">Bootstrap</text:span></text:p>
            </table:table-cell>
            <table:table-cell table:style-name="Table2.A1" office:value-type="string">
              <text:p text:style-name="Standard"><text:span text:style-name="T10">Tailwind</text:span></text:p>
            </table:table-cell>
          </table:table-row>
        </table:table-header-rows>
        <table:table-row table:style-name="Table2.1">
          <table:table-cell table:style-name="Table2.A2" office:value-type="string">
            <text:p text:style-name="Standard"><text:span text:style-name="T11">Estilo</text:span></text:p>
          </table:table-cell>
          <table:table-cell table:style-name="Table2.B2" office:value-type="string">
            <text:p text:style-name="Standard"><text:span text:style-name="T11">Componentes prontos (já vêm estilizados)</text:span></text:p>
          </table:table-cell>
          <table:table-cell table:style-name="Table2.C2" office:value-type="string">
            <text:p text:style-name="Standard"><text:span text:style-name="T11">Utilitários (você monta o visual)</text:span></text:p>
          </table:table-cell>
        </table:table-row>
        <table:table-row table:style-name="Table2.1">
          <table:table-cell table:style-name="Table2.A3" office:value-type="string">
            <text:p text:style-name="Standard"><text:span text:style-name="T11">Customização visual</text:span></text:p>
          </table:table-cell>
          <table:table-cell table:style-name="Table2.B3" office:value-type="string">
            <text:p text:style-name="Standard"><text:span text:style-name="T11">Mais trabalhoso fugir do "jeito Bootstrap"</text:span></text:p>
          </table:table-cell>
          <table:table-cell table:style-name="Table2.C3" office:value-type="string">
            <text:p text:style-name="Standard"><text:span text:style-name="T11">Mais fácil ter identidade própria</text:span></text:p>
          </table:table-cell>
        </table:table-row>
        <table:table-row table:style-name="Table2.1">
          <table:table-cell table:style-name="Table2.A4" office:value-type="string">
            <text:p text:style-name="Standard"><text:span text:style-name="T11">Bundle size</text:span></text:p>
          </table:table-cell>
          <table:table-cell table:style-name="Table2.B4" office:value-type="string">
            <text:p text:style-name="Standard"><text:span text:style-name="T11">Carrega CSS/JS não usado</text:span></text:p>
          </table:table-cell>
          <table:table-cell table:style-name="Table2.C4" office:value-type="string">
            <text:p text:style-name="Standard"><text:span text:style-name="T11">Só gera CSS das classes usadas</text:span></text:p>
          </table:table-cell>
        </table:table-row>
        <table:table-row table:style-name="Table2.1">
          <table:table-cell table:style-name="Table2.A5" office:value-type="string">
            <text:p text:style-name="Standard"><text:span text:style-name="T11">Curva de aprendizado</text:span></text:p>
          </table:table-cell>
          <table:table-cell table:style-name="Table2.B5" office:value-type="string">
            <text:p text:style-name="Standard"><text:span text:style-name="T11">Mais rápida pra prototipar</text:span></text:p>
          </table:table-cell>
          <table:table-cell table:style-name="Table2.C5" office:value-type="string">
            <text:p text:style-name="Standard"><text:span text:style-name="T11">Um pouco mais lenta no início</text:span></text:p>
          </table:table-cell>
        </table:table-row>
      </table:table>
      <text:p text:style-name="P14"/>
      <text:p text:style-name="P12"><text:span text:style-name="T8">Bootstrap tende a ser boa escolha quando você quer velocidade e não se importa com a aparência "genérica". Tailwind compensa mais quando a identidade visual importa e o projeto vai crescer.</text:span></text:p>
      <text:p text:style-name="P2"><text:bookmark-start text:name="sec6"/>6. Tailwind é a única forma "certa" de estilizar no Next.js?<text:bookmark-end text:name="sec6"/></text:p>
      <text:p text:style-name="P9"><text:span text:style-name="T5">👤 Pergunta do usuário</text:span></text:p>
      <text:p text:style-name="P10"><text:span text:style-name="T6">então a melhor forma de utilizar o nextjs é utilizar o tailwind que ja foi feito pra ele?</text:span></text:p>
      <text:p text:style-name="P11"><text:span text:style-name="T7">🤖 Resposta</text:span></text:p>
      <text:p text:style-name="P12"><text:span text:style-name="T8">Vale corrigir um ponto antes: o Tailwind não foi feito especificamente para o Next.js. Ele é um framework de CSS agnóstico, criado para funcionar com qualquer stack — React, Vue, Svelte, HTML puro, Laravel, etc.</text:span></text:p>
      <text:p text:style-name="P3">Por que parece que foi feito pra ele</text:p>
      <text:list text:continue-numbering="true" text:style-name="WWNum1">
        <text:list-item>
          <text:p text:style-name="P4">A Vercel (mantenedora do Next.js) tem relação próxima com a comunidade Tailwind — inclusive contratou o criador do Tailwind por um tempo.</text:p>
        </text:list-item>
        <text:list-item>
          <text:p text:style-name="P4">O create-next-app já pergunta se você quer Tailwind na hora de configurar, com suporte zero-config.</text:p>
        </text:list-item>
        <text:list-item>
          <text:p text:style-name="P4">Muita documentação e templates oficiais da Vercel usam Tailwind por padrão.</text:p>
        </text:list-item>
      </text:list>
      <text:p text:style-name="P12"><text:span text:style-name="T8">Isso cria uma integração muito suave, mas tecnicamente é só conveniência de setup, não um vínculo arquitetural. Dá pra rodar Next.js perfeitamente bem com Sass puro, styled-components, CSS Modules puro, Bootstrap, Chakra UI, Mantine, etc.</text:span></text:p>
      <text:p text:style-name="P3">Então qual é "a melhor forma"?</text:p>
      <table:table table:name="Table3" table:style-name="Table3">
        <table:table-column table:style-name="Table3.A"/>
        <table:table-column table:style-name="Table3.B"/>
        <table:table-header-rows>
          <table:table-row table:style-name="Table3.1">
            <table:table-cell table:style-name="Table3.A1" office:value-type="string">
              <text:p text:style-name="Standard"><text:span text:style-name="T10">Se você quer...</text:span></text:p>
            </table:table-cell>
            <table:table-cell table:style-name="Table3.A1" office:value-type="string">
              <text:p text:style-name="Standard"><text:span text:style-name="T10">Vale considerar</text:span></text:p>
            </table:table-cell>
          </table:table-row>
        </table:table-header-rows>
        <table:table-row table:style-name="Table3.1">
          <table:table-cell table:style-name="Table3.A2" office:value-type="string">
            <text:p text:style-name="Standard"><text:span text:style-name="T11">Setup rápido, zero configuração, grande comunidade</text:span></text:p>
          </table:table-cell>
          <table:table-cell table:style-name="Table3.B2" office:value-type="string">
            <text:p text:style-name="Standard"><text:span text:style-name="T11">Tailwind</text:span></text:p>
          </table:table-cell>
        </table:table-row>
        <table:table-row table:style-name="Table3.1">
          <table:table-cell table:style-name="Table3.A3" office:value-type="string">
            <text:p text:style-name="Standard"><text:span text:style-name="T11">Componentes prontos, prototipagem rápida</text:span></text:p>
          </table:table-cell>
          <table:table-cell table:style-name="Table3.B3" office:value-type="string">
            <text:p text:style-name="Standard"><text:span text:style-name="T11">Bootstrap / react-bootstrap</text:span></text:p>
          </table:table-cell>
        </table:table-row>
        <table:table-row table:style-name="Table3.1">
          <table:table-cell table:style-name="Table3.A4" office:value-type="string">
            <text:p text:style-name="Standard"><text:span text:style-name="T11">Componentes acessíveis com tema customizável</text:span></text:p>
          </table:table-cell>
          <table:table-cell table:style-name="Table3.B4" office:value-type="string">
            <text:p text:style-name="Standard"><text:span text:style-name="T11">Chakra UI, Mantine, shadcn/ui</text:span></text:p>
          </table:table-cell>
        </table:table-row>
        <table:table-row table:style-name="Table3.1">
          <table:table-cell table:style-name="Table3.A5" office:value-type="string">
            <text:p text:style-name="Standard"><text:span text:style-name="T11">CSS tradicional, aninhamento, variáveis, mixins</text:span></text:p>
          </table:table-cell>
          <table:table-cell table:style-name="Table3.B5" office:value-type="string">
            <text:p text:style-name="Standard"><text:span text:style-name="T11">Sass (com CSS Modules)</text:span></text:p>
          </table:table-cell>
        </table:table-row>
        <table:table-row table:style-name="Table3.1">
          <table:table-cell table:style-name="Table3.A6" office:value-type="string">
            <text:p text:style-name="Standard"><text:span text:style-name="T11">Máximo controle e zero dependência extra</text:span></text:p>
          </table:table-cell>
          <table:table-cell table:style-name="Table3.B6" office:value-type="string">
            <text:p text:style-name="Standard"><text:span text:style-name="T11">CSS puro (CSS Modules)</text:span></text:p>
          </table:table-cell>
        </table:table-row>
      </table:table>
      <text:p text:style-name="P14"/>
      <text:p text:style-name="P12"><text:span text:style-name="T8">Hoje, Tailwind é a escolha mais popular na comunidade Next.js/React em geral — mais tutoriais, mais componentes prontos (shadcn/ui é construído em cima dele), mais gente pra tirar dúvida. Isso é uma vantagem prática genuína.</text:span></text:p>
      <text:p text:style-name="P12"><text:span text:style-name="T8">Mas "mais popular" não é a mesma coisa que "a única forma certa". Se o time já domina Bootstrap ou Sass e o projeto não exige identidade visual muito customizada, migrar tudo pra Tailwind só porque "combina com Next.js" pode ser esforço desnecessário.</text:span></text:p>
      <text:p text:style-name="P2"><text:bookmark-start text:name="sec7"/>7. Estrutura completa de projeto Next.js + Sass<text:bookmark-end text:name="sec7"/></text:p>
      <text:p text:style-name="P9"><text:span text:style-name="T5">👤 Pergunta do usuário</text:span></text:p>
      <text:p text:style-name="P10"><text:span text:style-name="T6">faça um exemplo de estrutura de pastas de como seria utilizar sass com nextjs, seguindo as melhores praticas e o que é usado em trabalhos reais, pode adicionar mixins, funções, themes, variables, dark, light, tudo o que o sass permite, quero uma estrutura completa de como seria um projeto real, lembrando de não usar coisas depreciadas e seguir as melhores praticas, quero ter uma visão geral de como usar, não explique nada por enquanto, apenas faça a estrutura</text:span></text:p>
      <text:p text:style-name="P11"><text:span text:style-name="T7">🤖 Resposta</text:span></text:p>
      <text:p text:style-name="P3">Árvore de pastas</text:p>
      <text:p text:style-name="P13"><text:span text:style-name="T9">nextjs-sass-project/</text:span></text:p>
      <text:p text:style-name="P13"><text:span text:style-name="T9">├── app/</text:span></text:p>
      <text:p text:style-name="P13"><text:span text:style-name="T9">│ <text:s text:c="2"/>├── layout.tsx</text:span></text:p>
      <text:p text:style-name="P13"><text:span text:style-name="T9">│ <text:s text:c="2"/>├── page.tsx</text:span></text:p>
      <text:p text:style-name="P13"><text:span text:style-name="T9">│ <text:s text:c="2"/>├── dashboard/</text:span></text:p>
      <text:p text:style-name="P13"><text:span text:style-name="T9">│ <text:s text:c="2"/>│ <text:s text:c="2"/>└── page.tsx</text:span></text:p>
      <text:p text:style-name="P13"><text:span text:style-name="T9">│ <text:s text:c="2"/>└── (marketing)/</text:span></text:p>
      <text:p text:style-name="P13"><text:span text:style-name="T9">│ <text:s text:c="6"/>└── page.tsx</text:span></text:p>
      <text:p text:style-name="P13"><text:span text:style-name="T9">│</text:span></text:p>
      <text:p text:style-name="P13"><text:span text:style-name="T9">├── components/</text:span></text:p>
      <text:p text:style-name="P13"><text:span text:style-name="T9">│ <text:s text:c="2"/>├── ui/</text:span></text:p>
      <text:p text:style-name="P13"><text:span text:style-name="T9">│ <text:s text:c="2"/>│ <text:s text:c="2"/>├── Button/</text:span></text:p>
      <text:p text:style-name="P13"><text:span text:style-name="T9">│ <text:s text:c="2"/>│ <text:s text:c="2"/>│ <text:s text:c="2"/>├── Button.tsx</text:span></text:p>
      <text:p text:style-name="P13"><text:span text:style-name="T9">│ <text:s text:c="2"/>│ <text:s text:c="2"/>│ <text:s text:c="2"/>└── Button.module.scss</text:span></text:p>
      <text:p text:style-name="P13"><text:span text:style-name="T9">│ <text:s text:c="2"/>│ <text:s text:c="2"/>├── Card/</text:span></text:p>
      <text:p text:style-name="P13"><text:span text:style-name="T9">│ <text:s text:c="2"/>│ <text:s text:c="2"/>│ <text:s text:c="2"/>├── Card.tsx</text:span></text:p>
      <text:p text:style-name="P13"><text:soft-page-break/><text:span text:style-name="T9">│ <text:s text:c="2"/>│ <text:s text:c="2"/>│ <text:s text:c="2"/>└── Card.module.scss</text:span></text:p>
      <text:p text:style-name="P13"><text:span text:style-name="T9">│ <text:s text:c="2"/>│ <text:s text:c="2"/>└── ThemeToggle/</text:span></text:p>
      <text:p text:style-name="P13"><text:span text:style-name="T9">│ <text:s text:c="2"/>│ <text:s text:c="6"/>├── ThemeToggle.tsx</text:span></text:p>
      <text:p text:style-name="P13"><text:span text:style-name="T9">│ <text:s text:c="2"/>│ <text:s text:c="6"/>└── ThemeToggle.module.scss</text:span></text:p>
      <text:p text:style-name="P13"><text:span text:style-name="T9">│ <text:s text:c="2"/>└── layout/</text:span></text:p>
      <text:p text:style-name="P13"><text:span text:style-name="T9">│ <text:s text:c="6"/>├── Header/</text:span></text:p>
      <text:p text:style-name="P13"><text:span text:style-name="T9">│ <text:s text:c="6"/>│ <text:s text:c="2"/>├── Header.tsx</text:span></text:p>
      <text:p text:style-name="P13"><text:span text:style-name="T9">│ <text:s text:c="6"/>│ <text:s text:c="2"/>└── Header.module.scss</text:span></text:p>
      <text:p text:style-name="P13"><text:span text:style-name="T9">│ <text:s text:c="6"/>└── Footer/</text:span></text:p>
      <text:p text:style-name="P13"><text:span text:style-name="T9">│ <text:s text:c="10"/>├── Footer.tsx</text:span></text:p>
      <text:p text:style-name="P13"><text:span text:style-name="T9">│ <text:s text:c="10"/>└── Footer.module.scss</text:span></text:p>
      <text:p text:style-name="P13"><text:span text:style-name="T9">│</text:span></text:p>
      <text:p text:style-name="P13"><text:span text:style-name="T9">├── styles/</text:span></text:p>
      <text:p text:style-name="P13"><text:span text:style-name="T9">│ <text:s text:c="2"/>├── abstracts/</text:span></text:p>
      <text:p text:style-name="P13"><text:span text:style-name="T9">│ <text:s text:c="2"/>│ <text:s text:c="2"/>├── _variables.scss</text:span></text:p>
      <text:p text:style-name="P13"><text:span text:style-name="T9">│ <text:s text:c="2"/>│ <text:s text:c="2"/>├── _breakpoints.scss</text:span></text:p>
      <text:p text:style-name="P13"><text:span text:style-name="T9">│ <text:s text:c="2"/>│ <text:s text:c="2"/>├── _functions.scss</text:span></text:p>
      <text:p text:style-name="P13"><text:span text:style-name="T9">│ <text:s text:c="2"/>│ <text:s text:c="2"/>├── _mixins.scss</text:span></text:p>
      <text:p text:style-name="P13"><text:span text:style-name="T9">│ <text:s text:c="2"/>│ <text:s text:c="2"/>└── _index.scss</text:span></text:p>
      <text:p text:style-name="P13"><text:span text:style-name="T9">│ <text:s text:c="2"/>│</text:span></text:p>
      <text:p text:style-name="P13"><text:span text:style-name="T9">│ <text:s text:c="2"/>├── themes/</text:span></text:p>
      <text:p text:style-name="P13"><text:soft-page-break/><text:span text:style-name="T9">│ <text:s text:c="2"/>│ <text:s text:c="2"/>├── _tokens.scss</text:span></text:p>
      <text:p text:style-name="P13"><text:span text:style-name="T9">│ <text:s text:c="2"/>│ <text:s text:c="2"/>├── _light.scss</text:span></text:p>
      <text:p text:style-name="P13"><text:span text:style-name="T9">│ <text:s text:c="2"/>│ <text:s text:c="2"/>├── _dark.scss</text:span></text:p>
      <text:p text:style-name="P13"><text:span text:style-name="T9">│ <text:s text:c="2"/>│ <text:s text:c="2"/>└── _index.scss</text:span></text:p>
      <text:p text:style-name="P13"><text:span text:style-name="T9">│ <text:s text:c="2"/>│</text:span></text:p>
      <text:p text:style-name="P13"><text:span text:style-name="T9">│ <text:s text:c="2"/>├── base/</text:span></text:p>
      <text:p text:style-name="P13"><text:span text:style-name="T9">│ <text:s text:c="2"/>│ <text:s text:c="2"/>├── _reset.scss</text:span></text:p>
      <text:p text:style-name="P13"><text:span text:style-name="T9">│ <text:s text:c="2"/>│ <text:s text:c="2"/>├── _typography.scss</text:span></text:p>
      <text:p text:style-name="P13"><text:span text:style-name="T9">│ <text:s text:c="2"/>│ <text:s text:c="2"/>└── _index.scss</text:span></text:p>
      <text:p text:style-name="P13"><text:span text:style-name="T9">│ <text:s text:c="2"/>│</text:span></text:p>
      <text:p text:style-name="P13"><text:span text:style-name="T9">│ <text:s text:c="2"/>└── globals.scss</text:span></text:p>
      <text:p text:style-name="P13"><text:span text:style-name="T9">│</text:span></text:p>
      <text:p text:style-name="P13"><text:span text:style-name="T9">├── lib/</text:span></text:p>
      <text:p text:style-name="P13"><text:span text:style-name="T9">│ <text:s text:c="2"/>└── theme.ts</text:span></text:p>
      <text:p text:style-name="P13"><text:span text:style-name="T9">│</text:span></text:p>
      <text:p text:style-name="P13"><text:span text:style-name="T9">├── next.config.js</text:span></text:p>
      <text:p text:style-name="P13"><text:span text:style-name="T9">├── package.json</text:span></text:p>
      <text:p text:style-name="P13"><text:span text:style-name="T9">└── tsconfig.json</text:span></text:p>
      <text:p text:style-name="P3">styles/abstracts/_variables.scss</text:p>
      <text:p text:style-name="P13"><text:span text:style-name="T9">$font-primary: 'Inter', system-ui, sans-serif;</text:span></text:p>
      <text:p text:style-name="P13"><text:span text:style-name="T9">$font-mono: 'Roboto Mono', monospace;</text:span></text:p>
      <text:p text:style-name="P13"><text:soft-page-break/><text:span text:style-name="T9"><text:s/></text:span></text:p>
      <text:p text:style-name="P13"><text:span text:style-name="T9">$spacing: (</text:span></text:p>
      <text:p text:style-name="P13"><text:span text:style-name="T9"><text:s text:c="2"/>'0': 0,</text:span></text:p>
      <text:p text:style-name="P13"><text:span text:style-name="T9"><text:s text:c="2"/>'1': 4px,</text:span></text:p>
      <text:p text:style-name="P13"><text:span text:style-name="T9"><text:s text:c="2"/>'2': 8px,</text:span></text:p>
      <text:p text:style-name="P13"><text:span text:style-name="T9"><text:s text:c="2"/>'3': 16px,</text:span></text:p>
      <text:p text:style-name="P13"><text:span text:style-name="T9"><text:s text:c="2"/>'4': 24px,</text:span></text:p>
      <text:p text:style-name="P13"><text:span text:style-name="T9"><text:s text:c="2"/>'5': 32px,</text:span></text:p>
      <text:p text:style-name="P13"><text:span text:style-name="T9"><text:s text:c="2"/>'6': 48px,</text:span></text:p>
      <text:p text:style-name="P13"><text:span text:style-name="T9"><text:s text:c="2"/>'7': 64px,</text:span></text:p>
      <text:p text:style-name="P13"><text:span text:style-name="T9">);</text:span></text:p>
      <text:p text:style-name="P13"><text:span text:style-name="T9"><text:s/></text:span></text:p>
      <text:p text:style-name="P13"><text:span text:style-name="T9">$radius: (</text:span></text:p>
      <text:p text:style-name="P13"><text:span text:style-name="T9"><text:s text:c="2"/>'sm': 4px,</text:span></text:p>
      <text:p text:style-name="P13"><text:span text:style-name="T9"><text:s text:c="2"/>'md': 8px,</text:span></text:p>
      <text:p text:style-name="P13"><text:span text:style-name="T9"><text:s text:c="2"/>'lg': 16px,</text:span></text:p>
      <text:p text:style-name="P13"><text:span text:style-name="T9"><text:s text:c="2"/>'full': 9999px,</text:span></text:p>
      <text:p text:style-name="P13"><text:span text:style-name="T9">);</text:span></text:p>
      <text:p text:style-name="P13"><text:span text:style-name="T9"><text:s/></text:span></text:p>
      <text:p text:style-name="P13"><text:span text:style-name="T9">$z-index: (</text:span></text:p>
      <text:p text:style-name="P13"><text:span text:style-name="T9"><text:s text:c="2"/>'dropdown': 1000,</text:span></text:p>
      <text:p text:style-name="P13"><text:soft-page-break/><text:span text:style-name="T9"><text:s text:c="2"/>'sticky': 1100,</text:span></text:p>
      <text:p text:style-name="P13"><text:span text:style-name="T9"><text:s text:c="2"/>'modal': 1300,</text:span></text:p>
      <text:p text:style-name="P13"><text:span text:style-name="T9"><text:s text:c="2"/>'toast': 1400,</text:span></text:p>
      <text:p text:style-name="P13"><text:span text:style-name="T9">);</text:span></text:p>
      <text:p text:style-name="P13"><text:span text:style-name="T9"><text:s/></text:span></text:p>
      <text:p text:style-name="P13"><text:span text:style-name="T9">$transition-base: 0.2s ease-in-out;</text:span></text:p>
      <text:p text:style-name="P3">styles/abstracts/_breakpoints.scss</text:p>
      <text:p text:style-name="P13"><text:span text:style-name="T9">$breakpoints: (</text:span></text:p>
      <text:p text:style-name="P13"><text:span text:style-name="T9"><text:s text:c="2"/>'sm': 576px,</text:span></text:p>
      <text:p text:style-name="P13"><text:span text:style-name="T9"><text:s text:c="2"/>'md': 768px,</text:span></text:p>
      <text:p text:style-name="P13"><text:span text:style-name="T9"><text:s text:c="2"/>'lg': 992px,</text:span></text:p>
      <text:p text:style-name="P13"><text:span text:style-name="T9"><text:s text:c="2"/>'xl': 1200px,</text:span></text:p>
      <text:p text:style-name="P13"><text:span text:style-name="T9"><text:s text:c="2"/>'xxl': 1400px,</text:span></text:p>
      <text:p text:style-name="P13"><text:span text:style-name="T9">);</text:span></text:p>
      <text:p text:style-name="P3">styles/abstracts/_functions.scss</text:p>
      <text:p text:style-name="P13"><text:span text:style-name="T9">@use 'sass:math';</text:span></text:p>
      <text:p text:style-name="P13"><text:span text:style-name="T9">@use 'variables' as vars;</text:span></text:p>
      <text:p text:style-name="P13"><text:span text:style-name="T9"><text:s/></text:span></text:p>
      <text:p text:style-name="P13"><text:span text:style-name="T9">@function rem($px, $base: 16px) {</text:span></text:p>
      <text:p text:style-name="P13"><text:span text:style-name="T9"><text:s text:c="2"/>@return math.div($px, $base) * 1rem;</text:span></text:p>
      <text:p text:style-name="P13"><text:span text:style-name="T9">}</text:span></text:p>
      <text:p text:style-name="P13"><text:soft-page-break/><text:span text:style-name="T9"><text:s/></text:span></text:p>
      <text:p text:style-name="P13"><text:span text:style-name="T9">@function spacing($key) {</text:span></text:p>
      <text:p text:style-name="P13"><text:span text:style-name="T9"><text:s text:c="2"/>@return map-get(vars.$spacing, $key);</text:span></text:p>
      <text:p text:style-name="P13"><text:span text:style-name="T9">}</text:span></text:p>
      <text:p text:style-name="P13"><text:span text:style-name="T9"><text:s/></text:span></text:p>
      <text:p text:style-name="P13"><text:span text:style-name="T9">@function radius($key) {</text:span></text:p>
      <text:p text:style-name="P13"><text:span text:style-name="T9"><text:s text:c="2"/>@return map-get(vars.$radius, $key);</text:span></text:p>
      <text:p text:style-name="P13"><text:span text:style-name="T9">}</text:span></text:p>
      <text:p text:style-name="P13"><text:span text:style-name="T9"><text:s/></text:span></text:p>
      <text:p text:style-name="P13"><text:span text:style-name="T9">@function z($key) {</text:span></text:p>
      <text:p text:style-name="P13"><text:span text:style-name="T9"><text:s text:c="2"/>@return map-get(vars.$z-index, $key);</text:span></text:p>
      <text:p text:style-name="P13"><text:span text:style-name="T9">}</text:span></text:p>
      <text:p text:style-name="P3">styles/abstracts/_mixins.scss</text:p>
      <text:p text:style-name="P13"><text:span text:style-name="T9">@use 'sass:map';</text:span></text:p>
      <text:p text:style-name="P13"><text:span text:style-name="T9">@use 'breakpoints' as bp;</text:span></text:p>
      <text:p text:style-name="P13"><text:span text:style-name="T9"><text:s/></text:span></text:p>
      <text:p text:style-name="P13"><text:span text:style-name="T9">@mixin respond-to($breakpoint) {</text:span></text:p>
      <text:p text:style-name="P13"><text:span text:style-name="T9"><text:s text:c="2"/>$value: map.get(bp.$breakpoints, $breakpoint);</text:span></text:p>
      <text:p text:style-name="P13"><text:span text:style-name="T9"><text:s/></text:span></text:p>
      <text:p text:style-name="P13"><text:span text:style-name="T9"><text:s text:c="2"/>@if $value {</text:span></text:p>
      <text:p text:style-name="P13"><text:span text:style-name="T9"><text:s text:c="4"/>@media (min-width: $value) {</text:span></text:p>
      <text:p text:style-name="P13"><text:soft-page-break/><text:span text:style-name="T9"><text:s text:c="6"/>@content;</text:span></text:p>
      <text:p text:style-name="P13"><text:span text:style-name="T9"><text:s text:c="4"/>}</text:span></text:p>
      <text:p text:style-name="P13"><text:span text:style-name="T9"><text:s text:c="2"/>} @else {</text:span></text:p>
      <text:p text:style-name="P13"><text:span text:style-name="T9"><text:s text:c="4"/>@warn "Breakpoint '#{$breakpoint}' não existe.";</text:span></text:p>
      <text:p text:style-name="P13"><text:span text:style-name="T9"><text:s text:c="2"/>}</text:span></text:p>
      <text:p text:style-name="P13"><text:span text:style-name="T9">}</text:span></text:p>
      <text:p text:style-name="P13"><text:span text:style-name="T9"><text:s/></text:span></text:p>
      <text:p text:style-name="P13"><text:span text:style-name="T9">@mixin flex($direction: row, $justify: flex-start, $align: stretch, $gap: 0) {</text:span></text:p>
      <text:p text:style-name="P13"><text:span text:style-name="T9"><text:s text:c="2"/>display: flex;</text:span></text:p>
      <text:p text:style-name="P13"><text:span text:style-name="T9"><text:s text:c="2"/>flex-direction: $direction;</text:span></text:p>
      <text:p text:style-name="P13"><text:span text:style-name="T9"><text:s text:c="2"/>justify-content: $justify;</text:span></text:p>
      <text:p text:style-name="P13"><text:span text:style-name="T9"><text:s text:c="2"/>align-items: $align;</text:span></text:p>
      <text:p text:style-name="P13"><text:span text:style-name="T9"><text:s text:c="2"/>gap: $gap;</text:span></text:p>
      <text:p text:style-name="P13"><text:span text:style-name="T9">}</text:span></text:p>
      <text:p text:style-name="P13"><text:span text:style-name="T9"><text:s/></text:span></text:p>
      <text:p text:style-name="P13"><text:span text:style-name="T9">@mixin truncate($lines: 1) {</text:span></text:p>
      <text:p text:style-name="P13"><text:span text:style-name="T9"><text:s text:c="2"/>@if $lines == 1 {</text:span></text:p>
      <text:p text:style-name="P13"><text:span text:style-name="T9"><text:s text:c="4"/>white-space: nowrap;</text:span></text:p>
      <text:p text:style-name="P13"><text:span text:style-name="T9"><text:s text:c="4"/>overflow: hidden;</text:span></text:p>
      <text:p text:style-name="P13"><text:span text:style-name="T9"><text:s text:c="4"/>text-overflow: ellipsis;</text:span></text:p>
      <text:p text:style-name="P13"><text:span text:style-name="T9"><text:s text:c="2"/>} @else {</text:span></text:p>
      <text:p text:style-name="P13"><text:soft-page-break/><text:span text:style-name="T9"><text:s text:c="4"/>display: -webkit-box;</text:span></text:p>
      <text:p text:style-name="P13"><text:span text:style-name="T9"><text:s text:c="4"/>-webkit-line-clamp: $lines;</text:span></text:p>
      <text:p text:style-name="P13"><text:span text:style-name="T9"><text:s text:c="4"/>-webkit-box-orient: vertical;</text:span></text:p>
      <text:p text:style-name="P13"><text:span text:style-name="T9"><text:s text:c="4"/>overflow: hidden;</text:span></text:p>
      <text:p text:style-name="P13"><text:span text:style-name="T9"><text:s text:c="2"/>}</text:span></text:p>
      <text:p text:style-name="P13"><text:span text:style-name="T9">}</text:span></text:p>
      <text:p text:style-name="P13"><text:span text:style-name="T9"><text:s/></text:span></text:p>
      <text:p text:style-name="P13"><text:span text:style-name="T9">@mixin button-variant($bg, $color: white) {</text:span></text:p>
      <text:p text:style-name="P13"><text:span text:style-name="T9"><text:s text:c="2"/>background-color: $bg;</text:span></text:p>
      <text:p text:style-name="P13"><text:span text:style-name="T9"><text:s text:c="2"/>color: $color;</text:span></text:p>
      <text:p text:style-name="P13"><text:span text:style-name="T9"><text:s/></text:span></text:p>
      <text:p text:style-name="P13"><text:span text:style-name="T9"><text:s text:c="2"/>&amp;:hover {</text:span></text:p>
      <text:p text:style-name="P13"><text:span text:style-name="T9"><text:s text:c="4"/>filter: brightness(0.92);</text:span></text:p>
      <text:p text:style-name="P13"><text:span text:style-name="T9"><text:s text:c="2"/>}</text:span></text:p>
      <text:p text:style-name="P13"><text:span text:style-name="T9"><text:s/></text:span></text:p>
      <text:p text:style-name="P13"><text:span text:style-name="T9"><text:s text:c="2"/>&amp;:active {</text:span></text:p>
      <text:p text:style-name="P13"><text:span text:style-name="T9"><text:s text:c="4"/>filter: brightness(0.85);</text:span></text:p>
      <text:p text:style-name="P13"><text:span text:style-name="T9"><text:s text:c="2"/>}</text:span></text:p>
      <text:p text:style-name="P13"><text:span text:style-name="T9">}</text:span></text:p>
      <text:p text:style-name="P3">styles/abstracts/_index.scss</text:p>
      <text:p text:style-name="P13"><text:span text:style-name="T9">@forward 'variables';</text:span></text:p>
      <text:p text:style-name="P13"><text:soft-page-break/><text:span text:style-name="T9">@forward 'breakpoints';</text:span></text:p>
      <text:p text:style-name="P13"><text:span text:style-name="T9">@forward 'functions';</text:span></text:p>
      <text:p text:style-name="P13"><text:span text:style-name="T9">@forward 'mixins';</text:span></text:p>
      <text:p text:style-name="P3">styles/themes/_tokens.scss</text:p>
      <text:p text:style-name="P13"><text:span text:style-name="T9">$light: (</text:span></text:p>
      <text:p text:style-name="P13"><text:span text:style-name="T9"><text:s text:c="2"/>'bg-primary': #ffffff,</text:span></text:p>
      <text:p text:style-name="P13"><text:span text:style-name="T9"><text:s text:c="2"/>'bg-secondary': #f5f5f7,</text:span></text:p>
      <text:p text:style-name="P13"><text:span text:style-name="T9"><text:s text:c="2"/>'text-primary': #111111,</text:span></text:p>
      <text:p text:style-name="P13"><text:span text:style-name="T9"><text:s text:c="2"/>'text-secondary': #4a4a4a,</text:span></text:p>
      <text:p text:style-name="P13"><text:span text:style-name="T9"><text:s text:c="2"/>'border': #e0e0e0,</text:span></text:p>
      <text:p text:style-name="P13"><text:span text:style-name="T9"><text:s text:c="2"/>'accent': #0070f3,</text:span></text:p>
      <text:p text:style-name="P13"><text:span text:style-name="T9"><text:s text:c="2"/>'danger': #e5484d,</text:span></text:p>
      <text:p text:style-name="P13"><text:span text:style-name="T9"><text:s text:c="2"/>'success': #30a46c,</text:span></text:p>
      <text:p text:style-name="P13"><text:span text:style-name="T9">);</text:span></text:p>
      <text:p text:style-name="P13"><text:span text:style-name="T9"><text:s/></text:span></text:p>
      <text:p text:style-name="P13"><text:span text:style-name="T9">$dark: (</text:span></text:p>
      <text:p text:style-name="P13"><text:span text:style-name="T9"><text:s text:c="2"/>'bg-primary': #0d0d0d,</text:span></text:p>
      <text:p text:style-name="P13"><text:span text:style-name="T9"><text:s text:c="2"/>'bg-secondary': #1a1a1a,</text:span></text:p>
      <text:p text:style-name="P13"><text:span text:style-name="T9"><text:s text:c="2"/>'text-primary': #f5f5f5,</text:span></text:p>
      <text:p text:style-name="P13"><text:span text:style-name="T9"><text:s text:c="2"/>'text-secondary': #a0a0a0,</text:span></text:p>
      <text:p text:style-name="P13"><text:span text:style-name="T9"><text:s text:c="2"/>'border': #2e2e2e,</text:span></text:p>
      <text:p text:style-name="P13"><text:soft-page-break/><text:span text:style-name="T9"><text:s text:c="2"/>'accent': #3b9eff,</text:span></text:p>
      <text:p text:style-name="P13"><text:span text:style-name="T9"><text:s text:c="2"/>'danger': #ff6369,</text:span></text:p>
      <text:p text:style-name="P13"><text:span text:style-name="T9"><text:s text:c="2"/>'success': #4cc38a,</text:span></text:p>
      <text:p text:style-name="P13"><text:span text:style-name="T9">);</text:span></text:p>
      <text:p text:style-name="P3">styles/themes/_light.scss</text:p>
      <text:p text:style-name="P13"><text:span text:style-name="T9">@use 'tokens';</text:span></text:p>
      <text:p text:style-name="P13"><text:span text:style-name="T9"><text:s/></text:span></text:p>
      <text:p text:style-name="P13"><text:span text:style-name="T9">:root,</text:span></text:p>
      <text:p text:style-name="P13"><text:span text:style-name="T9">[data-theme='light'] {</text:span></text:p>
      <text:p text:style-name="P13"><text:span text:style-name="T9"><text:s text:c="2"/>@each $key, $value in tokens.$light {</text:span></text:p>
      <text:p text:style-name="P13"><text:span text:style-name="T9"><text:s text:c="4"/>--color-#{$key}: #{$value};</text:span></text:p>
      <text:p text:style-name="P13"><text:span text:style-name="T9"><text:s text:c="2"/>}</text:span></text:p>
      <text:p text:style-name="P13"><text:span text:style-name="T9">}</text:span></text:p>
      <text:p text:style-name="P3">styles/themes/_dark.scss</text:p>
      <text:p text:style-name="P13"><text:span text:style-name="T9">@use 'tokens';</text:span></text:p>
      <text:p text:style-name="P13"><text:span text:style-name="T9"><text:s/></text:span></text:p>
      <text:p text:style-name="P13"><text:span text:style-name="T9">[data-theme='dark'] {</text:span></text:p>
      <text:p text:style-name="P13"><text:span text:style-name="T9"><text:s text:c="2"/>@each $key, $value in tokens.$dark {</text:span></text:p>
      <text:p text:style-name="P13"><text:span text:style-name="T9"><text:s text:c="4"/>--color-#{$key}: #{$value};</text:span></text:p>
      <text:p text:style-name="P13"><text:span text:style-name="T9"><text:s text:c="2"/>}</text:span></text:p>
      <text:p text:style-name="P13"><text:span text:style-name="T9">}</text:span></text:p>
      <text:p text:style-name="P13"><text:soft-page-break/><text:span text:style-name="T9"><text:s/></text:span></text:p>
      <text:p text:style-name="P13"><text:span text:style-name="T9">@media (prefers-color-scheme: dark) {</text:span></text:p>
      <text:p text:style-name="P13"><text:span text:style-name="T9"><text:s text:c="2"/>:root:not([data-theme='light']) {</text:span></text:p>
      <text:p text:style-name="P13"><text:span text:style-name="T9"><text:s text:c="4"/>@each $key, $value in tokens.$dark {</text:span></text:p>
      <text:p text:style-name="P13"><text:span text:style-name="T9"><text:s text:c="6"/>--color-#{$key}: #{$value};</text:span></text:p>
      <text:p text:style-name="P13"><text:span text:style-name="T9"><text:s text:c="4"/>}</text:span></text:p>
      <text:p text:style-name="P13"><text:span text:style-name="T9"><text:s text:c="2"/>}</text:span></text:p>
      <text:p text:style-name="P13"><text:span text:style-name="T9">}</text:span></text:p>
      <text:p text:style-name="P3">styles/themes/_index.scss</text:p>
      <text:p text:style-name="P13"><text:span text:style-name="T9">@forward 'tokens';</text:span></text:p>
      <text:p text:style-name="P13"><text:span text:style-name="T9">@use 'light';</text:span></text:p>
      <text:p text:style-name="P13"><text:span text:style-name="T9">@use 'dark';</text:span></text:p>
      <text:p text:style-name="P3">styles/base/_reset.scss</text:p>
      <text:p text:style-name="P13"><text:span text:style-name="T9">*, *::before, *::after {</text:span></text:p>
      <text:p text:style-name="P13"><text:span text:style-name="T9"><text:s text:c="2"/>box-sizing: border-box;</text:span></text:p>
      <text:p text:style-name="P13"><text:span text:style-name="T9"><text:s text:c="2"/>margin: 0;</text:span></text:p>
      <text:p text:style-name="P13"><text:span text:style-name="T9"><text:s text:c="2"/>padding: 0;</text:span></text:p>
      <text:p text:style-name="P13"><text:span text:style-name="T9">}</text:span></text:p>
      <text:p text:style-name="P13"><text:span text:style-name="T9"><text:s/></text:span></text:p>
      <text:p text:style-name="P13"><text:span text:style-name="T9">html {</text:span></text:p>
      <text:p text:style-name="P13"><text:span text:style-name="T9"><text:s text:c="2"/>-webkit-text-size-adjust: 100%;</text:span></text:p>
      <text:p text:style-name="P13"><text:soft-page-break/><text:span text:style-name="T9">}</text:span></text:p>
      <text:p text:style-name="P13"><text:span text:style-name="T9"><text:s/></text:span></text:p>
      <text:p text:style-name="P13"><text:span text:style-name="T9">body {</text:span></text:p>
      <text:p text:style-name="P13"><text:span text:style-name="T9"><text:s text:c="2"/>min-height: 100svh;</text:span></text:p>
      <text:p text:style-name="P13"><text:span text:style-name="T9"><text:s text:c="2"/>background-color: var(--color-bg-primary);</text:span></text:p>
      <text:p text:style-name="P13"><text:span text:style-name="T9"><text:s text:c="2"/>color: var(--color-text-primary);</text:span></text:p>
      <text:p text:style-name="P13"><text:span text:style-name="T9"><text:s text:c="2"/>transition: background-color 0.2s ease, color 0.2s ease;</text:span></text:p>
      <text:p text:style-name="P13"><text:span text:style-name="T9">}</text:span></text:p>
      <text:p text:style-name="P13"><text:span text:style-name="T9"><text:s/></text:span></text:p>
      <text:p text:style-name="P13"><text:span text:style-name="T9">img, picture, video, canvas, svg {</text:span></text:p>
      <text:p text:style-name="P13"><text:span text:style-name="T9"><text:s text:c="2"/>display: block;</text:span></text:p>
      <text:p text:style-name="P13"><text:span text:style-name="T9"><text:s text:c="2"/>max-width: 100%;</text:span></text:p>
      <text:p text:style-name="P13"><text:span text:style-name="T9">}</text:span></text:p>
      <text:p text:style-name="P3">styles/base/_typography.scss</text:p>
      <text:p text:style-name="P13"><text:span text:style-name="T9">@use '../abstracts' as *;</text:span></text:p>
      <text:p text:style-name="P13"><text:span text:style-name="T9"><text:s/></text:span></text:p>
      <text:p text:style-name="P13"><text:span text:style-name="T9">body {</text:span></text:p>
      <text:p text:style-name="P13"><text:span text:style-name="T9"><text:s text:c="2"/>font-family: $font-primary;</text:span></text:p>
      <text:p text:style-name="P13"><text:span text:style-name="T9"><text:s text:c="2"/>font-size: rem(16px);</text:span></text:p>
      <text:p text:style-name="P13"><text:span text:style-name="T9"><text:s text:c="2"/>line-height: 1.5;</text:span></text:p>
      <text:p text:style-name="P13"><text:span text:style-name="T9">}</text:span></text:p>
      <text:p text:style-name="P13"><text:soft-page-break/><text:span text:style-name="T9"><text:s/></text:span></text:p>
      <text:p text:style-name="P13"><text:span text:style-name="T9">h1, h2, h3, h4 {</text:span></text:p>
      <text:p text:style-name="P13"><text:span text:style-name="T9"><text:s text:c="2"/>font-weight: 700;</text:span></text:p>
      <text:p text:style-name="P13"><text:span text:style-name="T9"><text:s text:c="2"/>line-height: 1.2;</text:span></text:p>
      <text:p text:style-name="P13"><text:span text:style-name="T9">}</text:span></text:p>
      <text:p text:style-name="P13"><text:span text:style-name="T9"><text:s/></text:span></text:p>
      <text:p text:style-name="P13"><text:span text:style-name="T9">h1 { font-size: rem(40px); }</text:span></text:p>
      <text:p text:style-name="P13"><text:span text:style-name="T9">h2 { font-size: rem(32px); }</text:span></text:p>
      <text:p text:style-name="P13"><text:span text:style-name="T9">h3 { font-size: rem(24px); }</text:span></text:p>
      <text:p text:style-name="P13"><text:span text:style-name="T9">h4 { font-size: rem(20px); }</text:span></text:p>
      <text:p text:style-name="P3">styles/base/_index.scss</text:p>
      <text:p text:style-name="P13"><text:span text:style-name="T9">@forward 'reset';</text:span></text:p>
      <text:p text:style-name="P13"><text:span text:style-name="T9">@forward 'typography';</text:span></text:p>
      <text:p text:style-name="P3">styles/globals.scss</text:p>
      <text:p text:style-name="P13"><text:span text:style-name="T9">@use 'themes';</text:span></text:p>
      <text:p text:style-name="P13"><text:span text:style-name="T9">@use 'base';</text:span></text:p>
      <text:p text:style-name="P3">components/ui/Button/Button.module.scss</text:p>
      <text:p text:style-name="P13"><text:span text:style-name="T9">@use '@/styles/abstracts' as *;</text:span></text:p>
      <text:p text:style-name="P13"><text:span text:style-name="T9"><text:s/></text:span></text:p>
      <text:p text:style-name="P13"><text:span text:style-name="T9">.button {</text:span></text:p>
      <text:p text:style-name="P13"><text:span text:style-name="T9"><text:s text:c="2"/>@include flex(row, center, center, spacing('2'));</text:span></text:p>
      <text:p text:style-name="P13"><text:soft-page-break/><text:span text:style-name="T9"><text:s text:c="2"/>padding: spacing('2') spacing('4');</text:span></text:p>
      <text:p text:style-name="P13"><text:span text:style-name="T9"><text:s text:c="2"/>border: none;</text:span></text:p>
      <text:p text:style-name="P13"><text:span text:style-name="T9"><text:s text:c="2"/>border-radius: radius('md');</text:span></text:p>
      <text:p text:style-name="P13"><text:span text:style-name="T9"><text:s text:c="2"/>font-family: $font-primary;</text:span></text:p>
      <text:p text:style-name="P13"><text:span text:style-name="T9"><text:s text:c="2"/>font-weight: 600;</text:span></text:p>
      <text:p text:style-name="P13"><text:span text:style-name="T9"><text:s text:c="2"/>cursor: pointer;</text:span></text:p>
      <text:p text:style-name="P13"><text:span text:style-name="T9"><text:s text:c="2"/>transition: $transition-base;</text:span></text:p>
      <text:p text:style-name="P13"><text:span text:style-name="T9"><text:s/></text:span></text:p>
      <text:p text:style-name="P13"><text:span text:style-name="T9"><text:s text:c="2"/>@include respond-to('md') {</text:span></text:p>
      <text:p text:style-name="P13"><text:span text:style-name="T9"><text:s text:c="4"/>padding: spacing('3') spacing('5');</text:span></text:p>
      <text:p text:style-name="P13"><text:span text:style-name="T9"><text:s text:c="2"/>}</text:span></text:p>
      <text:p text:style-name="P13"><text:span text:style-name="T9">}</text:span></text:p>
      <text:p text:style-name="P13"><text:span text:style-name="T9"><text:s/></text:span></text:p>
      <text:p text:style-name="P13"><text:span text:style-name="T9">.primary {</text:span></text:p>
      <text:p text:style-name="P13"><text:span text:style-name="T9"><text:s text:c="2"/>@include button-variant(var(--color-accent));</text:span></text:p>
      <text:p text:style-name="P13"><text:span text:style-name="T9">}</text:span></text:p>
      <text:p text:style-name="P13"><text:span text:style-name="T9"><text:s/></text:span></text:p>
      <text:p text:style-name="P13"><text:span text:style-name="T9">.danger {</text:span></text:p>
      <text:p text:style-name="P13"><text:span text:style-name="T9"><text:s text:c="2"/>@include button-variant(var(--color-danger));</text:span></text:p>
      <text:p text:style-name="P13"><text:span text:style-name="T9">}</text:span></text:p>
      <text:p text:style-name="P3">components/ui/Card/Card.module.scss</text:p>
      <text:p text:style-name="P13"><text:soft-page-break/><text:span text:style-name="T9">@use '@/styles/abstracts' as *;</text:span></text:p>
      <text:p text:style-name="P13"><text:span text:style-name="T9"><text:s/></text:span></text:p>
      <text:p text:style-name="P13"><text:span text:style-name="T9">.card {</text:span></text:p>
      <text:p text:style-name="P13"><text:span text:style-name="T9"><text:s text:c="2"/>padding: spacing('4');</text:span></text:p>
      <text:p text:style-name="P13"><text:span text:style-name="T9"><text:s text:c="2"/>border-radius: radius('lg');</text:span></text:p>
      <text:p text:style-name="P13"><text:span text:style-name="T9"><text:s text:c="2"/>border: 1px solid var(--color-border);</text:span></text:p>
      <text:p text:style-name="P13"><text:span text:style-name="T9"><text:s text:c="2"/>background-color: var(--color-bg-secondary);</text:span></text:p>
      <text:p text:style-name="P13"><text:span text:style-name="T9">}</text:span></text:p>
      <text:p text:style-name="P13"><text:span text:style-name="T9"><text:s/></text:span></text:p>
      <text:p text:style-name="P13"><text:span text:style-name="T9">.title {</text:span></text:p>
      <text:p text:style-name="P13"><text:span text:style-name="T9"><text:s text:c="2"/>@include truncate(2);</text:span></text:p>
      <text:p text:style-name="P13"><text:span text:style-name="T9"><text:s text:c="2"/>font-weight: 700;</text:span></text:p>
      <text:p text:style-name="P13"><text:span text:style-name="T9">}</text:span></text:p>
      <text:p text:style-name="P3">lib/theme.ts</text:p>
      <text:p text:style-name="P13"><text:span text:style-name="T9">export type Theme = 'light' | 'dark'</text:span></text:p>
      <text:p text:style-name="P13"><text:span text:style-name="T9"><text:s/></text:span></text:p>
      <text:p text:style-name="P13"><text:span text:style-name="T9">export function setTheme(theme: Theme) {</text:span></text:p>
      <text:p text:style-name="P13"><text:span text:style-name="T9"><text:s text:c="2"/>document.documentElement.setAttribute('data-theme', theme)</text:span></text:p>
      <text:p text:style-name="P13"><text:span text:style-name="T9"><text:s text:c="2"/>localStorage.setItem('theme', theme)</text:span></text:p>
      <text:p text:style-name="P13"><text:span text:style-name="T9">}</text:span></text:p>
      <text:p text:style-name="P13"><text:span text:style-name="T9"><text:s/></text:span></text:p>
      <text:p text:style-name="P13"><text:soft-page-break/><text:span text:style-name="T9">export function getStoredTheme(): Theme | null {</text:span></text:p>
      <text:p text:style-name="P13"><text:span text:style-name="T9"><text:s text:c="2"/>return localStorage.getItem('theme') as Theme | null</text:span></text:p>
      <text:p text:style-name="P13"><text:span text:style-name="T9">}</text:span></text:p>
      <text:p text:style-name="P3">next.config.js</text:p>
      <text:p text:style-name="P13"><text:span text:style-name="T9">/** @type {import('next').NextConfig} */</text:span></text:p>
      <text:p text:style-name="P13"><text:span text:style-name="T9">const nextConfig = {</text:span></text:p>
      <text:p text:style-name="P13"><text:span text:style-name="T9"><text:s text:c="2"/>sassOptions: {</text:span></text:p>
      <text:p text:style-name="P13"><text:span text:style-name="T9"><text:s text:c="4"/>includePaths: ['./styles'],</text:span></text:p>
      <text:p text:style-name="P13"><text:span text:style-name="T9"><text:s text:c="2"/>},</text:span></text:p>
      <text:p text:style-name="P13"><text:span text:style-name="T9">}</text:span></text:p>
      <text:p text:style-name="P13"><text:span text:style-name="T9"><text:s/></text:span></text:p>
      <text:p text:style-name="P13"><text:span text:style-name="T9">module.exports = nextConfig</text:span></text:p>
      <text:p text:style-name="P2"><text:bookmark-start text:name="sec8"/>8. O que é o _tokens.scss<text:bookmark-end text:name="sec8"/></text:p>
      <text:p text:style-name="P9"><text:span text:style-name="T5">👤 Pergunta do usuário</text:span></text:p>
      <text:p text:style-name="P10"><text:span text:style-name="T6">primeira pergunta, o que é o _tokens em themes</text:span></text:p>
      <text:p text:style-name="P11"><text:span text:style-name="T7">🤖 Resposta</text:span></text:p>
      <text:p text:style-name="P12"><text:span text:style-name="T8">O _tokens.scss é onde ficam só os valores brutos de cada tema — as cores reais, sem nenhuma lógica de aplicação. Ele não gera nenhum CSS sozinho; é só um "dicionário" de dados.</text:span></text:p>
      <text:p text:style-name="P13"><text:span text:style-name="T9">// styles/themes/_tokens.scss</text:span></text:p>
      <text:p text:style-name="P13"><text:span text:style-name="T9"><text:s/></text:span></text:p>
      <text:p text:style-name="P13"><text:span text:style-name="T9">$light: (</text:span></text:p>
      <text:p text:style-name="P13"><text:span text:style-name="T9"><text:s text:c="2"/>'bg-primary': #ffffff,</text:span></text:p>
      <text:p text:style-name="P13"><text:span text:style-name="T9"><text:s text:c="2"/>'text-primary': #111111,</text:span></text:p>
      <text:p text:style-name="P13"><text:span text:style-name="T9"><text:s text:c="2"/>'accent': #0070f3,</text:span></text:p>
      <text:p text:style-name="P13"><text:span text:style-name="T9"><text:s text:c="2"/>// ...</text:span></text:p>
      <text:p text:style-name="P13"><text:span text:style-name="T9">);</text:span></text:p>
      <text:p text:style-name="P13"><text:span text:style-name="T9"><text:s/></text:span></text:p>
      <text:p text:style-name="P13"><text:span text:style-name="T9">$dark: (</text:span></text:p>
      <text:p text:style-name="P13"><text:span text:style-name="T9"><text:s text:c="2"/>'bg-primary': #0d0d0d,</text:span></text:p>
      <text:p text:style-name="P13"><text:span text:style-name="T9"><text:s text:c="2"/>'text-primary': #f5f5f5,</text:span></text:p>
      <text:p text:style-name="P13"><text:span text:style-name="T9"><text:s text:c="2"/>'accent': #3b9eff,</text:span></text:p>
      <text:p text:style-name="P13"><text:span text:style-name="T9"><text:s text:c="2"/>// ...</text:span></text:p>
      <text:p text:style-name="P13"><text:span text:style-name="T9">);</text:span></text:p>
      <text:p text:style-name="P3">Por que separar isso num arquivo próprio</text:p>
      <text:list text:continue-numbering="true" text:style-name="WWNum1">
        <text:list-item>
          <text:p text:style-name="P4"><text:soft-page-break/>_tokens.scss → só guarda os dados (o "o quê": quais cores existem em cada tema)</text:p>
        </text:list-item>
        <text:list-item>
          <text:p text:style-name="P4">_light.scss / _dark.scss → pegam esses dados e decidem "o como": transformar em variáveis CSS, aplicar em :root, [data-theme='dark'], etc.</text:p>
        </text:list-item>
      </text:list>
      <text:p text:style-name="P13"><text:span text:style-name="T9">// styles/themes/_light.scss</text:span></text:p>
      <text:p text:style-name="P13"><text:span text:style-name="T9"><text:s/></text:span></text:p>
      <text:p text:style-name="P13"><text:span text:style-name="T9">@use 'tokens';</text:span></text:p>
      <text:p text:style-name="P13"><text:span text:style-name="T9"><text:s/></text:span></text:p>
      <text:p text:style-name="P13"><text:span text:style-name="T9">:root,</text:span></text:p>
      <text:p text:style-name="P13"><text:span text:style-name="T9">[data-theme='light'] {</text:span></text:p>
      <text:p text:style-name="P13"><text:span text:style-name="T9"><text:s text:c="2"/>@each $key, $value in tokens.$light {</text:span></text:p>
      <text:p text:style-name="P13"><text:span text:style-name="T9"><text:s text:c="4"/>--color-#{$key}: #{$value};</text:span></text:p>
      <text:p text:style-name="P13"><text:span text:style-name="T9"><text:s text:c="2"/>}</text:span></text:p>
      <text:p text:style-name="P13"><text:span text:style-name="T9">}</text:span></text:p>
      <text:p text:style-name="P3">Por que isso é útil na prática</text:p>
      <text:list text:continue-numbering="true" text:style-name="WWNum1">
        <text:list-item>
          <text:p text:style-name="P4">Se amanhã você quiser adicionar um terceiro tema (ex: "alto contraste"), você só cria um $high-contrast dentro de _tokens.scss — não mexe na lógica de geração de CSS.</text:p>
        </text:list-item>
        <text:list-item>
          <text:p text:style-name="P4">Se quiser reaproveitar as cores em outro contexto (ex: gerar um config do Tailwind, ou exportar pra JSON), o _tokens.scss é a única fonte que você precisa ler — é puro dado, sem mixin, sem seletor, sem @media.</text:p>
        </text:list-item>
        <text:list-item>
          <text:p text:style-name="P4">Fica fácil comparar os dois temas lado a lado, porque as chaves são as mesmas nos dois mapas — só o valor muda.</text:p>
        </text:list-item>
      </text:list>
      <text:p text:style-name="P12"><text:span text:style-name="T8">Basicamente: _tokens.scss = a paleta, _light.scss/_dark.scss = onde essa paleta vira CSS de verdade.</text:span></text:p>
      <text:p text:style-name="P2"><text:bookmark-start text:name="sec9"/>9. Por que themes/_index.scss usa @forward para tokens e @use para light/dark<text:bookmark-end text:name="sec9"/></text:p>
      <text:p text:style-name="P9"><text:span text:style-name="T5">👤 Pergunta do usuário</text:span></text:p>
      <text:p text:style-name="P10"><text:span text:style-name="T6">segunda pergunta, porque em _index no themes tem o forward para token e use para os outros dois</text:span></text:p>
      <text:p text:style-name="P11"><text:span text:style-name="T7">🤖 Resposta</text:span></text:p>
      <text:p text:style-name="P3">A diferença básica</text:p>
      <text:list text:continue-numbering="true" text:style-name="WWNum1">
        <text:list-item>
          <text:p text:style-name="P4">@use: importa o arquivo pra você usar ali dentro (variáveis, mixins, funções) — mas não repassa nada pra quem importar o seu arquivo depois.</text:p>
        </text:list-item>
        <text:list-item>
          <text:p text:style-name="P4">@forward: pega o conteúdo de um arquivo e repassa pra frente, como se fosse parte do arquivo atual — quem importar o seu arquivo também tem acesso ao que foi "forwardado".</text:p>
        </text:list-item>
      </text:list>
      <text:p text:style-name="P3">Por que _tokens leva @forward</text:p>
      <text:p text:style-name="P13"><text:span text:style-name="T9">// styles/themes/_index.scss</text:span></text:p>
      <text:p text:style-name="P13"><text:span text:style-name="T9"><text:s/></text:span></text:p>
      <text:p text:style-name="P13"><text:span text:style-name="T9">@forward 'tokens';</text:span></text:p>
      <text:p text:style-name="P13"><text:span text:style-name="T9">@use 'light';</text:span></text:p>
      <text:p text:style-name="P13"><text:span text:style-name="T9">@use 'dark';</text:span></text:p>
      <text:p text:style-name="P12"><text:span text:style-name="T8">$light e $dark são dados que outros arquivos podem querer consultar diretamente — por exemplo, pegar um valor específico do tema sem depender da variável CSS:</text:span></text:p>
      <text:p text:style-name="P13"><text:span text:style-name="T9">// algum componente</text:span></text:p>
      <text:p text:style-name="P13"><text:span text:style-name="T9">@use '@/styles/themes' as themes;</text:span></text:p>
      <text:p text:style-name="P13"><text:span text:style-name="T9"><text:s/></text:span></text:p>
      <text:p text:style-name="P13"><text:span text:style-name="T9">.algo {</text:span></text:p>
      <text:p text:style-name="P13"><text:span text:style-name="T9"><text:s text:c="2"/>// acesso direto ao mapa, via themes.$light</text:span></text:p>
      <text:p text:style-name="P13"><text:span text:style-name="T9"><text:s text:c="2"/>border-color: map-get(themes.$light, 'accent');</text:span></text:p>
      <text:p text:style-name="P13"><text:span text:style-name="T9">}</text:span></text:p>
      <text:p text:style-name="P12"><text:soft-page-break/><text:span text:style-name="T8">Isso só funciona porque _index.scss fez @forward 'tokens' — ele expôs $light e $dark pra quem importar themes. Se fosse @use, essas variáveis ficariam presas dentro do _index.scss e ninguém de fora conseguiria acessá-las.</text:span></text:p>
      <text:p text:style-name="P3">Por que _light e _dark levam @use</text:p>
      <text:p text:style-name="P13"><text:span text:style-name="T9">@use 'light';</text:span></text:p>
      <text:p text:style-name="P13"><text:span text:style-name="T9">@use 'dark';</text:span></text:p>
      <text:p text:style-name="P12"><text:span text:style-name="T8">Esses dois arquivos não têm nada pra oferecer como dado reutilizável — eles só têm efeito colateral: geram CSS. Você não precisa acessar "o conteúdo" de _light.scss de fora — só precisa que ele execute e gere aquele bloco de CSS.</text:span></text:p>
      <text:p text:style-name="P3">Resumindo a regra mental</text:p>
      <table:table table:name="Table4" table:style-name="Table4">
        <table:table-column table:style-name="Table4.A"/>
        <table:table-column table:style-name="Table4.B"/>
        <table:table-column table:style-name="Table4.A" table:number-columns-repeated="2"/>
        <table:table-header-rows>
          <table:table-row table:style-name="Table4.1">
            <table:table-cell table:style-name="Table4.A1" office:value-type="string">
              <text:p text:style-name="Standard"><text:span text:style-name="T10">Arquivo</text:span></text:p>
            </table:table-cell>
            <table:table-cell table:style-name="Table4.A1" office:value-type="string">
              <text:p text:style-name="Standard"><text:span text:style-name="T10">O que tem</text:span></text:p>
            </table:table-cell>
            <table:table-cell table:style-name="Table4.A1" office:value-type="string">
              <text:p text:style-name="Standard"><text:span text:style-name="T10">Diretiva</text:span></text:p>
            </table:table-cell>
            <table:table-cell table:style-name="Table4.A1" office:value-type="string">
              <text:p text:style-name="Standard"><text:span text:style-name="T10">Por quê</text:span></text:p>
            </table:table-cell>
          </table:table-row>
        </table:table-header-rows>
        <table:table-row table:style-name="Table4.1">
          <table:table-cell table:style-name="Table4.A2" office:value-type="string">
            <text:p text:style-name="Standard"><text:span text:style-name="T11">_tokens.scss</text:span></text:p>
          </table:table-cell>
          <table:table-cell table:style-name="Table4.B2" office:value-type="string">
            <text:p text:style-name="Standard"><text:span text:style-name="T11">dados ($light, $dark) reutilizáveis</text:span></text:p>
          </table:table-cell>
          <table:table-cell table:style-name="Table4.C2" office:value-type="string">
            <text:p text:style-name="Standard"><text:span text:style-name="T11">@forward</text:span></text:p>
          </table:table-cell>
          <table:table-cell table:style-name="Table4.D2" office:value-type="string">
            <text:p text:style-name="Standard"><text:span text:style-name="T11">outros arquivos podem precisar consultar esses mapas diretamente</text:span></text:p>
          </table:table-cell>
        </table:table-row>
        <table:table-row table:style-name="Table4.1">
          <table:table-cell table:style-name="Table4.A3" office:value-type="string">
            <text:p text:style-name="Standard"><text:span text:style-name="T11">_light.scss / _dark.scss</text:span></text:p>
          </table:table-cell>
          <table:table-cell table:style-name="Table4.B3" office:value-type="string">
            <text:p text:style-name="Standard"><text:span text:style-name="T11">só gera CSS via seletor</text:span></text:p>
          </table:table-cell>
          <table:table-cell table:style-name="Table4.C3" office:value-type="string">
            <text:p text:style-name="Standard"><text:span text:style-name="T11">@use</text:span></text:p>
          </table:table-cell>
          <table:table-cell table:style-name="Table4.D3" office:value-type="string">
            <text:p text:style-name="Standard"><text:span text:style-name="T11">só precisa "rodar", não precisa expor nada</text:span></text:p>
          </table:table-cell>
        </table:table-row>
      </table:table>
      <text:p text:style-name="P14"/>
      <text:p text:style-name="P12"><text:span text:style-name="T8">Essa é uma prática comum no Sass moderno: @forward para dados/API que você quer expor, @use para lógica que só precisa ser executada.</text:span></text:p>
      <text:p text:style-name="P2"><text:bookmark-start text:name="sec10"/>10. Onde o _index.scss de themes é importado<text:bookmark-end text:name="sec10"/></text:p>
      <text:p text:style-name="P9"><text:span text:style-name="T5">👤 Pergunta do usuário</text:span></text:p>
      <text:p text:style-name="P10"><text:span text:style-name="T6">então o index de themes é importado aonde</text:span></text:p>
      <text:p text:style-name="P11"><text:span text:style-name="T7">🤖 Resposta</text:span></text:p>
      <text:p text:style-name="P12"><text:span text:style-name="T8">O themes/_index.scss é importado no styles/globals.scss:</text:span></text:p>
      <text:p text:style-name="P13"><text:span text:style-name="T9">// styles/globals.scss</text:span></text:p>
      <text:p text:style-name="P13"><text:span text:style-name="T9"><text:s/></text:span></text:p>
      <text:p text:style-name="P13"><text:span text:style-name="T9">@use 'themes';</text:span></text:p>
      <text:p text:style-name="P13"><text:span text:style-name="T9">@use 'base';</text:span></text:p>
      <text:p text:style-name="P3">Por que @use 'themes' (sem apontar o arquivo) já pega o _index.scss</text:p>
      <text:p text:style-name="P12"><text:span text:style-name="T8">Quando você faz @use 'nome-da-pasta' (sem especificar arquivo), o Sass procura automaticamente por um arquivo _index.scss dentro dessa pasta e usa ele como "porta de entrada". É uma convenção do Sass moderno, parecida com index.js em pastas JS/Node.</text:span></text:p>
      <text:p text:style-name="P13"><text:span text:style-name="T9">styles/globals.scss</text:span></text:p>
      <text:p text:style-name="P13"><text:span text:style-name="T9"><text:s text:c="2"/>└── @use 'themes' <text:s/>→ <text:s/>resolve para <text:s/>→ <text:s/>styles/themes/_index.scss</text:span></text:p>
      <text:p text:style-name="P3">E o globals.scss, onde ele entra?</text:p>
      <text:p text:style-name="P12"><text:span text:style-name="T8">Ele é importado uma única vez, no ponto de entrada raiz da aplicação — no App Router isso é o layout.tsx:</text:span></text:p>
      <text:p text:style-name="P13"><text:span text:style-name="T9">// app/layout.tsx</text:span></text:p>
      <text:p text:style-name="P13"><text:span text:style-name="T9"><text:s/></text:span></text:p>
      <text:p text:style-name="P13"><text:span text:style-name="T9">import '@/styles/globals.scss'</text:span></text:p>
      <text:p text:style-name="P13"><text:span text:style-name="T9"><text:s/></text:span></text:p>
      <text:p text:style-name="P13"><text:span text:style-name="T9">export default function RootLayout({ children }) {</text:span></text:p>
      <text:p text:style-name="P13"><text:span text:style-name="T9"><text:s text:c="2"/>return (</text:span></text:p>
      <text:p text:style-name="P13"><text:soft-page-break/><text:span text:style-name="T9"><text:s text:c="4"/>&lt;html lang="pt-BR"&gt;</text:span></text:p>
      <text:p text:style-name="P13"><text:span text:style-name="T9"><text:s text:c="6"/>&lt;body&gt;{children}&lt;/body&gt;</text:span></text:p>
      <text:p text:style-name="P13"><text:span text:style-name="T9"><text:s text:c="4"/>&lt;/html&gt;</text:span></text:p>
      <text:p text:style-name="P13"><text:span text:style-name="T9"><text:s text:c="2"/>)</text:span></text:p>
      <text:p text:style-name="P13"><text:span text:style-name="T9">}</text:span></text:p>
      <text:p text:style-name="P3">A cadeia completa, de cima a baixo</text:p>
      <text:p text:style-name="P13"><text:span text:style-name="T9">app/layout.tsx</text:span></text:p>
      <text:p text:style-name="P13"><text:span text:style-name="T9"><text:s text:c="2"/>→ import '@/styles/globals.scss'</text:span></text:p>
      <text:p text:style-name="P13"><text:span text:style-name="T9"><text:s text:c="6"/>→ @use 'themes' <text:s text:c="2"/>→ styles/themes/_index.scss</text:span></text:p>
      <text:p text:style-name="P13"><text:span text:style-name="T9"><text:s text:c="10"/>→ @forward 'tokens' <text:s text:c="2"/>(expõe $light / $dark)</text:span></text:p>
      <text:p text:style-name="P13"><text:span text:style-name="T9"><text:s text:c="10"/>→ @use 'light' <text:s text:c="7"/>(gera CSS de :root e [data-theme='light'])</text:span></text:p>
      <text:p text:style-name="P13"><text:span text:style-name="T9"><text:s text:c="10"/>→ @use 'dark' <text:s text:c="8"/>(gera CSS de [data-theme='dark'])</text:span></text:p>
      <text:p text:style-name="P13"><text:span text:style-name="T9"><text:s text:c="6"/>→ @use 'base' <text:s text:c="4"/>→ styles/base/_index.scss</text:span></text:p>
      <text:p text:style-name="P13"><text:span text:style-name="T9"><text:s text:c="10"/>→ @forward 'reset'</text:span></text:p>
      <text:p text:style-name="P13"><text:span text:style-name="T9"><text:s text:c="10"/>→ @forward 'typography'</text:span></text:p>
      <text:p text:style-name="P12"><text:span text:style-name="T8">Como o layout.tsx é carregado em todas as páginas (é o layout raiz), o CSS gerado por themes e base fica disponível globalmente — as variáveis CSS existem em qualquer componente da aplicação.</text:span></text:p>
      <text:p text:style-name="P2"><text:bookmark-start text:name="sec11"/>11. Por que o globals.scss não importa o abstracts<text:bookmark-end text:name="sec11"/></text:p>
      <text:p text:style-name="P9"><text:span text:style-name="T5">👤 Pergunta do usuário</text:span></text:p>
      <text:p text:style-name="P10"><text:span text:style-name="T6">o globals não deveria ter o abstracts tbm?</text:span></text:p>
      <text:p text:style-name="P11"><text:span text:style-name="T7">🤖 Resposta</text:span></text:p>
      <text:p text:style-name="P12"><text:span text:style-name="T8">A resposta é não, e tem um motivo importante ligado a como @use funciona (diferente do antigo @import).</text:span></text:p>
      <text:p text:style-name="P3">O motivo principal: abstracts não gera nenhum CSS sozinho</text:p>
      <text:p text:style-name="P12"><text:span text:style-name="T8">abstracts só tem definições — variáveis, mixins, funções. Não tem nenhum seletor, nenhum @each gerando regras CSS. Se você fizesse:</text:span></text:p>
      <text:p text:style-name="P13"><text:span text:style-name="T9">// styles/globals.scss</text:span></text:p>
      <text:p text:style-name="P13"><text:span text:style-name="T9">@use 'abstracts'; <text:s/>// ← isso não geraria NENHUMA linha de CSS</text:span></text:p>
      <text:p text:style-name="P13"><text:span text:style-name="T9">@use 'themes';</text:span></text:p>
      <text:p text:style-name="P13"><text:span text:style-name="T9">@use 'base';</text:span></text:p>
      <text:p text:style-name="P12"><text:span text:style-name="T8">O compilador processaria o arquivo, mas nada seria emitido no CSS final, porque variáveis, mixins e funções são só "receitas" — só viram CSS quando algum outro arquivo efetivamente os usa dentro de um seletor.</text:span></text:p>
      <text:p text:style-name="P12"><text:span text:style-name="T8">Compare com themes e base, que rodam e produzem saída real: _light.scss gera :root { --color-x: ...; }, _reset.scss gera * { margin: 0; }.</text:span></text:p>
      <text:p text:style-name="P3">O motivo mais importante: @use não "propaga" pra baixo</text:p>
      <text:p text:style-name="P12"><text:span text:style-name="T8">Essa é a diferença crucial em relação ao @import antigo. Com @use, cada arquivo tem seu próprio escopo isolado — importar algo no globals.scss não dá acesso a esse conteúdo pra quem importar o globals.scss depois.</text:span></text:p>
      <text:p text:style-name="P12"><text:span text:style-name="T8">Mesmo que você colocasse @use 'abstracts' no globals.scss, isso não faria o Button.module.scss "herdar" acesso a spacing() ou @include flex. Cada arquivo que precisa de algo de abstracts precisa importar diretamente, onde for usar:</text:span></text:p>
      <text:p text:style-name="P13"><text:span text:style-name="T9">// styles/base/_typography.scss</text:span></text:p>
      <text:p text:style-name="P13"><text:span text:style-name="T9">@use '../abstracts' as *; <text:s text:c="2"/>// ← precisa importar aqui, não herda do globals.scss</text:span></text:p>
      <text:p text:style-name="P13"><text:span text:style-name="T9"><text:s/></text:span></text:p>
      <text:p text:style-name="P13"><text:span text:style-name="T9">h1 { font-size: rem(40px); }</text:span></text:p>
      <text:p text:style-name="P13"><text:span text:style-name="T9">// components/ui/Button/Button.module.scss</text:span></text:p>
      <text:p text:style-name="P13"><text:soft-page-break/><text:span text:style-name="T9">@use '@/styles/abstracts' as *; <text:s text:c="2"/>// ← precisa importar aqui também</text:span></text:p>
      <text:p text:style-name="P13"><text:span text:style-name="T9"><text:s/></text:span></text:p>
      <text:p text:style-name="P13"><text:span text:style-name="T9">.button { padding: spacing('2'); }</text:span></text:p>
      <text:p text:style-name="P3">Resumindo a regra</text:p>
      <table:table table:name="Table5" table:style-name="Table5">
        <table:table-column table:style-name="Table5.A"/>
        <table:table-column table:style-name="Table5.B" table:number-columns-repeated="2"/>
        <table:table-header-rows>
          <table:table-row table:style-name="Table5.1">
            <table:table-cell table:style-name="Table5.A1" office:value-type="string">
              <text:p text:style-name="Standard"><text:span text:style-name="T10">Pasta</text:span></text:p>
            </table:table-cell>
            <table:table-cell table:style-name="Table5.A1" office:value-type="string">
              <text:p text:style-name="Standard"><text:span text:style-name="T10">Gera CSS sozinha?</text:span></text:p>
            </table:table-cell>
            <table:table-cell table:style-name="Table5.A1" office:value-type="string">
              <text:p text:style-name="Standard"><text:span text:style-name="T10">Precisa estar no globals.scss?</text:span></text:p>
            </table:table-cell>
          </table:table-row>
        </table:table-header-rows>
        <table:table-row table:style-name="Table5.1">
          <table:table-cell table:style-name="Table5.A2" office:value-type="string">
            <text:p text:style-name="Standard"><text:span text:style-name="T11">themes</text:span></text:p>
          </table:table-cell>
          <table:table-cell table:style-name="Table5.B2" office:value-type="string">
            <text:p text:style-name="Standard"><text:span text:style-name="T11">Sim (variáveis CSS em :root)</text:span></text:p>
          </table:table-cell>
          <table:table-cell table:style-name="Table5.C2" office:value-type="string">
            <text:p text:style-name="Standard"><text:span text:style-name="T11">Sim</text:span></text:p>
          </table:table-cell>
        </table:table-row>
        <table:table-row table:style-name="Table5.1">
          <table:table-cell table:style-name="Table5.A3" office:value-type="string">
            <text:p text:style-name="Standard"><text:span text:style-name="T11">base</text:span></text:p>
          </table:table-cell>
          <table:table-cell table:style-name="Table5.B3" office:value-type="string">
            <text:p text:style-name="Standard"><text:span text:style-name="T11">Sim (reset, tipografia)</text:span></text:p>
          </table:table-cell>
          <table:table-cell table:style-name="Table5.C3" office:value-type="string">
            <text:p text:style-name="Standard"><text:span text:style-name="T11">Sim</text:span></text:p>
          </table:table-cell>
        </table:table-row>
        <table:table-row table:style-name="Table5.1">
          <table:table-cell table:style-name="Table5.A4" office:value-type="string">
            <text:p text:style-name="Standard"><text:span text:style-name="T11">abstracts</text:span></text:p>
          </table:table-cell>
          <table:table-cell table:style-name="Table5.B4" office:value-type="string">
            <text:p text:style-name="Standard"><text:span text:style-name="T11">Não (só definições)</text:span></text:p>
          </table:table-cell>
          <table:table-cell table:style-name="Table5.C4" office:value-type="string">
            <text:p text:style-name="Standard"><text:span text:style-name="T11">Não — cada consumidor importa direto</text:span></text:p>
          </table:table-cell>
        </table:table-row>
      </table:table>
      <text:p text:style-name="P14"/>
      <text:p text:style-name="P12"><text:span text:style-name="T8">abstracts funciona mais como uma "biblioteca compartilhada": fica disponível pra qualquer arquivo que queira usar, mas cada um precisa "puxar" explicitamente — não existe importação global de mixin/função no Sass moderno, isso é intencional.</text:span></text:p>
      <text:p text:style-name="P2"><text:bookmark-start text:name="sec12"/>12. Confirmando: cada .module.scss precisa importar abstracts com @use<text:bookmark-end text:name="sec12"/></text:p>
      <text:p text:style-name="P9"><text:span text:style-name="T5">👤 Pergunta do usuário</text:span></text:p>
      <text:p text:style-name="P10"><text:span text:style-name="T6">então se eu quiser usar variaveis em button.module eu preciso importar diretamente com @use certo</text:span></text:p>
      <text:p text:style-name="P11"><text:span text:style-name="T7">🤖 Resposta</text:span></text:p>
      <text:p text:style-name="P12"><text:span text:style-name="T8">Exatamente, é isso mesmo.</text:span></text:p>
      <text:p text:style-name="P13"><text:span text:style-name="T9">// components/ui/Button/Button.module.scss</text:span></text:p>
      <text:p text:style-name="P13"><text:span text:style-name="T9"><text:s/></text:span></text:p>
      <text:p text:style-name="P13"><text:span text:style-name="T9">@use '@/styles/abstracts' as *;</text:span></text:p>
      <text:p text:style-name="P13"><text:span text:style-name="T9"><text:s/></text:span></text:p>
      <text:p text:style-name="P13"><text:span text:style-name="T9">.button {</text:span></text:p>
      <text:p text:style-name="P13"><text:span text:style-name="T9"><text:s text:c="2"/>padding: spacing('2') spacing('4');</text:span></text:p>
      <text:p text:style-name="P13"><text:span text:style-name="T9"><text:s text:c="2"/>border-radius: radius('md');</text:span></text:p>
      <text:p text:style-name="P13"><text:span text:style-name="T9"><text:s text:c="2"/>font-family: $font-primary;</text:span></text:p>
      <text:p text:style-name="P13"><text:span text:style-name="T9"><text:s/></text:span></text:p>
      <text:p text:style-name="P13"><text:span text:style-name="T9"><text:s text:c="2"/>@include respond-to('md') {</text:span></text:p>
      <text:p text:style-name="P13"><text:span text:style-name="T9"><text:s text:c="4"/>padding: spacing('3') spacing('5');</text:span></text:p>
      <text:p text:style-name="P13"><text:span text:style-name="T9"><text:s text:c="2"/>}</text:span></text:p>
      <text:p text:style-name="P13"><text:span text:style-name="T9">}</text:span></text:p>
      <text:p text:style-name="P12"><text:span text:style-name="T8">Sem esse @use no topo, o Sass daria erro de compilação — spacing(), radius(), $font-primary e respond-to simplesmente não existiriam dentro desse arquivo, mesmo que o globals.scss já tenha sido carregado em algum lugar da aplicação.</text:span></text:p>
      <text:p text:style-name="P3">O detalhe do as *</text:p>
      <text:p text:style-name="P13"><text:span text:style-name="T9">@use '@/styles/abstracts' as *;</text:span></text:p>
      <text:p text:style-name="P12"><text:soft-page-break/><text:span text:style-name="T8">O as * remove o namespace — permite chamar spacing('2') direto, sem prefixo. Sem o as *, ficaria assim:</text:span></text:p>
      <text:p text:style-name="P13"><text:span text:style-name="T9">@use '@/styles/abstracts' as abs;</text:span></text:p>
      <text:p text:style-name="P13"><text:span text:style-name="T9"><text:s/></text:span></text:p>
      <text:p text:style-name="P13"><text:span text:style-name="T9">.button {</text:span></text:p>
      <text:p text:style-name="P13"><text:span text:style-name="T9"><text:s text:c="2"/>padding: abs.spacing('2');</text:span></text:p>
      <text:p text:style-name="P13"><text:span text:style-name="T9"><text:s text:c="2"/>border-radius: abs.radius('md');</text:span></text:p>
      <text:p text:style-name="P13"><text:span text:style-name="T9">}</text:span></text:p>
      <text:p text:style-name="P12"><text:span text:style-name="T8">Os dois funcionam — as * é mais curto de escrever, mas as abs (ou qualquer nome) deixa mais explícito de onde vem cada coisa. Em projetos reais, o mais comum é as * justamente para o abstracts, porque ele é usado o tempo todo.</text:span></text:p>
      <text:p text:style-name="P3">Vale notar: isso vale pra todo arquivo .scss que use algo de abstracts</text:p>
      <text:p text:style-name="P12"><text:span text:style-name="T8">Não é só Button.module.scss — é Card.module.scss, Header.module.scss, _typography.scss, qualquer um. Cada arquivo é uma "ilha" que declara explicitamente do que depende. É repetitivo, mas é proposital: você olha o topo de qualquer arquivo .scss e sabe exatamente de onde vêm as variáveis/mixins usados ali, sem precisar rastrear uma cadeia de imports escondida.</text:span></text:p>
      <text:p text:style-name="P2"><text:bookmark-start text:name="sec13"/>13. Localização do globals.scss e estilização do app/page.tsx<text:bookmark-end text:name="sec13"/></text:p>
      <text:p text:style-name="P9"><text:span text:style-name="T5">👤 Pergunta do usuário</text:span></text:p>
      <text:p text:style-name="P10"><text:span text:style-name="T6">vi uma estrutura que tem o globals.scss na root do lado de layout, qual é o melhor, na minha opinião ter um globals dentro de styles é mais organizado, segunda pergunta, o app/page.tsx caso quisesse estilizar ele usaria module tbm?</text:span></text:p>
      <text:p text:style-name="P11"><text:span text:style-name="T7">🤖 Resposta</text:span></text:p>
      <text:p text:style-name="P3">Primeira pergunta: onde colocar o globals.scss</text:p>
      <text:p text:style-name="P12"><text:span text:style-name="T8">Depende do tamanho/complexidade do projeto — mas pro caso com abstracts, themes e base modularizados, a intuição de manter em styles/ está certa.</text:span></text:p>
      <text:p text:style-name="P12"><text:span text:style-name="T8">app/globals.css (raiz, do lado do layout) é a convenção do create-next-app, pensando principalmente em projetos com Tailwind, onde geralmente só existe um arquivo CSS global (com as diretivas do Tailwind) e mais nada. Faz sentido ficar ali, colado no layout.tsx — é só um arquivo, sem "arquitetura" nenhuma por trás.</text:span></text:p>
      <text:p text:style-name="P12"><text:span text:style-name="T8">Quando existe um sistema modular de verdade — abstracts/, themes/, base/, vários partials se comunicando via @use/@forward — colocar só o globals.scss solto em app/ e o resto dele em styles/ fica inconsistente: metade do sistema de estilo mora num lugar, metade em outro, sem motivo real pra separação.</text:span></text:p>
      <text:p text:style-name="P12"><text:span text:style-name="T8">Manter tudo dentro de styles/ deixa mais claro o que é: app/ → estrutura de rotas do Next.js (páginas, layouts, route handlers); styles/ → o design system, que poderia até ser extraído pra um pacote separado no futuro sem misturar com lógica de roteamento.</text:span></text:p>
      <text:p text:style-name="P12"><text:span text:style-name="T8">Então sim — pra estrutura montada, styles/globals.scss é mais organizado, e é o que costuma aparecer em projetos reais de porte médio/grande. app/globals.css solto é mais coisa de projeto pequeno com Tailwind puro.</text:span></text:p>
      <text:p text:style-name="P3">Segunda pergunta: app/page.tsx usaria .module.scss também?</text:p>
      <text:p text:style-name="P12"><text:span text:style-name="T8">Sim, exatamente o mesmo padrão dos outros componentes:</text:span></text:p>
      <text:p text:style-name="P13"><text:span text:style-name="T9">app/</text:span></text:p>
      <text:p text:style-name="P13"><text:span text:style-name="T9">├── layout.tsx</text:span></text:p>
      <text:p text:style-name="P13"><text:span text:style-name="T9">├── page.tsx</text:span></text:p>
      <text:p text:style-name="P13"><text:span text:style-name="T9">├── page.module.scss</text:span></text:p>
      <text:p text:style-name="P13"><text:span text:style-name="T9">// app/page.module.scss</text:span></text:p>
      <text:p text:style-name="P13"><text:span text:style-name="T9"><text:s/></text:span></text:p>
      <text:p text:style-name="P13"><text:span text:style-name="T9">@use '@/styles/abstracts' as *;</text:span></text:p>
      <text:p text:style-name="P13"><text:span text:style-name="T9"><text:s/></text:span></text:p>
      <text:p text:style-name="P13"><text:span text:style-name="T9">.hero {</text:span></text:p>
      <text:p text:style-name="P13"><text:soft-page-break/><text:span text:style-name="T9"><text:s text:c="2"/>@include flex(column, center, center, spacing('4'));</text:span></text:p>
      <text:p text:style-name="P13"><text:span text:style-name="T9"><text:s text:c="2"/>padding: spacing('6');</text:span></text:p>
      <text:p text:style-name="P13"><text:span text:style-name="T9">}</text:span></text:p>
      <text:p text:style-name="P13"><text:span text:style-name="T9">// app/page.tsx</text:span></text:p>
      <text:p text:style-name="P13"><text:span text:style-name="T9"><text:s/></text:span></text:p>
      <text:p text:style-name="P13"><text:span text:style-name="T9">import styles from './page.module.scss'</text:span></text:p>
      <text:p text:style-name="P13"><text:span text:style-name="T9"><text:s/></text:span></text:p>
      <text:p text:style-name="P13"><text:span text:style-name="T9">export default function Page() {</text:span></text:p>
      <text:p text:style-name="P13"><text:span text:style-name="T9"><text:s text:c="2"/>return (</text:span></text:p>
      <text:p text:style-name="P13"><text:span text:style-name="T9"><text:s text:c="4"/>&lt;main className={styles.hero}&gt;</text:span></text:p>
      <text:p text:style-name="P13"><text:span text:style-name="T9"><text:s text:c="6"/>&lt;h1&gt;Bem-vindo&lt;/h1&gt;</text:span></text:p>
      <text:p text:style-name="P13"><text:span text:style-name="T9"><text:s text:c="4"/>&lt;/main&gt;</text:span></text:p>
      <text:p text:style-name="P13"><text:span text:style-name="T9"><text:s text:c="2"/>)</text:span></text:p>
      <text:p text:style-name="P13"><text:span text:style-name="T9">}</text:span></text:p>
      <text:p text:style-name="P12"><text:span text:style-name="T8">Como globals.scss já foi importado no layout.tsx (raiz), coisas como tipografia base, reset, e as variáveis CSS de tema já se aplicam automaticamente em qualquer página — inclusive na page.tsx — sem precisar importar nada extra. O page.module.scss entra só pra estilos específicos daquela página, seguindo a mesma lógica que qualquer outro componente da estrutura.</text:span></text:p>
      <text:p text:style-name="P2"><text:bookmark-start text:name="sec14"/>14. O que é o lib/theme.ts<text:bookmark-end text:name="sec14"/></text:p>
      <text:p text:style-name="P9"><text:span text:style-name="T5">👤 Pergunta do usuário</text:span></text:p>
      <text:p text:style-name="P10"><text:span text:style-name="T6">mais uma pergunta o que seria o lib/theme.ts</text:span></text:p>
      <text:p text:style-name="P11"><text:span text:style-name="T7">🤖 Resposta</text:span></text:p>
      <text:p text:style-name="P12"><text:span text:style-name="T8">O lib/theme.ts não é Sass — é a peça em TypeScript/JavaScript que faz a ponte entre a lógica de tema (que no CSS é só data-theme="light" ou data-theme="dark" num atributo HTML) e a interação do usuário (clicar num botão pra trocar de tema).</text:span></text:p>
      <text:p text:style-name="P12"><text:span text:style-name="T8">No _dark.scss a troca de tema funciona assim:</text:span></text:p>
      <text:p text:style-name="P13"><text:span text:style-name="T9">[data-theme='dark'] {</text:span></text:p>
      <text:p text:style-name="P13"><text:span text:style-name="T9"><text:s text:c="2"/>--color-bg-primary: #0d0d0d;</text:span></text:p>
      <text:p text:style-name="P13"><text:span text:style-name="T9"><text:s text:c="2"/>// ...</text:span></text:p>
      <text:p text:style-name="P13"><text:span text:style-name="T9">}</text:span></text:p>
      <text:p text:style-name="P12"><text:span text:style-name="T8">Ou seja: o CSS reage a um atributo data-theme na tag &lt;html&gt;. Só que o CSS sozinho não sabe quando trocar esse atributo, nem lembra a escolha do usuário depois que ele recarrega a página. É pra isso que serve o theme.ts:</text:span></text:p>
      <text:p text:style-name="P13"><text:span text:style-name="T9">// lib/theme.ts</text:span></text:p>
      <text:p text:style-name="P13"><text:span text:style-name="T9"><text:s/></text:span></text:p>
      <text:p text:style-name="P13"><text:span text:style-name="T9">export type Theme = 'light' | 'dark'</text:span></text:p>
      <text:p text:style-name="P13"><text:span text:style-name="T9"><text:s/></text:span></text:p>
      <text:p text:style-name="P13"><text:span text:style-name="T9">export function setTheme(theme: Theme) {</text:span></text:p>
      <text:p text:style-name="P13"><text:span text:style-name="T9"><text:s text:c="2"/>document.documentElement.setAttribute('data-theme', theme)</text:span></text:p>
      <text:p text:style-name="P13"><text:span text:style-name="T9"><text:s text:c="2"/>localStorage.setItem('theme', theme)</text:span></text:p>
      <text:p text:style-name="P13"><text:span text:style-name="T9">}</text:span></text:p>
      <text:p text:style-name="P13"><text:span text:style-name="T9"><text:s/></text:span></text:p>
      <text:p text:style-name="P13"><text:span text:style-name="T9">export function getStoredTheme(): Theme | null {</text:span></text:p>
      <text:p text:style-name="P13"><text:soft-page-break/><text:span text:style-name="T9"><text:s text:c="2"/>return localStorage.getItem('theme') as Theme | null</text:span></text:p>
      <text:p text:style-name="P13"><text:span text:style-name="T9">}</text:span></text:p>
      <text:p text:style-name="P3">O que cada função faz</text:p>
      <text:list text:continue-numbering="true" text:style-name="WWNum1">
        <text:list-item>
          <text:p text:style-name="P4">setTheme(theme) → pega a tag &lt;html&gt; e seta data-theme="dark" ou data-theme="light" nela. Isso é o que efetivamente "liga" o CSS certo. Também salva a escolha no localStorage, pra lembrar na próxima visita.</text:p>
        </text:list-item>
        <text:list-item>
          <text:p text:style-name="P4">getStoredTheme() → lê o que foi salvo no localStorage, pra saber qual tema aplicar quando o usuário volta ao site.</text:p>
        </text:list-item>
      </text:list>
      <text:p text:style-name="P3">Como isso se conecta com um componente de verdade</text:p>
      <text:p text:style-name="P13"><text:span text:style-name="T9">// components/ui/ThemeToggle/ThemeToggle.tsx</text:span></text:p>
      <text:p text:style-name="P13"><text:span text:style-name="T9">'use client'</text:span></text:p>
      <text:p text:style-name="P13"><text:span text:style-name="T9"><text:s/></text:span></text:p>
      <text:p text:style-name="P13"><text:span text:style-name="T9">import { useEffect, useState } from 'react'</text:span></text:p>
      <text:p text:style-name="P13"><text:span text:style-name="T9">import { setTheme, getStoredTheme, type Theme } from '@/lib/theme'</text:span></text:p>
      <text:p text:style-name="P13"><text:span text:style-name="T9">import styles from './ThemeToggle.module.scss'</text:span></text:p>
      <text:p text:style-name="P13"><text:span text:style-name="T9"><text:s/></text:span></text:p>
      <text:p text:style-name="P13"><text:span text:style-name="T9">export default function ThemeToggle() {</text:span></text:p>
      <text:p text:style-name="P13"><text:span text:style-name="T9"><text:s text:c="2"/>const [theme, setThemeState] = useState&lt;Theme&gt;('light')</text:span></text:p>
      <text:p text:style-name="P13"><text:span text:style-name="T9"><text:s/></text:span></text:p>
      <text:p text:style-name="P13"><text:span text:style-name="T9"><text:s text:c="2"/>useEffect(() =&gt; {</text:span></text:p>
      <text:p text:style-name="P13"><text:span text:style-name="T9"><text:s text:c="4"/>const stored = getStoredTheme() ?? 'light'</text:span></text:p>
      <text:p text:style-name="P13"><text:span text:style-name="T9"><text:s text:c="4"/>setTheme(stored)</text:span></text:p>
      <text:p text:style-name="P13"><text:span text:style-name="T9"><text:s text:c="4"/>setThemeState(stored)</text:span></text:p>
      <text:p text:style-name="P13"><text:span text:style-name="T9"><text:s text:c="2"/>}, [])</text:span></text:p>
      <text:p text:style-name="P13"><text:soft-page-break/><text:span text:style-name="T9"><text:s/></text:span></text:p>
      <text:p text:style-name="P13"><text:span text:style-name="T9"><text:s text:c="2"/>function toggle() {</text:span></text:p>
      <text:p text:style-name="P13"><text:span text:style-name="T9"><text:s text:c="4"/>const next = theme === 'light' ? 'dark' : 'light'</text:span></text:p>
      <text:p text:style-name="P13"><text:span text:style-name="T9"><text:s text:c="4"/>setTheme(next)</text:span></text:p>
      <text:p text:style-name="P13"><text:span text:style-name="T9"><text:s text:c="4"/>setThemeState(next)</text:span></text:p>
      <text:p text:style-name="P13"><text:span text:style-name="T9"><text:s text:c="2"/>}</text:span></text:p>
      <text:p text:style-name="P13"><text:span text:style-name="T9"><text:s/></text:span></text:p>
      <text:p text:style-name="P13"><text:span text:style-name="T9"><text:s text:c="2"/>return (</text:span></text:p>
      <text:p text:style-name="P13"><text:span text:style-name="T9"><text:s text:c="4"/>&lt;button className={styles.toggle} onClick={toggle}&gt;</text:span></text:p>
      <text:p text:style-name="P13"><text:span text:style-name="T9"><text:s text:c="6"/>{theme === 'light' ? '🌙' : '☀️'}</text:span></text:p>
      <text:p text:style-name="P13"><text:span text:style-name="T9"><text:s text:c="4"/>&lt;/button&gt;</text:span></text:p>
      <text:p text:style-name="P13"><text:span text:style-name="T9"><text:s text:c="2"/>)</text:span></text:p>
      <text:p text:style-name="P13"><text:span text:style-name="T9">}</text:span></text:p>
      <text:p text:style-name="P3">Resumindo a cadeia completa</text:p>
      <text:p text:style-name="P13"><text:span text:style-name="T9">usuário clica no botão</text:span></text:p>
      <text:p text:style-name="P13"><text:span text:style-name="T9"><text:s text:c="2"/>→ ThemeToggle.tsx chama setTheme('dark')</text:span></text:p>
      <text:p text:style-name="P13"><text:span text:style-name="T9"><text:s text:c="6"/>→ lib/theme.ts seta data-theme="dark" na &lt;html&gt;</text:span></text:p>
      <text:p text:style-name="P13"><text:span text:style-name="T9"><text:s text:c="10"/>→ CSS gerado por styles/themes/_dark.scss entra em ação</text:span></text:p>
      <text:p text:style-name="P13"><text:span text:style-name="T9"><text:s text:c="14"/>→ --color-bg-primary, --color-accent, etc. mudam de valor</text:span></text:p>
      <text:p text:style-name="P13"><text:span text:style-name="T9"><text:s text:c="18"/>→ todo componente que usa var(--color-bg-primary) reflete a mudança</text:span></text:p>
      <text:p text:style-name="P12"><text:span text:style-name="T8">Ou seja: Sass define os valores de cada tema; theme.ts é o mecanismo que decide qual tema está ativo no momento. Um não substitui o outro — são duas metades do mesmo sistema (estilo vs. comportamento/interação)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class="chapter">
      <style:text-properties fo:color="#1f3864" loext:opacity="100%"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class="text">
      <style:paragraph-properties fo:margin-top="0.1665in" fo:margin-bottom="0.111in" style:contextual-spacing="false" fo:padding-left="0in" fo:padding-right="0in" fo:padding-top="0in" fo:padding-bottom="0.0555in" fo:border-left="none" fo:border-right="none" fo:border-top="none" fo:border-bottom="0.74pt solid #1f3864"/>
      <style:text-properties fo:color="#1f3864" loext:opacity="100%"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class="text">
      <style:paragraph-properties fo:margin-top="0.139in" fo:margin-bottom="0.0835in" style:contextual-spacing="false"/>
      <style:text-properties fo:color="#2e74b5" loext:opacity="100%" fo:font-size="13pt" fo:font-weight="bold" style:font-size-asian="13pt" style:font-weight-asian="bold" style:font-size-complex="13pt" style:font-weight-complex="bold"/>
    </style:style>
    <style:style style:name="Heading_20_3" style:display-name="Heading 3" style:family="paragraph" style:parent-style-name="Heading" style:class="text">
      <style:paragraph-properties fo:margin-top="0.111in" fo:margin-bottom="0.0693in" style:contextual-spacing="false"/>
      <style:text-properties fo:color="#444444" loext:opacity="100%" fo:font-size="11.5pt" fo:font-weight="bold" style:font-size-asian="11.5pt" style:font-weight-asian="bold" style:font-size-complex="11.5pt" style:font-weight-complex="bold"/>
    </style:style>
    <style:style style:name="Heading_20_4" style:display-name="Heading 4" style:family="paragraph" style:parent-style-name="Heading" style:class="text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text">
      <style:text-properties fo:color="#2e74b5" loext:opacity="100%"/>
    </style:style>
    <style:style style:name="Heading_20_6" style:display-name="Heading 6" style:family="paragraph" style:parent-style-name="Heading" style:class="text">
      <style:text-properties fo:color="#1f4d78" loext:opacity="100%"/>
    </style:style>
    <style:style style:name="Strong_20_Emphasis" style:display-name="Strong Emphasis" style:family="paragraph">
      <style:text-properties fo:font-weight="bold" style:font-weight-asian="bold" style:font-weight-complex="bold"/>
    </style:style>
    <style:style style:name="List_20_Paragraph" style:display-name="List Paragraph" style:family="paragraph"/>
    <style:style style:name="Footnote" style:family="paragraph" style:parent-style-name="Standard" loext:linked-style-name="Footnote_20_Text_20_Char" style:class="extra">
      <style:paragraph-properties fo:margin-top="0in" fo:margin-bottom="0in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in" fo:margin-bottom="0in" style:contextual-spacing="false" fo:line-height="100%"/>
      <style:text-properties fo:font-size="10pt" style:font-size-asian="10pt" style:font-size-complex="10pt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 loext:linked-style-name="Footnote">
      <style:text-properties fo:font-size="10pt" style:font-size-asian="10pt" style:font-size-complex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Text_20_Char" style:display-name="Endnote Text Char" style:family="text" loext:linked-style-name="Endnote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fo:color="#2e74b5" loext:opacity="100%" style:text-underline-style="solid" style:text-underline-width="auto" style:text-underline-color="font-color"/>
    </style:style>
    <style:style style:name="ListLabel_20_11" style:display-name="ListLabel 11" style:family="text">
      <style:text-properties fo:color="#2e74b5" loext:opacity="10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Estudos Next.js + Sass</dc:title>
    <meta:initial-creator>Claude</meta:initial-creator>
    <dc:creator>Un-named</dc:creator>
    <meta:editing-cycles>1</meta:editing-cycles>
    <meta:creation-date>2026-07-17T19:00:07.110000000</meta:creation-date>
    <dc:date>2026-07-17T19:00:07.110000000</dc:date>
    <meta:document-statistic meta:table-count="5" meta:image-count="0" meta:object-count="0" meta:page-count="47" meta:paragraph-count="885" meta:word-count="4826" meta:character-count="32921" meta:non-whitespace-character-count="27854"/>
    <meta:generator>LibreOffice/24.2.7.2$Linux_X86_64 LibreOffice_project/420$Build-2</meta:generator>
  </office:meta>
</office:document-meta>
</file>