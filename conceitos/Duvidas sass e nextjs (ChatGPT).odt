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automatic-styles>
    <style:style style:name="P1" style:family="paragraph" style:parent-style-name="Heading_20_2">
      <style:paragraph-properties fo:line-height="150%" fo:text-align="center" style:justify-single-word="false"/>
      <style:text-properties style:font-name="Ubuntu"/>
    </style:style>
    <style:style style:name="P2" style:family="paragraph" style:parent-style-name="Standard">
      <style:paragraph-properties fo:line-height="150%"/>
      <style:text-properties style:font-name="Ubuntu"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hatGPT</text:h>
      <text:p text:style-name="P2">hoje 13:40</text:p>
      <text:p text:style-name="P2">Qual a melhor forma de utilizar sass junto ao nextjs</text:p>
      <text:p text:style-name="P2"/>
      <text:p text:style-name="P2">no 3. o que teria no _header, _footer, não entendi o porque dessa pasta layout e onde ela vai, tambemnão entendi o globals.scss e o main.scss pra que servem e onde vão, ja não tem um globals no app? faça um estrutura de pastas completa, como se fosse um projeto real igual essa que voce enviou, mas explique pra que serve e aonde vai cada coisa, deixa a maioria das coisas na estrutura: tipo styles/ &lt;- serve para tal coisa, mas o que precisar pode colocar em baixo</text:p>
      <text:p text:style-name="P2"/>
      <text:p text:style-name="P2">Boa pergunta. Na verdade, a estrutura que eu mostrei é inspirada no padrão 7-1 do Sass, mas ela não faz sentido completa para todo projeto Next.js.</text:p>
      <text:p text:style-name="P2"/>
      <text:p text:style-name="P2">Hoje, em projetos modernos com Next.js (principalmente usando o App Router), eu faria diferente. Eu deixaria os estilos dos componentes junto dos próprios componentes e usaria a pasta styles apenas para o que é compartilhado.</text:p>
      <text:p text:style-name="P2"/>
      <text:p text:style-name="P2">Estrutura que eu usaria em um projeto real</text:p>
      <text:p text:style-name="P2">src/</text:p>
      <text:p text:style-name="P2">│</text:p>
      <text:p text:style-name="P2">├── app/</text:p>
      <text:p text:style-name="P2">│ <text:s text:c="2"/>├── favicon.ico</text:p>
      <text:p text:style-name="P2">│ <text:s text:c="2"/>├── globals.scss</text:p>
      <text:p text:style-name="P2">│ <text:s text:c="2"/>├── layout.tsx</text:p>
      <text:p text:style-name="P2">│ <text:s text:c="2"/>├── page.tsx</text:p>
      <text:p text:style-name="P2">│ <text:s text:c="2"/>│</text:p>
      <text:p text:style-name="P2">│ <text:s text:c="2"/>├── sobre/</text:p>
      <text:p text:style-name="P2"><text:soft-page-break/>│ <text:s text:c="2"/>│ <text:s text:c="2"/>└── page.tsx</text:p>
      <text:p text:style-name="P2">│ <text:s text:c="2"/>│</text:p>
      <text:p text:style-name="P2">│ <text:s text:c="2"/>└── contato/</text:p>
      <text:p text:style-name="P2">│ <text:s text:c="6"/>└── page.tsx</text:p>
      <text:p text:style-name="P2">│</text:p>
      <text:p text:style-name="P2">├── components/</text:p>
      <text:p text:style-name="P2">│ <text:s text:c="2"/>│</text:p>
      <text:p text:style-name="P2">│ <text:s text:c="2"/>├── Header/</text:p>
      <text:p text:style-name="P2">│ <text:s text:c="2"/>│ <text:s text:c="2"/>├── Header.tsx</text:p>
      <text:p text:style-name="P2">│ <text:s text:c="2"/>│ <text:s text:c="2"/>└── Header.module.scss</text:p>
      <text:p text:style-name="P2">│ <text:s text:c="2"/>│</text:p>
      <text:p text:style-name="P2">│ <text:s text:c="2"/>├── Footer/</text:p>
      <text:p text:style-name="P2">│ <text:s text:c="2"/>│ <text:s text:c="2"/>├── Footer.tsx</text:p>
      <text:p text:style-name="P2">│ <text:s text:c="2"/>│ <text:s text:c="2"/>└── Footer.module.scss</text:p>
      <text:p text:style-name="P2">│ <text:s text:c="2"/>│</text:p>
      <text:p text:style-name="P2">│ <text:s text:c="2"/>├── Button/</text:p>
      <text:p text:style-name="P2">│ <text:s text:c="2"/>│ <text:s text:c="2"/>├── Button.tsx</text:p>
      <text:p text:style-name="P2">│ <text:s text:c="2"/>│ <text:s text:c="2"/>└── Button.module.scss</text:p>
      <text:p text:style-name="P2">│ <text:s text:c="2"/>│</text:p>
      <text:p text:style-name="P2">│ <text:s text:c="2"/>├── Card/</text:p>
      <text:p text:style-name="P2">│ <text:s text:c="2"/>│ <text:s text:c="2"/>├── Card.tsx</text:p>
      <text:p text:style-name="P2">│ <text:s text:c="2"/>│ <text:s text:c="2"/>└── Card.module.scss</text:p>
      <text:p text:style-name="P2">│ <text:s text:c="2"/>│</text:p>
      <text:p text:style-name="P2">│ <text:s text:c="2"/>└── Modal/</text:p>
      <text:p text:style-name="P2">│ <text:s text:c="6"/>├── Modal.tsx</text:p>
      <text:p text:style-name="P2">│ <text:s text:c="6"/>└── Modal.module.scss</text:p>
      <text:p text:style-name="P2">│</text:p>
      <text:p text:style-name="P2">├── styles/</text:p>
      <text:p text:style-name="P2">│ <text:s text:c="2"/>│</text:p>
      <text:p text:style-name="P2">│ <text:s text:c="2"/>├── abstracts/</text:p>
      <text:p text:style-name="P2">│ <text:s text:c="2"/>│ <text:s text:c="2"/>├── _variables.scss</text:p>
      <text:p text:style-name="P2">│ <text:s text:c="2"/>│ <text:s text:c="2"/>├── _mixins.scss</text:p>
      <text:p text:style-name="P2"><text:soft-page-break/>│ <text:s text:c="2"/>│ <text:s text:c="2"/>├── _functions.scss</text:p>
      <text:p text:style-name="P2">│ <text:s text:c="2"/>│ <text:s text:c="2"/>└── _breakpoints.scss</text:p>
      <text:p text:style-name="P2">│ <text:s text:c="2"/>│</text:p>
      <text:p text:style-name="P2">│ <text:s text:c="2"/>└── _reset.scss</text:p>
      <text:p text:style-name="P2">│</text:p>
      <text:p text:style-name="P2">├── lib/</text:p>
      <text:p text:style-name="P2">│</text:p>
      <text:p text:style-name="P2">├── hooks/</text:p>
      <text:p text:style-name="P2">│</text:p>
      <text:p text:style-name="P2">├── services/</text:p>
      <text:p text:style-name="P2">│</text:p>
      <text:p text:style-name="P2">├── types/</text:p>
      <text:p text:style-name="P2">│</text:p>
      <text:p text:style-name="P2">├── utils/</text:p>
      <text:p text:style-name="P2">│</text:p>
      <text:p text:style-name="P2">├── public/</text:p>
      <text:p text:style-name="P2">│</text:p>
      <text:p text:style-name="P2">└── package.json</text:p>
      <text:p text:style-name="P2">Agora vamos por partes.</text:p>
      <text:p text:style-name="P2">app/</text:p>
      <text:p text:style-name="P2">É a pasta das páginas.</text:p>
      <text:p text:style-name="P2"/>
      <text:p text:style-name="P2">app/</text:p>
      <text:p text:style-name="P2">Aqui ficam:</text:p>
      <text:p text:style-name="P2"/>
      <text:p text:style-name="P2">páginas</text:p>
      <text:p text:style-name="P2"/>
      <text:p text:style-name="P2">layouts</text:p>
      <text:p text:style-name="P2"/>
      <text:p text:style-name="P2">loading</text:p>
      <text:p text:style-name="P2"/>
      <text:p text:style-name="P2">error</text:p>
      <text:p text:style-name="P2"><text:soft-page-break/></text:p>
      <text:p text:style-name="P2">not-found</text:p>
      <text:p text:style-name="P2"/>
      <text:p text:style-name="P2">globals.scss</text:p>
      <text:p text:style-name="P2"/>
      <text:p text:style-name="P2">É onde o Next trabalha.</text:p>
      <text:p text:style-name="P2"/>
      <text:p text:style-name="P2">globals.scss</text:p>
      <text:p text:style-name="P2">Esse arquivo já existe.</text:p>
      <text:p text:style-name="P2"/>
      <text:p text:style-name="P2">Ele serve para estilos que valem para o site inteiro.</text:p>
      <text:p text:style-name="P2"/>
      <text:p text:style-name="P2">Exemplo:</text:p>
      <text:p text:style-name="P2"/>
      <text:p text:style-name="P2">* {</text:p>
      <text:p text:style-name="P2"><text:s text:c="2"/>margin: 0;</text:p>
      <text:p text:style-name="P2"><text:s text:c="2"/>padding: 0;</text:p>
      <text:p text:style-name="P2"><text:s text:c="2"/>box-sizing: border-box;</text:p>
      <text:p text:style-name="P2">}</text:p>
      <text:p text:style-name="P2"/>
      <text:p text:style-name="P2">body{</text:p>
      <text:p text:style-name="P2"><text:s text:c="4"/>font-family: sans-serif;</text:p>
      <text:p text:style-name="P2"><text:s text:c="4"/>background:#f5f5f5;</text:p>
      <text:p text:style-name="P2">}</text:p>
      <text:p text:style-name="P2"/>
      <text:p text:style-name="P2">img{</text:p>
      <text:p text:style-name="P2"><text:s text:c="4"/>max-width:100%;</text:p>
      <text:p text:style-name="P2">}</text:p>
      <text:p text:style-name="P2"/>
      <text:p text:style-name="P2">a{</text:p>
      <text:p text:style-name="P2"><text:s text:c="4"/>text-decoration:none;</text:p>
      <text:p text:style-name="P2">}</text:p>
      <text:p text:style-name="P2"><text:soft-page-break/>Também é aqui que normalmente fazemos:</text:p>
      <text:p text:style-name="P2"/>
      <text:p text:style-name="P2">@use "../styles/reset";</text:p>
      <text:p text:style-name="P2">@use "../styles/abstracts/variables" as *;</text:p>
      <text:p text:style-name="P2">ou seja, ele importa tudo que precisa ser global.</text:p>
      <text:p text:style-name="P2"/>
      <text:p text:style-name="P2">Então não precisa existir outro globals.scss.</text:p>
      <text:p text:style-name="P2"/>
      <text:p text:style-name="P2">styles/</text:p>
      <text:p text:style-name="P2">Essa pasta guarda apenas o que é compartilhado.</text:p>
      <text:p text:style-name="P2"/>
      <text:p text:style-name="P2">Ela não possui CSS de componentes.</text:p>
      <text:p text:style-name="P2"/>
      <text:p text:style-name="P2">abstracts/</text:p>
      <text:p text:style-name="P2">É a pasta mais importante.</text:p>
      <text:p text:style-name="P2"/>
      <text:p text:style-name="P2">Ela guarda arquivos que não geram CSS sozinhos.</text:p>
      <text:p text:style-name="P2"/>
      <text:p text:style-name="P2">Só servem para reutilizar código.</text:p>
      <text:p text:style-name="P2"/>
      <text:p text:style-name="P2">_variables.scss</text:p>
      <text:p text:style-name="P2">Guarda variáveis.</text:p>
      <text:p text:style-name="P2"/>
      <text:p text:style-name="P2">$primary:#0ea5e9;</text:p>
      <text:p text:style-name="P2"/>
      <text:p text:style-name="P2">$secondary:#6366f1;</text:p>
      <text:p text:style-name="P2"/>
      <text:p text:style-name="P2">$danger:#ef4444;</text:p>
      <text:p text:style-name="P2"/>
      <text:p text:style-name="P2">$border-radius:10px;</text:p>
      <text:p text:style-name="P2"/>
      <text:p text:style-name="P2">$transition:.3s;</text:p>
      <text:p text:style-name="P2"><text:soft-page-break/>Você usa em qualquer componente.</text:p>
      <text:p text:style-name="P2"/>
      <text:p text:style-name="P2">_mixins.scss</text:p>
      <text:p text:style-name="P2">Funções reutilizáveis.</text:p>
      <text:p text:style-name="P2"/>
      <text:p text:style-name="P2">Exemplo:</text:p>
      <text:p text:style-name="P2"/>
      <text:p text:style-name="P2">@mixin flex-center{</text:p>
      <text:p text:style-name="P2"/>
      <text:p text:style-name="P2">display:flex;</text:p>
      <text:p text:style-name="P2">justify-content:center;</text:p>
      <text:p text:style-name="P2">align-items:center;</text:p>
      <text:p text:style-name="P2"/>
      <text:p text:style-name="P2">}</text:p>
      <text:p text:style-name="P2">Depois:</text:p>
      <text:p text:style-name="P2"/>
      <text:p text:style-name="P2">.container{</text:p>
      <text:p text:style-name="P2"/>
      <text:p text:style-name="P2">@include flex-center;</text:p>
      <text:p text:style-name="P2"/>
      <text:p text:style-name="P2">}</text:p>
      <text:p text:style-name="P2">_functions.scss</text:p>
      <text:p text:style-name="P2">Caso queira criar funções.</text:p>
      <text:p text:style-name="P2"/>
      <text:p text:style-name="P2">Exemplo:</text:p>
      <text:p text:style-name="P2"/>
      <text:p text:style-name="P2">@function rem($px){</text:p>
      <text:p text:style-name="P2"/>
      <text:p text:style-name="P2">@return calc($px / 16) * 1rem;</text:p>
      <text:p text:style-name="P2"/>
      <text:p text:style-name="P2">}</text:p>
      <text:p text:style-name="P2">Uso:</text:p>
      <text:p text:style-name="P2"><text:soft-page-break/></text:p>
      <text:p text:style-name="P2">font-size:rem(24);</text:p>
      <text:p text:style-name="P2">_breakpoints.scss</text:p>
      <text:p text:style-name="P2">Muito usado.</text:p>
      <text:p text:style-name="P2"/>
      <text:p text:style-name="P2">$tablet:768px;</text:p>
      <text:p text:style-name="P2"/>
      <text:p text:style-name="P2">$laptop:1024px;</text:p>
      <text:p text:style-name="P2"/>
      <text:p text:style-name="P2">@mixin tablet{</text:p>
      <text:p text:style-name="P2"/>
      <text:p text:style-name="P2">@media(max-width:$tablet){</text:p>
      <text:p text:style-name="P2"/>
      <text:p text:style-name="P2">@content;</text:p>
      <text:p text:style-name="P2"/>
      <text:p text:style-name="P2">}</text:p>
      <text:p text:style-name="P2"/>
      <text:p text:style-name="P2">}</text:p>
      <text:p text:style-name="P2">Depois:</text:p>
      <text:p text:style-name="P2"/>
      <text:p text:style-name="P2">.card{</text:p>
      <text:p text:style-name="P2"/>
      <text:p text:style-name="P2">width:400px;</text:p>
      <text:p text:style-name="P2"/>
      <text:p text:style-name="P2">@include tablet{</text:p>
      <text:p text:style-name="P2"/>
      <text:p text:style-name="P2">width:100%;</text:p>
      <text:p text:style-name="P2"/>
      <text:p text:style-name="P2">}</text:p>
      <text:p text:style-name="P2"/>
      <text:p text:style-name="P2">}</text:p>
      <text:p text:style-name="P2">_reset.scss</text:p>
      <text:p text:style-name="P2"><text:soft-page-break/>Aqui fica somente o reset.</text:p>
      <text:p text:style-name="P2"/>
      <text:p text:style-name="P2">*{</text:p>
      <text:p text:style-name="P2"/>
      <text:p text:style-name="P2">margin:0;</text:p>
      <text:p text:style-name="P2">padding:0;</text:p>
      <text:p text:style-name="P2">box-sizing:border-box;</text:p>
      <text:p text:style-name="P2"/>
      <text:p text:style-name="P2">}</text:p>
      <text:p text:style-name="P2">Ele é importado no globals.</text:p>
      <text:p text:style-name="P2"/>
      <text:p text:style-name="P2">components/</text:p>
      <text:p text:style-name="P2">Cada componente possui sua própria pasta.</text:p>
      <text:p text:style-name="P2"/>
      <text:p text:style-name="P2">Exemplo:</text:p>
      <text:p text:style-name="P2"/>
      <text:p text:style-name="P2">Header/</text:p>
      <text:p text:style-name="P2">Dentro:</text:p>
      <text:p text:style-name="P2"/>
      <text:p text:style-name="P2">Header.tsx</text:p>
      <text:p text:style-name="P2"/>
      <text:p text:style-name="P2">Header.module.scss</text:p>
      <text:p text:style-name="P2">Tudo relacionado ao Header fica ali.</text:p>
      <text:p text:style-name="P2"/>
      <text:p text:style-name="P2">Header.module.scss</text:p>
      <text:p text:style-name="P2">Aqui fica somente o CSS do Header.</text:p>
      <text:p text:style-name="P2"/>
      <text:p text:style-name="P2">Exemplo:</text:p>
      <text:p text:style-name="P2"/>
      <text:p text:style-name="P2">.header{</text:p>
      <text:p text:style-name="P2"/>
      <text:p text:style-name="P2">background:$primary;</text:p>
      <text:p text:style-name="P2"><text:soft-page-break/></text:p>
      <text:p text:style-name="P2">}</text:p>
      <text:p text:style-name="P2"/>
      <text:p text:style-name="P2">.logo{</text:p>
      <text:p text:style-name="P2"/>
      <text:p text:style-name="P2">font-size:2rem;</text:p>
      <text:p text:style-name="P2"/>
      <text:p text:style-name="P2">}</text:p>
      <text:p text:style-name="P2"/>
      <text:p text:style-name="P2">.menu{</text:p>
      <text:p text:style-name="P2"/>
      <text:p text:style-name="P2">display:flex;</text:p>
      <text:p text:style-name="P2"/>
      <text:p text:style-name="P2">gap:20px;</text:p>
      <text:p text:style-name="P2"/>
      <text:p text:style-name="P2">}</text:p>
      <text:p text:style-name="P2">Nada daqui será usado pelo Footer.</text:p>
      <text:p text:style-name="P2"/>
      <text:p text:style-name="P2">Então por que antigamente existia layout/</text:p>
      <text:p text:style-name="P2">Você perguntou isso.</text:p>
      <text:p text:style-name="P2"/>
      <text:p text:style-name="P2">Na estrutura antiga existia:</text:p>
      <text:p text:style-name="P2"/>
      <text:p text:style-name="P2">styles/</text:p>
      <text:p text:style-name="P2"/>
      <text:p text:style-name="P2">layout/</text:p>
      <text:p text:style-name="P2"/>
      <text:p text:style-name="P2">_header.scss</text:p>
      <text:p text:style-name="P2"/>
      <text:p text:style-name="P2">_footer.scss</text:p>
      <text:p text:style-name="P2"/>
      <text:p text:style-name="P2">_sidebar.scss</text:p>
      <text:p text:style-name="P2"><text:soft-page-break/>Porque era comum escrever HTML assim:</text:p>
      <text:p text:style-name="P2"/>
      <text:p text:style-name="P2">&lt;header class="header"&gt;</text:p>
      <text:p text:style-name="P2"/>
      <text:p text:style-name="P2">&lt;nav class="menu"&gt;</text:p>
      <text:p text:style-name="P2"/>
      <text:p text:style-name="P2">...</text:p>
      <text:p text:style-name="P2"/>
      <text:p text:style-name="P2">&lt;/nav&gt;</text:p>
      <text:p text:style-name="P2"/>
      <text:p text:style-name="P2">&lt;/header&gt;</text:p>
      <text:p text:style-name="P2">E importar tudo em um único arquivo.</text:p>
      <text:p text:style-name="P2"/>
      <text:p text:style-name="P2">Era assim:</text:p>
      <text:p text:style-name="P2"/>
      <text:p text:style-name="P2">@import "layout/header";</text:p>
      <text:p text:style-name="P2"/>
      <text:p text:style-name="P2">@import "layout/footer";</text:p>
      <text:p text:style-name="P2"/>
      <text:p text:style-name="P2">@import "pages/home";</text:p>
      <text:p text:style-name="P2">No final existia um CSS gigantesco.</text:p>
      <text:p text:style-name="P2"/>
      <text:p text:style-name="P2">Hoje isso perdeu muito sentido.</text:p>
      <text:p text:style-name="P2"/>
      <text:p text:style-name="P2">Porque agora fazemos:</text:p>
      <text:p text:style-name="P2"/>
      <text:p text:style-name="P2">Header/</text:p>
      <text:p text:style-name="P2"/>
      <text:p text:style-name="P2">Header.tsx</text:p>
      <text:p text:style-name="P2"/>
      <text:p text:style-name="P2">Header.module.scss</text:p>
      <text:p text:style-name="P2">Ou seja:</text:p>
      <text:p text:style-name="P2"><text:soft-page-break/></text:p>
      <text:p text:style-name="P2">o Header possui seu próprio CSS.</text:p>
      <text:p text:style-name="P2"/>
      <text:p text:style-name="P2">Não precisa de:</text:p>
      <text:p text:style-name="P2"/>
      <text:p text:style-name="P2">styles/layout/_header.scss</text:p>
      <text:p text:style-name="P2">Então eu nem criaria essa pasta.</text:p>
      <text:p text:style-name="P2"/>
      <text:p text:style-name="P2">main.scss</text:p>
      <text:p text:style-name="P2">Também era uma prática antiga.</text:p>
      <text:p text:style-name="P2"/>
      <text:p text:style-name="P2">Ele fazia isso:</text:p>
      <text:p text:style-name="P2"/>
      <text:p text:style-name="P2">@import "variables";</text:p>
      <text:p text:style-name="P2"/>
      <text:p text:style-name="P2">@import "mixins";</text:p>
      <text:p text:style-name="P2"/>
      <text:p text:style-name="P2">@import "header";</text:p>
      <text:p text:style-name="P2"/>
      <text:p text:style-name="P2">@import "footer";</text:p>
      <text:p text:style-name="P2"/>
      <text:p text:style-name="P2">@import "home";</text:p>
      <text:p text:style-name="P2"/>
      <text:p text:style-name="P2">@import "contact";</text:p>
      <text:p text:style-name="P2">Depois só importava:</text:p>
      <text:p text:style-name="P2"/>
      <text:p text:style-name="P2">main.scss</text:p>
      <text:p text:style-name="P2">e o projeto inteiro funcionava.</text:p>
      <text:p text:style-name="P2"/>
      <text:p text:style-name="P2">No Next isso praticamente não é necessário.</text:p>
      <text:p text:style-name="P2"/>
      <text:p text:style-name="P2">O próprio</text:p>
      <text:p text:style-name="P2"><text:soft-page-break/></text:p>
      <text:p text:style-name="P2">globals.scss</text:p>
      <text:p text:style-name="P2">já faz esse papel.</text:p>
      <text:p text:style-name="P2"/>
      <text:p text:style-name="P2">Então eu também não criaria main.scss.</text:p>
      <text:p text:style-name="P2"/>
      <text:p text:style-name="P2">lib/</text:p>
      <text:p text:style-name="P2">Funções que conversam com APIs.</text:p>
      <text:p text:style-name="P2"/>
      <text:p text:style-name="P2">Exemplo:</text:p>
      <text:p text:style-name="P2"/>
      <text:p text:style-name="P2">api.ts</text:p>
      <text:p text:style-name="P2"/>
      <text:p text:style-name="P2">axios.ts</text:p>
      <text:p text:style-name="P2"/>
      <text:p text:style-name="P2">firebase.ts</text:p>
      <text:p text:style-name="P2">hooks/</text:p>
      <text:p text:style-name="P2">Custom Hooks.</text:p>
      <text:p text:style-name="P2"/>
      <text:p text:style-name="P2">useTheme.ts</text:p>
      <text:p text:style-name="P2"/>
      <text:p text:style-name="P2">useWindowSize.ts</text:p>
      <text:p text:style-name="P2"/>
      <text:p text:style-name="P2">useLocalStorage.ts</text:p>
      <text:p text:style-name="P2">services/</text:p>
      <text:p text:style-name="P2">Requisições.</text:p>
      <text:p text:style-name="P2"/>
      <text:p text:style-name="P2">products.ts</text:p>
      <text:p text:style-name="P2"/>
      <text:p text:style-name="P2">users.ts</text:p>
      <text:p text:style-name="P2"/>
      <text:p text:style-name="P2">auth.ts</text:p>
      <text:p text:style-name="P2"><text:soft-page-break/>utils/</text:p>
      <text:p text:style-name="P2">Funções auxiliares.</text:p>
      <text:p text:style-name="P2"/>
      <text:p text:style-name="P2">formatDate.ts</text:p>
      <text:p text:style-name="P2"/>
      <text:p text:style-name="P2">formatMoney.ts</text:p>
      <text:p text:style-name="P2"/>
      <text:p text:style-name="P2">capitalize.ts</text:p>
      <text:p text:style-name="P2"/>
      <text:p text:style-name="P2">slugify.ts</text:p>
      <text:p text:style-name="P2">types/</text:p>
      <text:p text:style-name="P2">Interfaces e tipos.</text:p>
      <text:p text:style-name="P2"/>
      <text:p text:style-name="P2">User.ts</text:p>
      <text:p text:style-name="P2"/>
      <text:p text:style-name="P2">Product.ts</text:p>
      <text:p text:style-name="P2"/>
      <text:p text:style-name="P2">Api.ts</text:p>
      <text:p text:style-name="P2">Minha recomendação</text:p>
      <text:p text:style-name="P2">Se você está aprendendo Next.js para entrar no mercado, eu seguiria esta filosofia:</text:p>
      <text:p text:style-name="P2"/>
      <text:p text:style-name="P2">Cada componente cuida do seu próprio SCSS (Header.module.scss, Card.module.scss, etc.).</text:p>
      <text:p text:style-name="P2"/>
      <text:p text:style-name="P2">A pasta styles fica enxuta, contendo apenas o que é compartilhado por todo o projeto: variáveis, mixins, funções, breakpoints e reset.</text:p>
      <text:p text:style-name="P2"/>
      <text:p text:style-name="P2">Use apenas um globals.scss, o que já existe dentro de app/, para importar o reset e definir estilos globais.</text:p>
      <text:p text:style-name="P2"/>
      <text:p text:style-name="P2"><text:soft-page-break/>Essa organização é simples, escalável e muito comum em projetos atuais com React e Next.js. Ela também facilita a manutenção, porque quem abre um componente encontra imediatamente seu código e seus estilos no mesmo lugar.</text:p>
      <text:p text:style-name="P2"/>
      <text:p text:style-name="P2"/>
      <text:p text:style-name="P2">no sass tem um lugar que importa tudo né, é no globals? pra compilar o que não é compilado</text:p>
      <text:p text:style-name="P2"/>
      <text:p text:style-name="P2">Sim, mas depende de como você está usando Sass.</text:p>
      <text:p text:style-name="P2"/>
      <text:p text:style-name="P2">No Next.js, não existe mais aquela ideia de um arquivo central para "compilar tudo", como acontecia em projetos HTML tradicionais.</text:p>
      <text:p text:style-name="P2"/>
      <text:p text:style-name="P2">Em projetos HTML + Sass (tradicional)</text:p>
      <text:p text:style-name="P2">Você tinha algo assim:</text:p>
      <text:p text:style-name="P2"/>
      <text:p text:style-name="P2">scss/</text:p>
      <text:p text:style-name="P2">│</text:p>
      <text:p text:style-name="P2">├── abstracts/</text:p>
      <text:p text:style-name="P2">├── layout/</text:p>
      <text:p text:style-name="P2">├── pages/</text:p>
      <text:p text:style-name="P2">├── components/</text:p>
      <text:p text:style-name="P2">└── main.scss</text:p>
      <text:p text:style-name="P2">O main.scss fazia:</text:p>
      <text:p text:style-name="P2"/>
      <text:p text:style-name="P2">@use "abstracts/variables";</text:p>
      <text:p text:style-name="P2">@use "abstracts/mixins";</text:p>
      <text:p text:style-name="P2"/>
      <text:p text:style-name="P2">@use "layout/header";</text:p>
      <text:p text:style-name="P2">@use "layout/footer";</text:p>
      <text:p text:style-name="P2"/>
      <text:p text:style-name="P2"><text:soft-page-break/>@use "components/button";</text:p>
      <text:p text:style-name="P2">@use "components/card";</text:p>
      <text:p text:style-name="P2"/>
      <text:p text:style-name="P2">@use "pages/home";</text:p>
      <text:p text:style-name="P2">@use "pages/about";</text:p>
      <text:p text:style-name="P2">O Sass compilava:</text:p>
      <text:p text:style-name="P2"/>
      <text:p text:style-name="P2">main.scss</text:p>
      <text:p text:style-name="P2"><text:s text:c="6"/>↓</text:p>
      <text:p text:style-name="P2">main.css</text:p>
      <text:p text:style-name="P2">Todo o CSS do site saía desse único arquivo.</text:p>
      <text:p text:style-name="P2"/>
      <text:p text:style-name="P2">No Next.js</text:p>
      <text:p text:style-name="P2">O Next compila cada arquivo .scss que você importa.</text:p>
      <text:p text:style-name="P2"/>
      <text:p text:style-name="P2">Por exemplo:</text:p>
      <text:p text:style-name="P2"/>
      <text:p text:style-name="P2">import styles from "./Button.module.scss";</text:p>
      <text:p text:style-name="P2">O Next compila apenas esse arquivo.</text:p>
      <text:p text:style-name="P2"/>
      <text:p text:style-name="P2">O mesmo acontece com:</text:p>
      <text:p text:style-name="P2"/>
      <text:p text:style-name="P2">import styles from "./Header.module.scss";</text:p>
      <text:p text:style-name="P2">Ele é compilado separadamente.</text:p>
      <text:p text:style-name="P2"/>
      <text:p text:style-name="P2">Você não precisa importar todos os módulos em um lugar só.</text:p>
      <text:p text:style-name="P2"/>
      <text:p text:style-name="P2">Então o globals.scss serve para quê?</text:p>
      <text:p text:style-name="P2">Ele é apenas o arquivo global do projeto.</text:p>
      <text:p text:style-name="P2"/>
      <text:p text:style-name="P2">Normalmente ele importa apenas os estilos que realmente devem existir no site inteiro.</text:p>
      <text:p text:style-name="P2"><text:soft-page-break/></text:p>
      <text:p text:style-name="P2">Exemplo:</text:p>
      <text:p text:style-name="P2"/>
      <text:p text:style-name="P2">@use "../styles/reset";</text:p>
      <text:p text:style-name="P2"/>
      <text:p text:style-name="P2">body {</text:p>
      <text:p text:style-name="P2"><text:s text:c="2"/>font-family: Arial;</text:p>
      <text:p text:style-name="P2">}</text:p>
      <text:p text:style-name="P2"/>
      <text:p text:style-name="P2">html {</text:p>
      <text:p text:style-name="P2"><text:s text:c="2"/>scroll-behavior: smooth;</text:p>
      <text:p text:style-name="P2">}</text:p>
      <text:p text:style-name="P2">Ou, se quiser centralizar:</text:p>
      <text:p text:style-name="P2"/>
      <text:p text:style-name="P2">@use "../styles/reset";</text:p>
      <text:p text:style-name="P2">@use "../styles/abstracts/variables";</text:p>
      <text:p text:style-name="P2">@use "../styles/themes/light";</text:p>
      <text:p text:style-name="P2">Ele não importa Header.module.scss, Card.module.scss, etc.</text:p>
      <text:p text:style-name="P2"/>
      <text:p text:style-name="P2">E os arquivos que "não geram CSS"?</text:p>
      <text:p text:style-name="P2">Arquivos como:</text:p>
      <text:p text:style-name="P2"/>
      <text:p text:style-name="P2">_variables.scss</text:p>
      <text:p text:style-name="P2">_mixins.scss</text:p>
      <text:p text:style-name="P2">_functions.scss</text:p>
      <text:p text:style-name="P2">não geram CSS porque só possuem variáveis, mixins e funções.</text:p>
      <text:p text:style-name="P2"/>
      <text:p text:style-name="P2">Você os importa onde precisar:</text:p>
      <text:p text:style-name="P2"/>
      <text:p text:style-name="P2">@use "@/styles/abstracts/variables" as *;</text:p>
      <text:p text:style-name="P2">@use "@/styles/abstracts/mixins" as *;</text:p>
      <text:p text:style-name="P2"/>
      <text:p text:style-name="P2"><text:soft-page-break/>.button {</text:p>
      <text:p text:style-name="P2"><text:s text:c="2"/>background: $primary;</text:p>
      <text:p text:style-name="P2"><text:s text:c="2"/>@include flex-center;</text:p>
      <text:p text:style-name="P2">}</text:p>
      <text:p text:style-name="P2">O Next entende isso e inclui apenas o CSS necessário.</text:p>
      <text:p text:style-name="P2"/>
      <text:p text:style-name="P2">Existe uma forma de não precisar importar variables e mixins em todo arquivo?</text:p>
      <text:p text:style-name="P2">Sim. O Next permite configurar isso no next.config usando sassOptions.additionalData.</text:p>
      <text:p text:style-name="P2"/>
      <text:p text:style-name="P2">Exemplo:</text:p>
      <text:p text:style-name="P2"/>
      <text:p text:style-name="P2">sassOptions: {</text:p>
      <text:p text:style-name="P2"><text:s text:c="2"/>additionalData: `</text:p>
      <text:p text:style-name="P2"><text:s text:c="4"/>@use "@/styles/abstracts/variables" as *;</text:p>
      <text:p text:style-name="P2"><text:s text:c="4"/>@use "@/styles/abstracts/mixins" as *;</text:p>
      <text:p text:style-name="P2"><text:s text:c="2"/>`,</text:p>
      <text:p text:style-name="P2">},</text:p>
      <text:p text:style-name="P2">Assim, todo arquivo .scss já terá acesso às variáveis e mixins automaticamente, sem precisar repetir o @use em cada um.</text:p>
      <text:p text:style-name="P2"/>
      <text:p text:style-name="P2">Resumindo</text:p>
      <text:p text:style-name="P2">❌ Não existe mais um main.scss para compilar tudo (como em projetos tradicionais).</text:p>
      <text:p text:style-name="P2"/>
      <text:p text:style-name="P2">✅ O globals.scss é apenas para estilos globais.</text:p>
      <text:p text:style-name="P2"/>
      <text:p text:style-name="P2">✅ Cada *.module.scss é compilado quando o componente correspondente é importado.</text:p>
      <text:p text:style-name="P2"/>
      <text:p text:style-name="P2"><text:soft-page-break/>✅ _variables.scss, _mixins.scss e _functions.scss são importados apenas onde são necessários (ou injetados automaticamente via sassOptions.additionalData).</text:p>
      <text:p text:style-name="P2"/>
      <text:p text:style-name="P2">Essa é a forma como a maioria dos projetos modernos em Next.js trabalha.</text:p>
      <text:p text:style-name="P2"/>
      <text:p text:style-name="P2"/>
      <text:p text:style-name="P2">me mostre a estrutura de pastas de novo, agora com o styles completo, abstracts e base, mas não coloque coisas depreciadas igual vc tinha falado, layout, globals e main</text:p>
      <text:p text:style-name="P2"/>
      <text:p text:style-name="P2">Se fosse para montar um projeto moderno, sem carregar padrões antigos que perderam sentido com React/Next.js, eu faria algo assim:</text:p>
      <text:p text:style-name="P2"/>
      <text:p text:style-name="P2">src/</text:p>
      <text:p text:style-name="P2">│</text:p>
      <text:p text:style-name="P2">├── app/</text:p>
      <text:p text:style-name="P2">│ <text:s text:c="2"/>├── favicon.ico</text:p>
      <text:p text:style-name="P2">│ <text:s text:c="2"/>├── globals.scss</text:p>
      <text:p text:style-name="P2">│ <text:s text:c="2"/>├── layout.tsx</text:p>
      <text:p text:style-name="P2">│ <text:s text:c="2"/>├── page.tsx</text:p>
      <text:p text:style-name="P2">│ <text:s text:c="2"/>│</text:p>
      <text:p text:style-name="P2">│ <text:s text:c="2"/>├── sobre/</text:p>
      <text:p text:style-name="P2">│ <text:s text:c="2"/>│ <text:s text:c="2"/>└── page.tsx</text:p>
      <text:p text:style-name="P2">│ <text:s text:c="2"/>│</text:p>
      <text:p text:style-name="P2">│ <text:s text:c="2"/>└── contato/</text:p>
      <text:p text:style-name="P2">│ <text:s text:c="6"/>└── page.tsx</text:p>
      <text:p text:style-name="P2">│</text:p>
      <text:p text:style-name="P2">├── components/</text:p>
      <text:p text:style-name="P2">│ <text:s text:c="2"/>├── Header/</text:p>
      <text:p text:style-name="P2">│ <text:s text:c="2"/>│ <text:s text:c="2"/>├── Header.tsx</text:p>
      <text:p text:style-name="P2"><text:soft-page-break/>│ <text:s text:c="2"/>│ <text:s text:c="2"/>└── Header.module.scss</text:p>
      <text:p text:style-name="P2">│ <text:s text:c="2"/>│</text:p>
      <text:p text:style-name="P2">│ <text:s text:c="2"/>├── Footer/</text:p>
      <text:p text:style-name="P2">│ <text:s text:c="2"/>│ <text:s text:c="2"/>├── Footer.tsx</text:p>
      <text:p text:style-name="P2">│ <text:s text:c="2"/>│ <text:s text:c="2"/>└── Footer.module.scss</text:p>
      <text:p text:style-name="P2">│ <text:s text:c="2"/>│</text:p>
      <text:p text:style-name="P2">│ <text:s text:c="2"/>├── Button/</text:p>
      <text:p text:style-name="P2">│ <text:s text:c="2"/>│ <text:s text:c="2"/>├── Button.tsx</text:p>
      <text:p text:style-name="P2">│ <text:s text:c="2"/>│ <text:s text:c="2"/>└── Button.module.scss</text:p>
      <text:p text:style-name="P2">│ <text:s text:c="2"/>│</text:p>
      <text:p text:style-name="P2">│ <text:s text:c="2"/>└── Card/</text:p>
      <text:p text:style-name="P2">│ <text:s text:c="6"/>├── Card.tsx</text:p>
      <text:p text:style-name="P2">│ <text:s text:c="6"/>└── Card.module.scss</text:p>
      <text:p text:style-name="P2">│</text:p>
      <text:p text:style-name="P2">├── styles/</text:p>
      <text:p text:style-name="P2">│ <text:s text:c="2"/>├── abstracts/</text:p>
      <text:p text:style-name="P2">│ <text:s text:c="2"/>│ <text:s text:c="2"/>├── _variables.scss</text:p>
      <text:p text:style-name="P2">│ <text:s text:c="2"/>│ <text:s text:c="2"/>├── _mixins.scss</text:p>
      <text:p text:style-name="P2">│ <text:s text:c="2"/>│ <text:s text:c="2"/>├── _functions.scss</text:p>
      <text:p text:style-name="P2">│ <text:s text:c="2"/>│ <text:s text:c="2"/>├── _breakpoints.scss</text:p>
      <text:p text:style-name="P2">│ <text:s text:c="2"/>│ <text:s text:c="2"/>└── _index.scss</text:p>
      <text:p text:style-name="P2">│ <text:s text:c="2"/>│</text:p>
      <text:p text:style-name="P2">│ <text:s text:c="2"/>├── base/</text:p>
      <text:p text:style-name="P2">│ <text:s text:c="2"/>│ <text:s text:c="2"/>├── _reset.scss</text:p>
      <text:p text:style-name="P2">│ <text:s text:c="2"/>│ <text:s text:c="2"/>├── _typography.scss</text:p>
      <text:p text:style-name="P2">│ <text:s text:c="2"/>│ <text:s text:c="2"/>├── _animations.scss</text:p>
      <text:p text:style-name="P2">│ <text:s text:c="2"/>│ <text:s text:c="2"/>└── _index.scss</text:p>
      <text:p text:style-name="P2">│ <text:s text:c="2"/>│</text:p>
      <text:p text:style-name="P2">│ <text:s text:c="2"/>└── themes/</text:p>
      <text:p text:style-name="P2">│ <text:s text:c="6"/>├── _light.scss</text:p>
      <text:p text:style-name="P2">│ <text:s text:c="6"/>├── _dark.scss</text:p>
      <text:p text:style-name="P2">│ <text:s text:c="6"/>└── _index.scss</text:p>
      <text:p text:style-name="P2"><text:soft-page-break/>│</text:p>
      <text:p text:style-name="P2">├── hooks/</text:p>
      <text:p text:style-name="P2">├── lib/</text:p>
      <text:p text:style-name="P2">├── services/</text:p>
      <text:p text:style-name="P2">├── types/</text:p>
      <text:p text:style-name="P2">├── utils/</text:p>
      <text:p text:style-name="P2">│</text:p>
      <text:p text:style-name="P2">└── public/</text:p>
      <text:p text:style-name="P2">O que vai em cada pasta?</text:p>
      <text:p text:style-name="P2">styles/abstracts/</text:p>
      <text:p text:style-name="P2">Arquivos que não geram CSS sozinhos.</text:p>
      <text:p text:style-name="P2"/>
      <text:p text:style-name="P2">São apenas ferramentas para outros arquivos.</text:p>
      <text:p text:style-name="P2"/>
      <text:p text:style-name="P2">abstracts/</text:p>
      <text:p text:style-name="P2">_variables.scss</text:p>
      <text:p text:style-name="P2">$primary: #2563eb;</text:p>
      <text:p text:style-name="P2">$secondary: #9333ea;</text:p>
      <text:p text:style-name="P2"/>
      <text:p text:style-name="P2">$radius: 8px;</text:p>
      <text:p text:style-name="P2"/>
      <text:p text:style-name="P2">$transition: .3s;</text:p>
      <text:p text:style-name="P2">_mixins.scss</text:p>
      <text:p text:style-name="P2">@mixin flex-center {</text:p>
      <text:p text:style-name="P2"><text:s text:c="4"/>display: flex;</text:p>
      <text:p text:style-name="P2"><text:s text:c="4"/>justify-content: center;</text:p>
      <text:p text:style-name="P2"><text:s text:c="4"/>align-items: center;</text:p>
      <text:p text:style-name="P2">}</text:p>
      <text:p text:style-name="P2">_functions.scss</text:p>
      <text:p text:style-name="P2">@function rem($px) {</text:p>
      <text:p text:style-name="P2"><text:s text:c="4"/>@return calc($px / 16) * 1rem;</text:p>
      <text:p text:style-name="P2">}</text:p>
      <text:p text:style-name="P2"><text:soft-page-break/>_breakpoints.scss</text:p>
      <text:p text:style-name="P2">$tablet:768px;</text:p>
      <text:p text:style-name="P2"/>
      <text:p text:style-name="P2">@mixin tablet{</text:p>
      <text:p text:style-name="P2"><text:s text:c="4"/>@media(max-width:$tablet){</text:p>
      <text:p text:style-name="P2"><text:s text:c="8"/>@content;</text:p>
      <text:p text:style-name="P2"><text:s text:c="4"/>}</text:p>
      <text:p text:style-name="P2">}</text:p>
      <text:p text:style-name="P2">_index.scss</text:p>
      <text:p text:style-name="P2">Serve apenas para reunir tudo.</text:p>
      <text:p text:style-name="P2"/>
      <text:p text:style-name="P2">@forward "variables";</text:p>
      <text:p text:style-name="P2">@forward "mixins";</text:p>
      <text:p text:style-name="P2">@forward "functions";</text:p>
      <text:p text:style-name="P2">@forward "breakpoints";</text:p>
      <text:p text:style-name="P2">Assim você pode fazer apenas:</text:p>
      <text:p text:style-name="P2"/>
      <text:p text:style-name="P2">@use "@/styles/abstracts" as *;</text:p>
      <text:p text:style-name="P2">em vez de importar quatro arquivos.</text:p>
      <text:p text:style-name="P2"/>
      <text:p text:style-name="P2">styles/base/</text:p>
      <text:p text:style-name="P2">Aqui ficam estilos globais básicos.</text:p>
      <text:p text:style-name="P2"/>
      <text:p text:style-name="P2">Eles geram CSS.</text:p>
      <text:p text:style-name="P2"/>
      <text:p text:style-name="P2">_reset.scss</text:p>
      <text:p text:style-name="P2">*{</text:p>
      <text:p text:style-name="P2"><text:s text:c="4"/>margin:0;</text:p>
      <text:p text:style-name="P2"><text:s text:c="4"/>padding:0;</text:p>
      <text:p text:style-name="P2"><text:s text:c="4"/>box-sizing:border-box;</text:p>
      <text:p text:style-name="P2">}</text:p>
      <text:p text:style-name="P2">_typography.scss</text:p>
      <text:p text:style-name="P2"><text:soft-page-break/>body{</text:p>
      <text:p text:style-name="P2"><text:s text:c="4"/>font-family: Inter, sans-serif;</text:p>
      <text:p text:style-name="P2">}</text:p>
      <text:p text:style-name="P2"/>
      <text:p text:style-name="P2">h1{</text:p>
      <text:p text:style-name="P2"><text:s text:c="4"/>font-size:2rem;</text:p>
      <text:p text:style-name="P2">}</text:p>
      <text:p text:style-name="P2"/>
      <text:p text:style-name="P2">p{</text:p>
      <text:p text:style-name="P2"><text:s text:c="4"/>line-height:1.6;</text:p>
      <text:p text:style-name="P2">}</text:p>
      <text:p text:style-name="P2">_animations.scss</text:p>
      <text:p text:style-name="P2">@keyframes fade{</text:p>
      <text:p text:style-name="P2"/>
      <text:p text:style-name="P2">from{</text:p>
      <text:p text:style-name="P2">opacity:0;</text:p>
      <text:p text:style-name="P2">}</text:p>
      <text:p text:style-name="P2"/>
      <text:p text:style-name="P2">to{</text:p>
      <text:p text:style-name="P2">opacity:1;</text:p>
      <text:p text:style-name="P2">}</text:p>
      <text:p text:style-name="P2"/>
      <text:p text:style-name="P2">}</text:p>
      <text:p text:style-name="P2">_index.scss</text:p>
      <text:p text:style-name="P2">@forward "reset";</text:p>
      <text:p text:style-name="P2">@forward "typography";</text:p>
      <text:p text:style-name="P2">@forward "animations";</text:p>
      <text:p text:style-name="P2">styles/themes/</text:p>
      <text:p text:style-name="P2">Caso exista Dark Mode.</text:p>
      <text:p text:style-name="P2"/>
      <text:p text:style-name="P2">themes/</text:p>
      <text:p text:style-name="P2">_light.scss</text:p>
      <text:p text:style-name="P2"><text:soft-page-break/>:root{</text:p>
      <text:p text:style-name="P2"/>
      <text:p text:style-name="P2">--background:#ffffff;</text:p>
      <text:p text:style-name="P2"/>
      <text:p text:style-name="P2">--text:#111;</text:p>
      <text:p text:style-name="P2"/>
      <text:p text:style-name="P2">}</text:p>
      <text:p text:style-name="P2">_dark.scss</text:p>
      <text:p text:style-name="P2">.dark{</text:p>
      <text:p text:style-name="P2"/>
      <text:p text:style-name="P2">--background:#111;</text:p>
      <text:p text:style-name="P2"/>
      <text:p text:style-name="P2">--text:#fff;</text:p>
      <text:p text:style-name="P2"/>
      <text:p text:style-name="P2">}</text:p>
      <text:p text:style-name="P2">_index.scss</text:p>
      <text:p text:style-name="P2">@forward "light";</text:p>
      <text:p text:style-name="P2">@forward "dark";</text:p>
      <text:p text:style-name="P2">O globals.scss</text:p>
      <text:p text:style-name="P2">O único arquivo global continua sendo o do app.</text:p>
      <text:p text:style-name="P2"/>
      <text:p text:style-name="P2">app/</text:p>
      <text:p text:style-name="P2"/>
      <text:p text:style-name="P2">globals.scss</text:p>
      <text:p text:style-name="P2">Ele pode ficar bem pequeno:</text:p>
      <text:p text:style-name="P2"/>
      <text:p text:style-name="P2">@use "@/styles/abstracts" as *;</text:p>
      <text:p text:style-name="P2"/>
      <text:p text:style-name="P2">@use "@/styles/base";</text:p>
      <text:p text:style-name="P2"/>
      <text:p text:style-name="P2">@use "@/styles/themes";</text:p>
      <text:p text:style-name="P2"/>
      <text:p text:style-name="P2"><text:soft-page-break/>body{</text:p>
      <text:p text:style-name="P2"><text:s text:c="4"/>background:var(--background);</text:p>
      <text:p text:style-name="P2"><text:s text:c="4"/>color:var(--text);</text:p>
      <text:p text:style-name="P2">}</text:p>
      <text:p text:style-name="P2">Perceba que ele só "liga" os estilos globais.</text:p>
      <text:p text:style-name="P2"/>
      <text:p text:style-name="P2">Todo o resto dos componentes continua usando seus próprios módulos:</text:p>
      <text:p text:style-name="P2"/>
      <text:p text:style-name="P2">Header.module.scss</text:p>
      <text:p text:style-name="P2"/>
      <text:p text:style-name="P2">Footer.module.scss</text:p>
      <text:p text:style-name="P2"/>
      <text:p text:style-name="P2">Card.module.scss</text:p>
      <text:p text:style-name="P2"/>
      <text:p text:style-name="P2">Button.module.scss</text:p>
      <text:p text:style-name="P2">Minha única mudança em relação à estrutura acima</text:p>
      <text:p text:style-name="P2">Eu só criaria a pasta themes se o projeto realmente tivesse múltiplos temas (como claro/escuro ou personalização de cores). Se não houver essa necessidade, ela pode ser omitida para manter a estrutura mais simples.</text:p>
      <text:p text:style-name="P2"/>
      <text:p text:style-name="P2">Essa organização usa o sistema moderno de módulos do Sass (@use e @forward), evita os padrões antigos (layout, pages, main.scss) e se encaixa muito bem na forma como o Next.js organiza componentes e estilos.</text:p>
      <text:p text:style-name="P2"/>
      <text:p text:style-name="P2"/>
      <text:p text:style-name="P2">como assim o _index.scss no themes</text:p>
      <text:p text:style-name="P2"/>
      <text:p text:style-name="P2">Boa observação. Na verdade, o _index.scss dentro de themes é opcional. Ele existe apenas para facilitar as importações usando @forward.</text:p>
      <text:p text:style-name="P2"/>
      <text:p text:style-name="P2"><text:soft-page-break/>Vamos entender.</text:p>
      <text:p text:style-name="P2"/>
      <text:p text:style-name="P2">Sem _index.scss</text:p>
      <text:p text:style-name="P2">Você teria:</text:p>
      <text:p text:style-name="P2"/>
      <text:p text:style-name="P2">styles/</text:p>
      <text:p text:style-name="P2">└── themes/</text:p>
      <text:p text:style-name="P2"><text:s text:c="4"/>├── _light.scss</text:p>
      <text:p text:style-name="P2"><text:s text:c="4"/>└── _dark.scss</text:p>
      <text:p text:style-name="P2">No globals.scss faria:</text:p>
      <text:p text:style-name="P2"/>
      <text:p text:style-name="P2">@use "@/styles/themes/light";</text:p>
      <text:p text:style-name="P2">@use "@/styles/themes/dark";</text:p>
      <text:p text:style-name="P2">Funciona perfeitamente.</text:p>
      <text:p text:style-name="P2"/>
      <text:p text:style-name="P2">Com _index.scss</text:p>
      <text:p text:style-name="P2">Você cria:</text:p>
      <text:p text:style-name="P2"/>
      <text:p text:style-name="P2">styles/</text:p>
      <text:p text:style-name="P2">└── themes/</text:p>
      <text:p text:style-name="P2"><text:s text:c="4"/>├── _light.scss</text:p>
      <text:p text:style-name="P2"><text:s text:c="4"/>├── _dark.scss</text:p>
      <text:p text:style-name="P2"><text:s text:c="4"/>└── _index.scss</text:p>
      <text:p text:style-name="P2">E dentro dele:</text:p>
      <text:p text:style-name="P2"/>
      <text:p text:style-name="P2">@forward "light";</text:p>
      <text:p text:style-name="P2">@forward "dark";</text:p>
      <text:p text:style-name="P2">Agora basta fazer:</text:p>
      <text:p text:style-name="P2"/>
      <text:p text:style-name="P2">@use "@/styles/themes";</text:p>
      <text:p text:style-name="P2">O Sass entende que themes aponta para _index.scss, que por sua vez encaminha (@forward) os outros arquivos.</text:p>
      <text:p text:style-name="P2"><text:soft-page-break/></text:p>
      <text:p text:style-name="P2">Mas isso faz sentido para themes?</text:p>
      <text:p text:style-name="P2">Na maioria dos projetos, não muito.</text:p>
      <text:p text:style-name="P2"/>
      <text:p text:style-name="P2">O @forward é mais útil em pastas como abstracts, onde você quer acessar variáveis, mixins e funções a partir de um único lugar.</text:p>
      <text:p text:style-name="P2"/>
      <text:p text:style-name="P2">Por exemplo:</text:p>
      <text:p text:style-name="P2"/>
      <text:p text:style-name="P2">@use "@/styles/abstracts" as *;</text:p>
      <text:p text:style-name="P2">é bem melhor do que:</text:p>
      <text:p text:style-name="P2"/>
      <text:p text:style-name="P2">@use "@/styles/abstracts/variables" as *;</text:p>
      <text:p text:style-name="P2">@use "@/styles/abstracts/mixins" as *;</text:p>
      <text:p text:style-name="P2">@use "@/styles/abstracts/functions" as *;</text:p>
      <text:p text:style-name="P2">@use "@/styles/abstracts/breakpoints" as *;</text:p>
      <text:p text:style-name="P2">Já em themes, normalmente você só tem 1 ou 2 arquivos, então o ganho é pequeno.</text:p>
      <text:p text:style-name="P2"/>
      <text:p text:style-name="P2">O que eu faria?</text:p>
      <text:p text:style-name="P2">Eu deixaria assim:</text:p>
      <text:p text:style-name="P2"/>
      <text:p text:style-name="P2">styles/</text:p>
      <text:p text:style-name="P2">├── abstracts/</text:p>
      <text:p text:style-name="P2">│ <text:s text:c="2"/>├── _variables.scss</text:p>
      <text:p text:style-name="P2">│ <text:s text:c="2"/>├── _mixins.scss</text:p>
      <text:p text:style-name="P2">│ <text:s text:c="2"/>├── _functions.scss</text:p>
      <text:p text:style-name="P2">│ <text:s text:c="2"/>├── _breakpoints.scss</text:p>
      <text:p text:style-name="P2">│ <text:s text:c="2"/>└── _index.scss <text:s text:c="2"/>← vale a pena</text:p>
      <text:p text:style-name="P2">│</text:p>
      <text:p text:style-name="P2">├── base/</text:p>
      <text:p text:style-name="P2">│ <text:s text:c="2"/>├── _reset.scss</text:p>
      <text:p text:style-name="P2"><text:soft-page-break/>│ <text:s text:c="2"/>├── _typography.scss</text:p>
      <text:p text:style-name="P2">│ <text:s text:c="2"/>└── _animations.scss</text:p>
      <text:p text:style-name="P2">│</text:p>
      <text:p text:style-name="P2">└── themes/</text:p>
      <text:p text:style-name="P2"><text:s text:c="4"/>├── _light.scss</text:p>
      <text:p text:style-name="P2"><text:s text:c="4"/>└── _dark.scss</text:p>
      <text:p text:style-name="P2">E no globals.scss:</text:p>
      <text:p text:style-name="P2"/>
      <text:p text:style-name="P2">@use "@/styles/base/reset";</text:p>
      <text:p text:style-name="P2">@use "@/styles/base/typography";</text:p>
      <text:p text:style-name="P2">@use "@/styles/base/animations";</text:p>
      <text:p text:style-name="P2"/>
      <text:p text:style-name="P2">@use "@/styles/themes/light";</text:p>
      <text:p text:style-name="P2">@use "@/styles/themes/dark";</text:p>
      <text:p text:style-name="P2">Ou seja, eu usaria _index.scss apenas em abstracts, onde ele realmente reduz repetição. Nas outras pastas, importar os arquivos diretamente costuma ser mais claro e não adiciona uma camada extra desnecessária. Isso é o que você provavelmente verá com mais frequência em projetos profissionais modernos.</text:p>
      <text:p text:style-name="P2"/>
      <text:p text:style-name="P2"/>
      <text:p text:style-name="P2">o que teria nesse arquivo abstracts</text:p>
      <text:p text:style-name="P2"/>
      <text:p text:style-name="P2">Na verdade, abstracts não é um arquivo, é uma pasta.</text:p>
      <text:p text:style-name="P2"/>
      <text:p text:style-name="P2">Ela serve para guardar coisas que não geram CSS por conta própria. Ou seja, são recursos que outros arquivos usam.</text:p>
      <text:p text:style-name="P2"/>
      <text:p text:style-name="P2">A estrutura ficaria assim:</text:p>
      <text:p text:style-name="P2"/>
      <text:p text:style-name="P2">styles/</text:p>
      <text:p text:style-name="P2">└── abstracts/</text:p>
      <text:p text:style-name="P2"><text:soft-page-break/><text:s text:c="4"/>├── _variables.scss</text:p>
      <text:p text:style-name="P2"><text:s text:c="4"/>├── _mixins.scss</text:p>
      <text:p text:style-name="P2"><text:s text:c="4"/>├── _functions.scss</text:p>
      <text:p text:style-name="P2"><text:s text:c="4"/>├── _breakpoints.scss</text:p>
      <text:p text:style-name="P2"><text:s text:c="4"/>└── _index.scss</text:p>
      <text:p text:style-name="P2">O único arquivo "especial" aí é o _index.scss.</text:p>
      <text:p text:style-name="P2"/>
      <text:p text:style-name="P2">O que tem no _index.scss?</text:p>
      <text:p text:style-name="P2">Apenas os @forward dos outros arquivos.</text:p>
      <text:p text:style-name="P2"/>
      <text:p text:style-name="P2">@forward "variables";</text:p>
      <text:p text:style-name="P2">@forward "mixins";</text:p>
      <text:p text:style-name="P2">@forward "functions";</text:p>
      <text:p text:style-name="P2">@forward "breakpoints";</text:p>
      <text:p text:style-name="P2">Ele não possui CSS, variáveis nem mixins.</text:p>
      <text:p text:style-name="P2"/>
      <text:p text:style-name="P2">Ele só reúne tudo.</text:p>
      <text:p text:style-name="P2"/>
      <text:p text:style-name="P2">Assim, em vez de escrever:</text:p>
      <text:p text:style-name="P2"/>
      <text:p text:style-name="P2">@use "@/styles/abstracts/variables" as *;</text:p>
      <text:p text:style-name="P2">@use "@/styles/abstracts/mixins" as *;</text:p>
      <text:p text:style-name="P2">@use "@/styles/abstracts/functions" as *;</text:p>
      <text:p text:style-name="P2">@use "@/styles/abstracts/breakpoints" as *;</text:p>
      <text:p text:style-name="P2">você escreve apenas:</text:p>
      <text:p text:style-name="P2"/>
      <text:p text:style-name="P2">@use "@/styles/abstracts" as *;</text:p>
      <text:p text:style-name="P2">porque o Sass procura automaticamente pelo _index.scss.</text:p>
      <text:p text:style-name="P2"/>
      <text:p text:style-name="P2">Vale a pena usar?</text:p>
      <text:p text:style-name="P2">Sim. Em projetos médios e grandes, praticamente todo componente precisa de:</text:p>
      <text:p text:style-name="P2"><text:soft-page-break/></text:p>
      <text:p text:style-name="P2">variáveis</text:p>
      <text:p text:style-name="P2"/>
      <text:p text:style-name="P2">mixins</text:p>
      <text:p text:style-name="P2"/>
      <text:p text:style-name="P2">breakpoints</text:p>
      <text:p text:style-name="P2"/>
      <text:p text:style-name="P2">Então um único @use deixa o código mais limpo.</text:p>
      <text:p text:style-name="P2"/>
      <text:p text:style-name="P2">Por exemplo, seu Button.module.scss poderia começar assim:</text:p>
      <text:p text:style-name="P2"/>
      <text:p text:style-name="P2">@use "@/styles/abstracts" as *;</text:p>
      <text:p text:style-name="P2"/>
      <text:p text:style-name="P2">.button {</text:p>
      <text:p text:style-name="P2"><text:s text:c="2"/>background: $primary;</text:p>
      <text:p text:style-name="P2"><text:s text:c="2"/>border-radius: $radius;</text:p>
      <text:p text:style-name="P2"/>
      <text:p text:style-name="P2"><text:s text:c="2"/>@include flex-center;</text:p>
      <text:p text:style-name="P2"/>
      <text:p text:style-name="P2"><text:s text:c="2"/>@include tablet {</text:p>
      <text:p text:style-name="P2"><text:s text:c="4"/>width: 100%;</text:p>
      <text:p text:style-name="P2"><text:s text:c="2"/>}</text:p>
      <text:p text:style-name="P2">}</text:p>
      <text:p text:style-name="P2">Sem o _index.scss, seriam quatro linhas de importação.</text:p>
      <text:p text:style-name="P2"/>
      <text:p text:style-name="P2">Resumo</text:p>
      <text:p text:style-name="P2">A pasta abstracts contém:</text:p>
      <text:p text:style-name="P2"/>
      <text:p text:style-name="P2">Arquivo<text:tab/>Serve para</text:p>
      <text:p text:style-name="P2">_variables.scss<text:tab/>Variáveis ($primary, $radius, etc.)</text:p>
      <text:p text:style-name="P2">_mixins.scss<text:tab/>Mixins reutilizáveis (@include flex-center)</text:p>
      <text:p text:style-name="P2">_functions.scss<text:tab/>Funções Sass (rem(), em(), etc.)</text:p>
      <text:p text:style-name="P2"><text:soft-page-break/>_breakpoints.scss<text:tab/>Variáveis e mixins para responsividade</text:p>
      <text:p text:style-name="P2">_index.scss<text:tab/>Reúne tudo usando @forward</text:p>
      <text:p text:style-name="P2">Essa é uma das poucas situações em que um _index.scss realmente traz benefício e é bastante comum em projetos que usam Sass moderno.</text:p>
      <text:p text:style-name="P2"/>
      <text:p text:style-name="P2"/>
      <text:p text:style-name="P2">refaça a estrutura de pastas agora com o _index.scss</text:p>
      <text:p text:style-name="P2"/>
      <text:p text:style-name="P2">src/</text:p>
      <text:p text:style-name="P2">│</text:p>
      <text:p text:style-name="P2">├── app/</text:p>
      <text:p text:style-name="P2">│ <text:s text:c="2"/>├── favicon.ico</text:p>
      <text:p text:style-name="P2">│ <text:s text:c="2"/>├── globals.scss</text:p>
      <text:p text:style-name="P2">│ <text:s text:c="2"/>├── layout.tsx</text:p>
      <text:p text:style-name="P2">│ <text:s text:c="2"/>├── page.tsx</text:p>
      <text:p text:style-name="P2">│ <text:s text:c="2"/>│</text:p>
      <text:p text:style-name="P2">│ <text:s text:c="2"/>├── sobre/</text:p>
      <text:p text:style-name="P2">│ <text:s text:c="2"/>│ <text:s text:c="2"/>└── page.tsx</text:p>
      <text:p text:style-name="P2">│ <text:s text:c="2"/>│</text:p>
      <text:p text:style-name="P2">│ <text:s text:c="2"/>└── contato/</text:p>
      <text:p text:style-name="P2">│ <text:s text:c="6"/>└── page.tsx</text:p>
      <text:p text:style-name="P2">│</text:p>
      <text:p text:style-name="P2">├── components/</text:p>
      <text:p text:style-name="P2">│ <text:s text:c="2"/>├── Header/</text:p>
      <text:p text:style-name="P2">│ <text:s text:c="2"/>│ <text:s text:c="2"/>├── Header.tsx</text:p>
      <text:p text:style-name="P2">│ <text:s text:c="2"/>│ <text:s text:c="2"/>└── Header.module.scss</text:p>
      <text:p text:style-name="P2">│ <text:s text:c="2"/>│</text:p>
      <text:p text:style-name="P2">│ <text:s text:c="2"/>├── Footer/</text:p>
      <text:p text:style-name="P2">│ <text:s text:c="2"/>│ <text:s text:c="2"/>├── Footer.tsx</text:p>
      <text:p text:style-name="P2">│ <text:s text:c="2"/>│ <text:s text:c="2"/>└── Footer.module.scss</text:p>
      <text:p text:style-name="P2">│ <text:s text:c="2"/>│</text:p>
      <text:p text:style-name="P2">│ <text:s text:c="2"/>├── Button/</text:p>
      <text:p text:style-name="P2"><text:soft-page-break/>│ <text:s text:c="2"/>│ <text:s text:c="2"/>├── Button.tsx</text:p>
      <text:p text:style-name="P2">│ <text:s text:c="2"/>│ <text:s text:c="2"/>└── Button.module.scss</text:p>
      <text:p text:style-name="P2">│ <text:s text:c="2"/>│</text:p>
      <text:p text:style-name="P2">│ <text:s text:c="2"/>├── Card/</text:p>
      <text:p text:style-name="P2">│ <text:s text:c="2"/>│ <text:s text:c="2"/>├── Card.tsx</text:p>
      <text:p text:style-name="P2">│ <text:s text:c="2"/>│ <text:s text:c="2"/>└── Card.module.scss</text:p>
      <text:p text:style-name="P2">│ <text:s text:c="2"/>│</text:p>
      <text:p text:style-name="P2">│ <text:s text:c="2"/>└── Modal/</text:p>
      <text:p text:style-name="P2">│ <text:s text:c="6"/>├── Modal.tsx</text:p>
      <text:p text:style-name="P2">│ <text:s text:c="6"/>└── Modal.module.scss</text:p>
      <text:p text:style-name="P2">│</text:p>
      <text:p text:style-name="P2">├── styles/</text:p>
      <text:p text:style-name="P2">│ <text:s text:c="2"/>├── abstracts/</text:p>
      <text:p text:style-name="P2">│ <text:s text:c="2"/>│ <text:s text:c="2"/>├── _variables.scss</text:p>
      <text:p text:style-name="P2">│ <text:s text:c="2"/>│ <text:s text:c="2"/>├── _mixins.scss</text:p>
      <text:p text:style-name="P2">│ <text:s text:c="2"/>│ <text:s text:c="2"/>├── _functions.scss</text:p>
      <text:p text:style-name="P2">│ <text:s text:c="2"/>│ <text:s text:c="2"/>├── _breakpoints.scss</text:p>
      <text:p text:style-name="P2">│ <text:s text:c="2"/>│ <text:s text:c="2"/>└── _index.scss</text:p>
      <text:p text:style-name="P2">│ <text:s text:c="2"/>│</text:p>
      <text:p text:style-name="P2">│ <text:s text:c="2"/>├── base/</text:p>
      <text:p text:style-name="P2">│ <text:s text:c="2"/>│ <text:s text:c="2"/>├── _reset.scss</text:p>
      <text:p text:style-name="P2">│ <text:s text:c="2"/>│ <text:s text:c="2"/>├── _typography.scss</text:p>
      <text:p text:style-name="P2">│ <text:s text:c="2"/>│ <text:s text:c="2"/>└── _animations.scss</text:p>
      <text:p text:style-name="P2">│ <text:s text:c="2"/>│</text:p>
      <text:p text:style-name="P2">│ <text:s text:c="2"/>└── themes/</text:p>
      <text:p text:style-name="P2">│ <text:s text:c="6"/>├── _light.scss</text:p>
      <text:p text:style-name="P2">│ <text:s text:c="6"/>└── _dark.scss</text:p>
      <text:p text:style-name="P2">│</text:p>
      <text:p text:style-name="P2">├── hooks/</text:p>
      <text:p text:style-name="P2">│</text:p>
      <text:p text:style-name="P2">├── lib/</text:p>
      <text:p text:style-name="P2">│</text:p>
      <text:p text:style-name="P2"><text:soft-page-break/>├── services/</text:p>
      <text:p text:style-name="P2">│</text:p>
      <text:p text:style-name="P2">├── types/</text:p>
      <text:p text:style-name="P2">│</text:p>
      <text:p text:style-name="P2">├── utils/</text:p>
      <text:p text:style-name="P2">│</text:p>
      <text:p text:style-name="P2">├── assets/</text:p>
      <text:p text:style-name="P2">│</text:p>
      <text:p text:style-name="P2">└── public/</text:p>
      <text:p text:style-name="P2"/>
      <text:p text:style-name="P2">se ao invés de ter globals do lado do layout ele ficasse na raiz de styles, seria possivel?</text:p>
      <text:p text:style-name="P2"/>
      <text:p text:style-name="P2">Sim, é possível. O importante é que o layout.tsx importe o arquivo correto.</text:p>
      <text:p text:style-name="P2"/>
      <text:p text:style-name="P2">Por exemplo:</text:p>
      <text:p text:style-name="P2"/>
      <text:p text:style-name="P2">src/</text:p>
      <text:p text:style-name="P2">├── app/</text:p>
      <text:p text:style-name="P2">│ <text:s text:c="2"/>├── layout.tsx</text:p>
      <text:p text:style-name="P2">│ <text:s text:c="2"/>├── page.tsx</text:p>
      <text:p text:style-name="P2">│ <text:s text:c="2"/>└── ...</text:p>
      <text:p text:style-name="P2">│</text:p>
      <text:p text:style-name="P2">├── styles/</text:p>
      <text:p text:style-name="P2">│ <text:s text:c="2"/>├── globals.scss</text:p>
      <text:p text:style-name="P2">│ <text:s text:c="2"/>├── abstracts/</text:p>
      <text:p text:style-name="P2">│ <text:s text:c="2"/>├── base/</text:p>
      <text:p text:style-name="P2">│ <text:s text:c="2"/>└── themes/</text:p>
      <text:p text:style-name="P2">No layout.tsx:</text:p>
      <text:p text:style-name="P2"/>
      <text:p text:style-name="P2">import "@/styles/globals.scss";</text:p>
      <text:p text:style-name="P2"><text:soft-page-break/></text:p>
      <text:p text:style-name="P2">export default function RootLayout({</text:p>
      <text:p text:style-name="P2"><text:s text:c="2"/>children,</text:p>
      <text:p text:style-name="P2">}: Readonly&lt;{ children: React.ReactNode }&gt;) {</text:p>
      <text:p text:style-name="P2"><text:s text:c="2"/>return (</text:p>
      <text:p text:style-name="P2"><text:s text:c="4"/>&lt;html lang="pt-BR"&gt;</text:p>
      <text:p text:style-name="P2"><text:s text:c="6"/>&lt;body&gt;{children}&lt;/body&gt;</text:p>
      <text:p text:style-name="P2"><text:s text:c="4"/>&lt;/html&gt;</text:p>
      <text:p text:style-name="P2"><text:s text:c="2"/>);</text:p>
      <text:p text:style-name="P2">}</text:p>
      <text:p text:style-name="P2">Vale a pena?</text:p>
      <text:p text:style-name="P2">Na minha opinião, sim.</text:p>
      <text:p text:style-name="P2"/>
      <text:p text:style-name="P2">Eu até prefiro assim, porque todos os estilos ficam centralizados na pasta styles:</text:p>
      <text:p text:style-name="P2"/>
      <text:p text:style-name="P2">styles/</text:p>
      <text:p text:style-name="P2">├── globals.scss</text:p>
      <text:p text:style-name="P2">├── abstracts/</text:p>
      <text:p text:style-name="P2">├── base/</text:p>
      <text:p text:style-name="P2">└── themes/</text:p>
      <text:p text:style-name="P2">Em vez de separar:</text:p>
      <text:p text:style-name="P2"/>
      <text:p text:style-name="P2">app/</text:p>
      <text:p text:style-name="P2">├── globals.scss</text:p>
      <text:p text:style-name="P2"/>
      <text:p text:style-name="P2">styles/</text:p>
      <text:p text:style-name="P2">├── abstracts/</text:p>
      <text:p text:style-name="P2">├── base/</text:p>
      <text:p text:style-name="P2">└── themes/</text:p>
      <text:p text:style-name="P2">A organização fica mais consistente: tudo relacionado a CSS/Sass está no mesmo lugar.</text:p>
      <text:p text:style-name="P2"><text:soft-page-break/></text:p>
      <text:p text:style-name="P2">Por que os projetos do Next colocam em app/?</text:p>
      <text:p text:style-name="P2">Porque é o padrão do template oficial. O template já vem com:</text:p>
      <text:p text:style-name="P2"/>
      <text:p text:style-name="P2">import "./globals.css";</text:p>
      <text:p text:style-name="P2">como um exemplo simples para quem está começando.</text:p>
      <text:p text:style-name="P2"/>
      <text:p text:style-name="P2">Mas o Next não exige que o arquivo esteja em app/. Você pode movê-lo para qualquer lugar, desde que seja importado no layout.tsx.</text:p>
      <text:p text:style-name="P2"/>
      <text:p text:style-name="P2">Eu faria assim:</text:p>
      <text:p text:style-name="P2"/>
      <text:p text:style-name="P2">src/</text:p>
      <text:p text:style-name="P2">│</text:p>
      <text:p text:style-name="P2">├── app/</text:p>
      <text:p text:style-name="P2">│ <text:s text:c="2"/>├── layout.tsx</text:p>
      <text:p text:style-name="P2">│ <text:s text:c="2"/>└── page.tsx</text:p>
      <text:p text:style-name="P2">│</text:p>
      <text:p text:style-name="P2">├── styles/</text:p>
      <text:p text:style-name="P2">│ <text:s text:c="2"/>├── globals.scss</text:p>
      <text:p text:style-name="P2">│ <text:s text:c="2"/>├── abstracts/</text:p>
      <text:p text:style-name="P2">│ <text:s text:c="2"/>├── base/</text:p>
      <text:p text:style-name="P2">│ <text:s text:c="2"/>└── themes/</text:p>
      <text:p text:style-name="P2">│</text:p>
      <text:p text:style-name="P2">└── components/</text:p>
      <text:p text:style-name="P2">É uma organização limpa e bastante comum em projetos maiores.</text:p>
      <text:p text:style-name="P2"/>
      <text:p text:style-name="P2"/>
      <text:p text:style-name="P2">refaça a estrutura de arquivos e coloque o globals na raiz de styles ao invés de no app/, me mostre a estrutura completa alterando apenas essa parte e sem explicações</text:p>
      <text:p text:style-name="P2"/>
      <text:p text:style-name="P2"><text:soft-page-break/>src/</text:p>
      <text:p text:style-name="P2">│</text:p>
      <text:p text:style-name="P2">├── app/</text:p>
      <text:p text:style-name="P2">│ <text:s text:c="2"/>├── favicon.ico</text:p>
      <text:p text:style-name="P2">│ <text:s text:c="2"/>├── layout.tsx</text:p>
      <text:p text:style-name="P2">│ <text:s text:c="2"/>├── page.tsx</text:p>
      <text:p text:style-name="P2">│ <text:s text:c="2"/>│</text:p>
      <text:p text:style-name="P2">│ <text:s text:c="2"/>├── sobre/</text:p>
      <text:p text:style-name="P2">│ <text:s text:c="2"/>│ <text:s text:c="2"/>└── page.tsx</text:p>
      <text:p text:style-name="P2">│ <text:s text:c="2"/>│</text:p>
      <text:p text:style-name="P2">│ <text:s text:c="2"/>└── contato/</text:p>
      <text:p text:style-name="P2">│ <text:s text:c="6"/>└── page.tsx</text:p>
      <text:p text:style-name="P2">│</text:p>
      <text:p text:style-name="P2">├── components/</text:p>
      <text:p text:style-name="P2">│ <text:s text:c="2"/>├── Header/</text:p>
      <text:p text:style-name="P2">│ <text:s text:c="2"/>│ <text:s text:c="2"/>├── Header.tsx</text:p>
      <text:p text:style-name="P2">│ <text:s text:c="2"/>│ <text:s text:c="2"/>└── Header.module.scss</text:p>
      <text:p text:style-name="P2">│ <text:s text:c="2"/>│</text:p>
      <text:p text:style-name="P2">│ <text:s text:c="2"/>├── Footer/</text:p>
      <text:p text:style-name="P2">│ <text:s text:c="2"/>│ <text:s text:c="2"/>├── Footer.tsx</text:p>
      <text:p text:style-name="P2">│ <text:s text:c="2"/>│ <text:s text:c="2"/>└── Footer.module.scss</text:p>
      <text:p text:style-name="P2">│ <text:s text:c="2"/>│</text:p>
      <text:p text:style-name="P2">│ <text:s text:c="2"/>├── Button/</text:p>
      <text:p text:style-name="P2">│ <text:s text:c="2"/>│ <text:s text:c="2"/>├── Button.tsx</text:p>
      <text:p text:style-name="P2">│ <text:s text:c="2"/>│ <text:s text:c="2"/>└── Button.module.scss</text:p>
      <text:p text:style-name="P2">│ <text:s text:c="2"/>│</text:p>
      <text:p text:style-name="P2">│ <text:s text:c="2"/>├── Card/</text:p>
      <text:p text:style-name="P2">│ <text:s text:c="2"/>│ <text:s text:c="2"/>├── Card.tsx</text:p>
      <text:p text:style-name="P2">│ <text:s text:c="2"/>│ <text:s text:c="2"/>└── Card.module.scss</text:p>
      <text:p text:style-name="P2">│ <text:s text:c="2"/>│</text:p>
      <text:p text:style-name="P2">│ <text:s text:c="2"/>└── Modal/</text:p>
      <text:p text:style-name="P2">│ <text:s text:c="6"/>├── Modal.tsx</text:p>
      <text:p text:style-name="P2"><text:soft-page-break/>│ <text:s text:c="6"/>└── Modal.module.scss</text:p>
      <text:p text:style-name="P2">│</text:p>
      <text:p text:style-name="P2">├── styles/</text:p>
      <text:p text:style-name="P2">│ <text:s text:c="2"/>├── globals.scss</text:p>
      <text:p text:style-name="P2">│ <text:s text:c="2"/>│</text:p>
      <text:p text:style-name="P2">│ <text:s text:c="2"/>├── abstracts/</text:p>
      <text:p text:style-name="P2">│ <text:s text:c="2"/>│ <text:s text:c="2"/>├── _variables.scss</text:p>
      <text:p text:style-name="P2">│ <text:s text:c="2"/>│ <text:s text:c="2"/>├── _mixins.scss</text:p>
      <text:p text:style-name="P2">│ <text:s text:c="2"/>│ <text:s text:c="2"/>├── _functions.scss</text:p>
      <text:p text:style-name="P2">│ <text:s text:c="2"/>│ <text:s text:c="2"/>├── _breakpoints.scss</text:p>
      <text:p text:style-name="P2">│ <text:s text:c="2"/>│ <text:s text:c="2"/>└── _index.scss</text:p>
      <text:p text:style-name="P2">│ <text:s text:c="2"/>│</text:p>
      <text:p text:style-name="P2">│ <text:s text:c="2"/>├── base/</text:p>
      <text:p text:style-name="P2">│ <text:s text:c="2"/>│ <text:s text:c="2"/>├── _reset.scss</text:p>
      <text:p text:style-name="P2">│ <text:s text:c="2"/>│ <text:s text:c="2"/>├── _typography.scss</text:p>
      <text:p text:style-name="P2">│ <text:s text:c="2"/>│ <text:s text:c="2"/>└── _animations.scss</text:p>
      <text:p text:style-name="P2">│ <text:s text:c="2"/>│</text:p>
      <text:p text:style-name="P2">│ <text:s text:c="2"/>└── themes/</text:p>
      <text:p text:style-name="P2">│ <text:s text:c="6"/>├── _light.scss</text:p>
      <text:p text:style-name="P2">│ <text:s text:c="6"/>└── _dark.scss</text:p>
      <text:p text:style-name="P2">│</text:p>
      <text:p text:style-name="P2">├── hooks/</text:p>
      <text:p text:style-name="P2">│</text:p>
      <text:p text:style-name="P2">├── lib/</text:p>
      <text:p text:style-name="P2">│</text:p>
      <text:p text:style-name="P2">├── services/</text:p>
      <text:p text:style-name="P2">│</text:p>
      <text:p text:style-name="P2">├── types/</text:p>
      <text:p text:style-name="P2">│</text:p>
      <text:p text:style-name="P2">├── utils/</text:p>
      <text:p text:style-name="P2">│</text:p>
      <text:p text:style-name="P2">├── assets/</text:p>
      <text:p text:style-name="P2"><text:soft-page-break/>│</text:p>
      <text:p text:style-name="P2">└── publi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17T15:32:08.000668000</meta:creation-date>
    <dc:date>2026-07-17T15:34:06.373751800</dc:date>
    <meta:editing-duration>PT1M58S</meta:editing-duration>
    <meta:editing-cycles>2</meta:editing-cycles>
    <meta:generator>LibreOffice/25.2.7.2$Windows_X86_64 LibreOffice_project/5cbfd1ab6520636bb5f7b99185aa69bd7456825d</meta:generator>
    <meta:document-statistic meta:table-count="0" meta:image-count="0" meta:object-count="0" meta:page-count="37" meta:paragraph-count="818" meta:word-count="2840" meta:character-count="18553" meta:non-whitespace-character-count="15759"/>
  </office:meta>
</office:document-meta>
</file>